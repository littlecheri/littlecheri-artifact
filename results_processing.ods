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56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173.59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72.96pt"/>
    </style:style>
    <style:style style:name="co8" style:family="table-column">
      <style:table-column-properties fo:break-before="auto" style:column-width="77.1pt"/>
    </style:style>
    <style:style style:name="co9" style:family="table-column">
      <style:table-column-properties fo:break-before="auto" style:column-width="52.1pt"/>
    </style:style>
    <style:style style:name="co10" style:family="table-column">
      <style:table-column-properties fo:break-before="auto" style:column-width="98.59pt"/>
    </style:style>
    <style:style style:name="co11" style:family="table-column">
      <style:table-column-properties fo:break-before="auto" style:column-width="57.66pt"/>
    </style:style>
    <style:style style:name="co12" style:family="table-column">
      <style:table-column-properties fo:break-before="auto" style:column-width="56.24pt"/>
    </style:style>
    <style:style style:name="co13" style:family="table-column">
      <style:table-column-properties fo:break-before="auto" style:column-width="152.79pt"/>
    </style:style>
    <style:style style:name="co14" style:family="table-column">
      <style:table-column-properties fo:break-before="auto" style:column-width="38.89pt"/>
    </style:style>
    <style:style style:name="co15" style:family="table-column">
      <style:table-column-properties fo:break-before="auto" style:column-width="70.16pt"/>
    </style:style>
    <style:style style:name="co16" style:family="table-column">
      <style:table-column-properties fo:break-before="auto" style:column-width="84.76pt"/>
    </style:style>
    <style:style style:name="co17" style:family="table-column">
      <style:table-column-properties fo:break-before="auto" style:column-width="109.76pt"/>
    </style:style>
    <style:style style:name="co18" style:family="table-column">
      <style:table-column-properties fo:break-before="auto" style:column-width="79.91pt"/>
    </style:style>
    <style:style style:name="co19" style:family="table-column">
      <style:table-column-properties fo:break-before="auto" style:column-width="127.81pt"/>
    </style:style>
    <style:style style:name="co20" style:family="table-column">
      <style:table-column-properties fo:break-before="auto" style:column-width="18.74pt"/>
    </style:style>
    <style:style style:name="co21" style:family="table-column">
      <style:table-column-properties fo:break-before="auto" style:column-width="50.71pt"/>
    </style:style>
    <style:style style:name="co22" style:family="table-column">
      <style:table-column-properties fo:break-before="auto" style:column-width="45.84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43.74pt"/>
    </style:style>
    <style:style style:name="co25" style:family="table-column">
      <style:table-column-properties fo:break-before="auto" style:column-width="23.61pt"/>
    </style:style>
    <style:style style:name="co26" style:family="table-column">
      <style:table-column-properties fo:break-before="auto" style:column-width="63.21pt"/>
    </style:style>
    <style:style style:name="co27" style:family="table-column">
      <style:table-column-properties fo:break-before="auto" style:column-width="50pt"/>
    </style:style>
    <style:style style:name="co28" style:family="table-column">
      <style:table-column-properties fo:break-before="auto" style:column-width="47.96pt"/>
    </style:style>
    <style:style style:name="co29" style:family="table-column">
      <style:table-column-properties fo:break-before="auto" style:column-width="26.39pt"/>
    </style:style>
    <style:style style:name="co30" style:family="table-column">
      <style:table-column-properties fo:break-before="auto" style:column-width="59.75pt"/>
    </style:style>
    <style:style style:name="co31" style:family="table-column">
      <style:table-column-properties fo:break-before="auto" style:column-width="115.31pt"/>
    </style:style>
    <style:style style:name="co32" style:family="table-column">
      <style:table-column-properties fo:break-before="auto" style:column-width="102.81pt"/>
    </style:style>
    <style:style style:name="co33" style:family="table-column">
      <style:table-column-properties fo:break-before="auto" style:column-width="181.3pt"/>
    </style:style>
    <style:style style:name="co34" style:family="table-column">
      <style:table-column-properties fo:break-before="auto" style:column-width="138.19pt"/>
    </style:style>
    <style:style style:name="co35" style:family="table-column">
      <style:table-column-properties fo:break-before="auto" style:column-width="133.34pt"/>
    </style:style>
    <style:style style:name="co36" style:family="table-column">
      <style:table-column-properties fo:break-before="auto" style:column-width="164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Code_20_size_20_data">
      <style:table-properties table:display="true" style:writing-mode="lr-tb"/>
    </style:style>
    <style:style style:name="ta3" style:family="table" style:master-page-name="PageStyle_5f_raw_5f_data_5f_8M_5f_stack">
      <style:table-properties table:display="false" style:writing-mode="lr-tb"/>
    </style:style>
    <style:style style:name="ta4" style:family="table" style:master-page-name="PageStyle_5f_raw_5f_data_5f_16K_5f_stack">
      <style:table-properties table:display="false" style:writing-mode="lr-tb"/>
    </style:style>
    <style:style style:name="ta5" style:family="table" style:master-page-name="PageStyle_5f_Gem5_20_cycles">
      <style:table-properties table:display="true" style:writing-mode="lr-tb"/>
    </style:style>
    <style:style style:name="ta6" style:family="table" style:master-page-name="PageStyle_5f_Instructions">
      <style:table-properties table:display="true" style:writing-mode="lr-tb"/>
    </style:style>
    <style:style style:name="ta7" style:family="table" style:master-page-name="PageStyle_5f_Stack_20_Pressure">
      <style:table-properties table:display="true" style:writing-mode="lr-tb"/>
    </style:style>
    <style:style style:name="ta8" style:family="table" style:master-page-name="PageStyle_5f_Stack_20_Allocation">
      <style:table-properties table:display="true" style:writing-mode="lr-tb"/>
    </style:style>
    <style:style style:name="ta9" style:family="table" style:master-page-name="PageStyle_5f_Figures">
      <style:table-properties table:display="false" style:writing-mode="lr-tb"/>
    </style:style>
    <style:style style:name="ta10" style:family="table" style:master-page-name="PageStyle_5f_Code_20_size_20_table">
      <style:table-properties table:display="false" style:writing-mode="lr-tb"/>
    </style:style>
    <style:style style:name="ta11" style:family="table" style:master-page-name="PageStyle_5f_Cycles_20_export">
      <style:table-properties table:display="false" style:writing-mode="lr-tb"/>
    </style:style>
    <style:style style:name="ta12" style:family="table" style:master-page-name="PageStyle_5f_Cycles_20_ideal">
      <style:table-properties table:display="true" style:writing-mode="lr-tb"/>
    </style:style>
    <style:style style:name="ta13" style:family="table" style:master-page-name="PageStyle_5f_Instructions_20_ideal">
      <style:table-properties table:display="true" style:writing-mode="lr-tb"/>
    </style:style>
    <style:style style:name="ta14" style:family="table" style:master-page-name="PageStyle_5f_Stack_20_ideal">
      <style:table-properties table:display="true" style:writing-mode="lr-tb"/>
    </style:style>
    <style:style style:name="ta15" style:family="table" style:master-page-name="PageStyle_5f_Stack_20_Allocation_20_ideal">
      <style:table-properties table:display="true" style:writing-mode="lr-tb"/>
    </style:style>
    <style:style style:name="ta16" style:family="table" style:master-page-name="PageStyle_5f_Reserve_20_Stack">
      <style:table-properties table:display="true" style:writing-mode="lr-tb"/>
    </style:style>
    <style:style style:name="ta17" style:family="table" style:master-page-name="PageStyle_5f_Encapsulation_20_Comparison">
      <style:table-properties table:display="true" style:writing-mode="lr-tb"/>
    </style:style>
    <style:style style:name="ta18" style:family="table" style:master-page-name="PageStyle_5f_Callee-saved_20_regs">
      <style:table-properties table:display="true" style:writing-mode="lr-tb"/>
    </style:style>
    <style:style style:name="ta19" style:family="table" style:master-page-name="PageStyle_5f_Stack_20_Revocation_20_Overhea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encap</text:p>
          </table:table-cell>
          <table:table-cell table:style-name="ce1" office:value-type="string" calcext:value-type="string">
            <text:p>clearregs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imSeconds</text:p>
          </table:table-cell>
          <table:table-cell table:style-name="ce1" office:value-type="string" calcext:value-type="string">
            <text:p>simTicks</text:p>
          </table:table-cell>
          <table:table-cell table:style-name="ce1" office:value-type="string" calcext:value-type="string">
            <text:p>system.cpu.cpi</text:p>
          </table:table-cell>
          <table:table-cell table:style-name="ce1" office:value-type="string" calcext:value-type="string">
            <text:p>sail.Instructions</text:p>
          </table:table-cell>
          <table:table-cell table:style-name="ce1" office:value-type="string" calcext:value-type="string">
            <text:p>stack_size</text:p>
          </table:table-cell>
          <table:table-cell table:style-name="ce1" office:value-type="string" calcext:value-type="string">
            <text:p>guest.stack.pressure</text:p>
          </table:table-cell>
          <table:table-cell table:style-name="ce1" office:value-type="string" calcext:value-type="string">
            <text:p>secureCalls</text:p>
          </table:table-cell>
          <table:table-cell table:style-name="ce1" office:value-type="string" calcext:value-type="string">
            <text:p>binary_size</text:p>
          </table:table-cell>
          <table:table-cell table:style-name="ce1" office:value-type="string" calcext:value-type="string">
            <text:p>guest.stack.cumulativeAllocation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csr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4631" calcext:value-type="float">
            <text:p>0.024631</text:p>
          </table:table-cell>
          <table:table-cell table:style-name="ce1" office:value-type="float" office:value="24631345000" calcext:value-type="float">
            <text:p>24631345000</text:p>
          </table:table-cell>
          <table:table-cell table:style-name="ce1" office:value-type="float" office:value="12.058121" calcext:value-type="float">
            <text:p>12.058121</text:p>
          </table:table-cell>
          <table:table-cell table:style-name="ce1" office:value-type="float" office:value="22954438" calcext:value-type="float">
            <text:p>2295443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3744" calcext:value-type="float">
            <text:p>3744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24728" calcext:value-type="float">
            <text:p>124728</text:p>
          </table:table-cell>
          <table:table-cell table:style-name="ce1" office:value-type="float" office:value="1679504" calcext:value-type="float">
            <text:p>167950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4599" calcext:value-type="float">
            <text:p>0.024599</text:p>
          </table:table-cell>
          <table:table-cell table:style-name="ce1" office:value-type="float" office:value="24599032000" calcext:value-type="float">
            <text:p>24599032000</text:p>
          </table:table-cell>
          <table:table-cell table:style-name="ce1" office:value-type="float" office:value="11.453823" calcext:value-type="float">
            <text:p>11.453823</text:p>
          </table:table-cell>
          <table:table-cell table:style-name="ce1" office:value-type="float" office:value="23104178" calcext:value-type="float">
            <text:p>2310417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3744" calcext:value-type="float">
            <text:p>3744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0592" calcext:value-type="float">
            <text:p>140592</text:p>
          </table:table-cell>
          <table:table-cell table:style-name="ce1" office:value-type="float" office:value="1679504" calcext:value-type="float">
            <text:p>167950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4998" calcext:value-type="float">
            <text:p>0.024998</text:p>
          </table:table-cell>
          <table:table-cell table:style-name="ce1" office:value-type="float" office:value="24998163000" calcext:value-type="float">
            <text:p>24998163000</text:p>
          </table:table-cell>
          <table:table-cell table:style-name="ce1" office:value-type="float" office:value="11.322006" calcext:value-type="float">
            <text:p>11.322006</text:p>
          </table:table-cell>
          <table:table-cell table:style-name="ce1" office:value-type="float" office:value="23232868" calcext:value-type="float">
            <text:p>2323286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4816" calcext:value-type="float">
            <text:p>24816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1856" calcext:value-type="float">
            <text:p>141856</text:p>
          </table:table-cell>
          <table:table-cell table:style-name="ce1" office:value-type="float" office:value="8767568" calcext:value-type="float">
            <text:p>8767568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4901" calcext:value-type="float">
            <text:p>0.024901</text:p>
          </table:table-cell>
          <table:table-cell table:style-name="ce1" office:value-type="float" office:value="24900983000" calcext:value-type="float">
            <text:p>24900983000</text:p>
          </table:table-cell>
          <table:table-cell table:style-name="ce1" office:value-type="float" office:value="11.239413" calcext:value-type="float">
            <text:p>11.239413</text:p>
          </table:table-cell>
          <table:table-cell table:style-name="ce1" office:value-type="float" office:value="23262271" calcext:value-type="float">
            <text:p>2326227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4784" calcext:value-type="float">
            <text:p>24784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2176" calcext:value-type="float">
            <text:p>142176</text:p>
          </table:table-cell>
          <table:table-cell table:style-name="ce1" office:value-type="float" office:value="8886304" calcext:value-type="float">
            <text:p>888630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5116" calcext:value-type="float">
            <text:p>0.025116</text:p>
          </table:table-cell>
          <table:table-cell table:style-name="ce1" office:value-type="float" office:value="25115979000" calcext:value-type="float">
            <text:p>25115979000</text:p>
          </table:table-cell>
          <table:table-cell table:style-name="ce1" office:value-type="float" office:value="11.46484" calcext:value-type="float">
            <text:p>11.46484</text:p>
          </table:table-cell>
          <table:table-cell table:style-name="ce1" office:value-type="float" office:value="23195105" calcext:value-type="float">
            <text:p>2319510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4816" calcext:value-type="float">
            <text:p>24816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1408" calcext:value-type="float">
            <text:p>141408</text:p>
          </table:table-cell>
          <table:table-cell table:style-name="ce1" office:value-type="float" office:value="8539888" calcext:value-type="float">
            <text:p>8539888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7106" calcext:value-type="float">
            <text:p>0.027106</text:p>
          </table:table-cell>
          <table:table-cell table:style-name="ce1" office:value-type="float" office:value="27105630000" calcext:value-type="float">
            <text:p>27105630000</text:p>
          </table:table-cell>
          <table:table-cell table:style-name="ce1" office:value-type="float" office:value="8.453429" calcext:value-type="float">
            <text:p>8.453429</text:p>
          </table:table-cell>
          <table:table-cell table:style-name="ce1" office:value-type="float" office:value="25359040" calcext:value-type="float">
            <text:p>25359040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4832" calcext:value-type="float">
            <text:p>24832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1904" calcext:value-type="float">
            <text:p>141904</text:p>
          </table:table-cell>
          <table:table-cell table:style-name="ce1" office:value-type="float" office:value="17523392" calcext:value-type="float">
            <text:p>1752339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4813" calcext:value-type="float">
            <text:p>0.024813</text:p>
          </table:table-cell>
          <table:table-cell table:style-name="ce1" office:value-type="float" office:value="24813294500" calcext:value-type="float">
            <text:p>24813294500</text:p>
          </table:table-cell>
          <table:table-cell table:style-name="ce1" office:value-type="float" office:value="11.289359" calcext:value-type="float">
            <text:p>11.289359</text:p>
          </table:table-cell>
          <table:table-cell table:style-name="ce1" office:value-type="float" office:value="23222334" calcext:value-type="float">
            <text:p>2322233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4784" calcext:value-type="float">
            <text:p>24784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1696" calcext:value-type="float">
            <text:p>141696</text:p>
          </table:table-cell>
          <table:table-cell table:style-name="ce1" office:value-type="float" office:value="8661856" calcext:value-type="float">
            <text:p>866185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4959" calcext:value-type="float">
            <text:p>0.024959</text:p>
          </table:table-cell>
          <table:table-cell table:style-name="ce1" office:value-type="float" office:value="24959087000" calcext:value-type="float">
            <text:p>24959087000</text:p>
          </table:table-cell>
          <table:table-cell table:style-name="ce1" office:value-type="float" office:value="11.620283" calcext:value-type="float">
            <text:p>11.620283</text:p>
          </table:table-cell>
          <table:table-cell table:style-name="ce1" office:value-type="float" office:value="23287408" calcext:value-type="float">
            <text:p>2328740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3744" calcext:value-type="float">
            <text:p>3744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7144" calcext:value-type="float">
            <text:p>147144</text:p>
          </table:table-cell>
          <table:table-cell table:style-name="ce1" office:value-type="float" office:value="1679504" calcext:value-type="float">
            <text:p>167950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5022" calcext:value-type="float">
            <text:p>0.025022</text:p>
          </table:table-cell>
          <table:table-cell table:style-name="ce1" office:value-type="float" office:value="25022025000" calcext:value-type="float">
            <text:p>25022025000</text:p>
          </table:table-cell>
          <table:table-cell table:style-name="ce1" office:value-type="float" office:value="11.243857" calcext:value-type="float">
            <text:p>11.243857</text:p>
          </table:table-cell>
          <table:table-cell table:style-name="ce1" office:value-type="float" office:value="23454013" calcext:value-type="float">
            <text:p>2345401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192" calcext:value-type="float">
            <text:p>4192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8824" calcext:value-type="float">
            <text:p>148824</text:p>
          </table:table-cell>
          <table:table-cell table:style-name="ce1" office:value-type="float" office:value="2863920" calcext:value-type="float">
            <text:p>286392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5409" calcext:value-type="float">
            <text:p>0.025409</text:p>
          </table:table-cell>
          <table:table-cell table:style-name="ce1" office:value-type="float" office:value="25409478000" calcext:value-type="float">
            <text:p>25409478000</text:p>
          </table:table-cell>
          <table:table-cell table:style-name="ce1" office:value-type="float" office:value="11.380887" calcext:value-type="float">
            <text:p>11.380887</text:p>
          </table:table-cell>
          <table:table-cell table:style-name="ce1" office:value-type="float" office:value="23482129" calcext:value-type="float">
            <text:p>2348212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208" calcext:value-type="float">
            <text:p>4208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9160" calcext:value-type="float">
            <text:p>149160</text:p>
          </table:table-cell>
          <table:table-cell table:style-name="ce1" office:value-type="float" office:value="2979504" calcext:value-type="float">
            <text:p>297950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5054" calcext:value-type="float">
            <text:p>0.025054</text:p>
          </table:table-cell>
          <table:table-cell table:style-name="ce1" office:value-type="float" office:value="25053861500" calcext:value-type="float">
            <text:p>25053861500</text:p>
          </table:table-cell>
          <table:table-cell table:style-name="ce1" office:value-type="float" office:value="11.347403" calcext:value-type="float">
            <text:p>11.347403</text:p>
          </table:table-cell>
          <table:table-cell table:style-name="ce1" office:value-type="float" office:value="23414511" calcext:value-type="float">
            <text:p>2341451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8344" calcext:value-type="float">
            <text:p>148344</text:p>
          </table:table-cell>
          <table:table-cell table:style-name="ce1" office:value-type="float" office:value="2600704" calcext:value-type="float">
            <text:p>260070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8124" calcext:value-type="float">
            <text:p>0.028124</text:p>
          </table:table-cell>
          <table:table-cell table:style-name="ce1" office:value-type="float" office:value="28123847000" calcext:value-type="float">
            <text:p>28123847000</text:p>
          </table:table-cell>
          <table:table-cell table:style-name="ce1" office:value-type="float" office:value="8.455957" calcext:value-type="float">
            <text:p>8.455957</text:p>
          </table:table-cell>
          <table:table-cell table:style-name="ce1" office:value-type="float" office:value="25783255" calcext:value-type="float">
            <text:p>2578325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224" calcext:value-type="float">
            <text:p>4224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8872" calcext:value-type="float">
            <text:p>148872</text:p>
          </table:table-cell>
          <table:table-cell table:style-name="ce1" office:value-type="float" office:value="12445440" calcext:value-type="float">
            <text:p>1244544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float" office:value="0.024997" calcext:value-type="float">
            <text:p>0.024997</text:p>
          </table:table-cell>
          <table:table-cell table:style-name="ce1" office:value-type="float" office:value="24996775500" calcext:value-type="float">
            <text:p>24996775500</text:p>
          </table:table-cell>
          <table:table-cell table:style-name="ce1" office:value-type="float" office:value="11.28434" calcext:value-type="float">
            <text:p>11.28434</text:p>
          </table:table-cell>
          <table:table-cell table:style-name="ce1" office:value-type="float" office:value="23442519" calcext:value-type="float">
            <text:p>2344251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48664" calcext:value-type="float">
            <text:p>148664</text:p>
          </table:table-cell>
          <table:table-cell table:style-name="ce1" office:value-type="float" office:value="2716272" calcext:value-type="float">
            <text:p>271627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0263" calcext:value-type="float">
            <text:p>0.020263</text:p>
          </table:table-cell>
          <table:table-cell table:style-name="ce1" office:value-type="float" office:value="20262890000" calcext:value-type="float">
            <text:p>20262890000</text:p>
          </table:table-cell>
          <table:table-cell table:style-name="ce1" office:value-type="float" office:value="5.415168" calcext:value-type="float">
            <text:p>5.415168</text:p>
          </table:table-cell>
          <table:table-cell table:style-name="ce1" office:value-type="float" office:value="12128905" calcext:value-type="float">
            <text:p>1212890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79716" calcext:value-type="float">
            <text:p>179716</text:p>
          </table:table-cell>
          <table:table-cell table:style-name="ce1" office:value-type="float" office:value="8926064" calcext:value-type="float">
            <text:p>892606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6672" calcext:value-type="float">
            <text:p>0.026672</text:p>
          </table:table-cell>
          <table:table-cell table:style-name="ce1" office:value-type="float" office:value="26672351000" calcext:value-type="float">
            <text:p>26672351000</text:p>
          </table:table-cell>
          <table:table-cell table:style-name="ce1" office:value-type="float" office:value="4.396565" calcext:value-type="float">
            <text:p>4.396565</text:p>
          </table:table-cell>
          <table:table-cell table:style-name="ce1" office:value-type="float" office:value="24994514" calcext:value-type="float">
            <text:p>2499451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179716" calcext:value-type="float">
            <text:p>179716</text:p>
          </table:table-cell>
          <table:table-cell table:style-name="ce1" office:value-type="float" office:value="4945280" calcext:value-type="float">
            <text:p>494528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574" calcext:value-type="float">
            <text:p>0.000574</text:p>
          </table:table-cell>
          <table:table-cell table:style-name="ce1" office:value-type="float" office:value="574038000" calcext:value-type="float">
            <text:p>574038000</text:p>
          </table:table-cell>
          <table:table-cell table:style-name="ce1" office:value-type="float" office:value="5.478786" calcext:value-type="float">
            <text:p>5.478786</text:p>
          </table:table-cell>
          <table:table-cell table:style-name="ce1" office:value-type="float" office:value="427772" calcext:value-type="float">
            <text:p>427772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5504" calcext:value-type="float">
            <text:p>550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9716" calcext:value-type="float">
            <text:p>179716</text:p>
          </table:table-cell>
          <table:table-cell table:style-name="ce1" office:value-type="float" office:value="512096" calcext:value-type="float">
            <text:p>5120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1883" calcext:value-type="float">
            <text:p>0.021883</text:p>
          </table:table-cell>
          <table:table-cell table:style-name="ce1" office:value-type="float" office:value="21882971000" calcext:value-type="float">
            <text:p>21882971000</text:p>
          </table:table-cell>
          <table:table-cell table:style-name="ce1" office:value-type="float" office:value="5.089284" calcext:value-type="float">
            <text:p>5.089284</text:p>
          </table:table-cell>
          <table:table-cell table:style-name="ce1" office:value-type="float" office:value="13244913" calcext:value-type="float">
            <text:p>1324491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06140" calcext:value-type="float">
            <text:p>206140</text:p>
          </table:table-cell>
          <table:table-cell table:style-name="ce1" office:value-type="float" office:value="8926064" calcext:value-type="float">
            <text:p>892606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7707" calcext:value-type="float">
            <text:p>0.027707</text:p>
          </table:table-cell>
          <table:table-cell table:style-name="ce1" office:value-type="float" office:value="27707000000" calcext:value-type="float">
            <text:p>27707000000</text:p>
          </table:table-cell>
          <table:table-cell table:style-name="ce1" office:value-type="float" office:value="4.345679" calcext:value-type="float">
            <text:p>4.345679</text:p>
          </table:table-cell>
          <table:table-cell table:style-name="ce1" office:value-type="float" office:value="25612926" calcext:value-type="float">
            <text:p>25612926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06140" calcext:value-type="float">
            <text:p>206140</text:p>
          </table:table-cell>
          <table:table-cell table:style-name="ce1" office:value-type="float" office:value="4945280" calcext:value-type="float">
            <text:p>494528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655017000" calcext:value-type="float">
            <text:p>655017000</text:p>
          </table:table-cell>
          <table:table-cell table:style-name="ce1" office:value-type="float" office:value="4.787149" calcext:value-type="float">
            <text:p>4.787149</text:p>
          </table:table-cell>
          <table:table-cell table:style-name="ce1" office:value-type="float" office:value="492031" calcext:value-type="float">
            <text:p>49203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5504" calcext:value-type="float">
            <text:p>550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6140" calcext:value-type="float">
            <text:p>206140</text:p>
          </table:table-cell>
          <table:table-cell table:style-name="ce1" office:value-type="float" office:value="512096" calcext:value-type="float">
            <text:p>5120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438" calcext:value-type="float">
            <text:p>0.022438</text:p>
          </table:table-cell>
          <table:table-cell table:style-name="ce1" office:value-type="float" office:value="22438127000" calcext:value-type="float">
            <text:p>22438127000</text:p>
          </table:table-cell>
          <table:table-cell table:style-name="ce1" office:value-type="float" office:value="4.971962" calcext:value-type="float">
            <text:p>4.971962</text:p>
          </table:table-cell>
          <table:table-cell table:style-name="ce1" office:value-type="float" office:value="14121193" calcext:value-type="float">
            <text:p>1412119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7200" calcext:value-type="float">
            <text:p>1720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16028" calcext:value-type="float">
            <text:p>216028</text:p>
          </table:table-cell>
          <table:table-cell table:style-name="ce1" office:value-type="float" office:value="282783632" calcext:value-type="float">
            <text:p>28278363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8632" calcext:value-type="float">
            <text:p>0.028632</text:p>
          </table:table-cell>
          <table:table-cell table:style-name="ce1" office:value-type="float" office:value="28631733000" calcext:value-type="float">
            <text:p>28631733000</text:p>
          </table:table-cell>
          <table:table-cell table:style-name="ce1" office:value-type="float" office:value="4.481868" calcext:value-type="float">
            <text:p>4.481868</text:p>
          </table:table-cell>
          <table:table-cell table:style-name="ce1" office:value-type="float" office:value="25661630" calcext:value-type="float">
            <text:p>25661630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6880" calcext:value-type="float">
            <text:p>16880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16028" calcext:value-type="float">
            <text:p>216028</text:p>
          </table:table-cell>
          <table:table-cell table:style-name="ce1" office:value-type="float" office:value="18635904" calcext:value-type="float">
            <text:p>1863590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663" calcext:value-type="float">
            <text:p>0.000663</text:p>
          </table:table-cell>
          <table:table-cell table:style-name="ce1" office:value-type="float" office:value="662811000" calcext:value-type="float">
            <text:p>662811000</text:p>
          </table:table-cell>
          <table:table-cell table:style-name="ce1" office:value-type="float" office:value="4.823738" calcext:value-type="float">
            <text:p>4.823738</text:p>
          </table:table-cell>
          <table:table-cell table:style-name="ce1" office:value-type="float" office:value="493909" calcext:value-type="float">
            <text:p>49390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1056" calcext:value-type="float">
            <text:p>210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6028" calcext:value-type="float">
            <text:p>216028</text:p>
          </table:table-cell>
          <table:table-cell table:style-name="ce1" office:value-type="float" office:value="1015632" calcext:value-type="float">
            <text:p>101563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315" calcext:value-type="float">
            <text:p>0.022315</text:p>
          </table:table-cell>
          <table:table-cell table:style-name="ce1" office:value-type="float" office:value="22314762000" calcext:value-type="float">
            <text:p>22314762000</text:p>
          </table:table-cell>
          <table:table-cell table:style-name="ce1" office:value-type="float" office:value="4.984381" calcext:value-type="float">
            <text:p>4.984381</text:p>
          </table:table-cell>
          <table:table-cell table:style-name="ce1" office:value-type="float" office:value="14193189" calcext:value-type="float">
            <text:p>1419318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7184" calcext:value-type="float">
            <text:p>17184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17212" calcext:value-type="float">
            <text:p>217212</text:p>
          </table:table-cell>
          <table:table-cell table:style-name="ce1" office:value-type="float" office:value="282207728" calcext:value-type="float">
            <text:p>282207728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7498" calcext:value-type="float">
            <text:p>0.027498</text:p>
          </table:table-cell>
          <table:table-cell table:style-name="ce1" office:value-type="float" office:value="27497865000" calcext:value-type="float">
            <text:p>27497865000</text:p>
          </table:table-cell>
          <table:table-cell table:style-name="ce1" office:value-type="float" office:value="4.305583" calcext:value-type="float">
            <text:p>4.305583</text:p>
          </table:table-cell>
          <table:table-cell table:style-name="ce1" office:value-type="float" office:value="25665226" calcext:value-type="float">
            <text:p>25665226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6864" calcext:value-type="float">
            <text:p>16864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17212" calcext:value-type="float">
            <text:p>217212</text:p>
          </table:table-cell>
          <table:table-cell table:style-name="ce1" office:value-type="float" office:value="18607296" calcext:value-type="float">
            <text:p>186072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663" calcext:value-type="float">
            <text:p>0.000663</text:p>
          </table:table-cell>
          <table:table-cell table:style-name="ce1" office:value-type="float" office:value="663020000" calcext:value-type="float">
            <text:p>663020000</text:p>
          </table:table-cell>
          <table:table-cell table:style-name="ce1" office:value-type="float" office:value="4.827609" calcext:value-type="float">
            <text:p>4.827609</text:p>
          </table:table-cell>
          <table:table-cell table:style-name="ce1" office:value-type="float" office:value="494025" calcext:value-type="float">
            <text:p>49402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1040" calcext:value-type="float">
            <text:p>210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7212" calcext:value-type="float">
            <text:p>217212</text:p>
          </table:table-cell>
          <table:table-cell table:style-name="ce1" office:value-type="float" office:value="1014624" calcext:value-type="float">
            <text:p>101462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275" calcext:value-type="float">
            <text:p>0.022275</text:p>
          </table:table-cell>
          <table:table-cell table:style-name="ce1" office:value-type="float" office:value="22274785000" calcext:value-type="float">
            <text:p>22274785000</text:p>
          </table:table-cell>
          <table:table-cell table:style-name="ce1" office:value-type="float" office:value="4.981074" calcext:value-type="float">
            <text:p>4.981074</text:p>
          </table:table-cell>
          <table:table-cell table:style-name="ce1" office:value-type="float" office:value="13841075" calcext:value-type="float">
            <text:p>1384107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7200" calcext:value-type="float">
            <text:p>1720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12700" calcext:value-type="float">
            <text:p>212700</text:p>
          </table:table-cell>
          <table:table-cell table:style-name="ce1" office:value-type="float" office:value="284607024" calcext:value-type="float">
            <text:p>28460702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86" calcext:value-type="float">
            <text:p>0.0286</text:p>
          </table:table-cell>
          <table:table-cell table:style-name="ce1" office:value-type="float" office:value="28599859000" calcext:value-type="float">
            <text:p>28599859000</text:p>
          </table:table-cell>
          <table:table-cell table:style-name="ce1" office:value-type="float" office:value="4.47822" calcext:value-type="float">
            <text:p>4.47822</text:p>
          </table:table-cell>
          <table:table-cell table:style-name="ce1" office:value-type="float" office:value="25647070" calcext:value-type="float">
            <text:p>25647070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6880" calcext:value-type="float">
            <text:p>16880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12700" calcext:value-type="float">
            <text:p>212700</text:p>
          </table:table-cell>
          <table:table-cell table:style-name="ce1" office:value-type="float" office:value="18779072" calcext:value-type="float">
            <text:p>1877907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661810000" calcext:value-type="float">
            <text:p>661810000</text:p>
          </table:table-cell>
          <table:table-cell table:style-name="ce1" office:value-type="float" office:value="4.821558" calcext:value-type="float">
            <text:p>4.821558</text:p>
          </table:table-cell>
          <table:table-cell table:style-name="ce1" office:value-type="float" office:value="493379" calcext:value-type="float">
            <text:p>49337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1056" calcext:value-type="float">
            <text:p>210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2700" calcext:value-type="float">
            <text:p>212700</text:p>
          </table:table-cell>
          <table:table-cell table:style-name="ce1" office:value-type="float" office:value="1019792" calcext:value-type="float">
            <text:p>101979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224" calcext:value-type="float">
            <text:p>0.022224</text:p>
          </table:table-cell>
          <table:table-cell table:style-name="ce1" office:value-type="float" office:value="22224485000" calcext:value-type="float">
            <text:p>22224485000</text:p>
          </table:table-cell>
          <table:table-cell table:style-name="ce1" office:value-type="float" office:value="5.009983" calcext:value-type="float">
            <text:p>5.009983</text:p>
          </table:table-cell>
          <table:table-cell table:style-name="ce1" office:value-type="float" office:value="13913387" calcext:value-type="float">
            <text:p>1391338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7184" calcext:value-type="float">
            <text:p>17184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16764" calcext:value-type="float">
            <text:p>216764</text:p>
          </table:table-cell>
          <table:table-cell table:style-name="ce1" office:value-type="float" office:value="280576272" calcext:value-type="float">
            <text:p>28057627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7982" calcext:value-type="float">
            <text:p>0.027982</text:p>
          </table:table-cell>
          <table:table-cell table:style-name="ce1" office:value-type="float" office:value="27981573000" calcext:value-type="float">
            <text:p>27981573000</text:p>
          </table:table-cell>
          <table:table-cell table:style-name="ce1" office:value-type="float" office:value="4.382497" calcext:value-type="float">
            <text:p>4.382497</text:p>
          </table:table-cell>
          <table:table-cell table:style-name="ce1" office:value-type="float" office:value="25651078" calcext:value-type="float">
            <text:p>2565107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6864" calcext:value-type="float">
            <text:p>16864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16764" calcext:value-type="float">
            <text:p>216764</text:p>
          </table:table-cell>
          <table:table-cell table:style-name="ce1" office:value-type="float" office:value="18579584" calcext:value-type="float">
            <text:p>1857958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665" calcext:value-type="float">
            <text:p>0.000665</text:p>
          </table:table-cell>
          <table:table-cell table:style-name="ce1" office:value-type="float" office:value="665081000" calcext:value-type="float">
            <text:p>665081000</text:p>
          </table:table-cell>
          <table:table-cell table:style-name="ce1" office:value-type="float" office:value="4.844962" calcext:value-type="float">
            <text:p>4.844962</text:p>
          </table:table-cell>
          <table:table-cell table:style-name="ce1" office:value-type="float" office:value="493667" calcext:value-type="float">
            <text:p>49366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1040" calcext:value-type="float">
            <text:p>210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6764" calcext:value-type="float">
            <text:p>216764</text:p>
          </table:table-cell>
          <table:table-cell table:style-name="ce1" office:value-type="float" office:value="1013024" calcext:value-type="float">
            <text:p>101302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19" calcext:value-type="float">
            <text:p>0.02219</text:p>
          </table:table-cell>
          <table:table-cell table:style-name="ce1" office:value-type="float" office:value="22190127000" calcext:value-type="float">
            <text:p>22190127000</text:p>
          </table:table-cell>
          <table:table-cell table:style-name="ce1" office:value-type="float" office:value="5.002408" calcext:value-type="float">
            <text:p>5.002408</text:p>
          </table:table-cell>
          <table:table-cell table:style-name="ce1" office:value-type="float" office:value="13913071" calcext:value-type="float">
            <text:p>1391307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7184" calcext:value-type="float">
            <text:p>17184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13884" calcext:value-type="float">
            <text:p>213884</text:p>
          </table:table-cell>
          <table:table-cell table:style-name="ce1" office:value-type="float" office:value="284031120" calcext:value-type="float">
            <text:p>28403112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7979" calcext:value-type="float">
            <text:p>0.027979</text:p>
          </table:table-cell>
          <table:table-cell table:style-name="ce1" office:value-type="float" office:value="27979075000" calcext:value-type="float">
            <text:p>27979075000</text:p>
          </table:table-cell>
          <table:table-cell table:style-name="ce1" office:value-type="float" office:value="4.382243" calcext:value-type="float">
            <text:p>4.382243</text:p>
          </table:table-cell>
          <table:table-cell table:style-name="ce1" office:value-type="float" office:value="25650666" calcext:value-type="float">
            <text:p>25650666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6864" calcext:value-type="float">
            <text:p>16864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13884" calcext:value-type="float">
            <text:p>213884</text:p>
          </table:table-cell>
          <table:table-cell table:style-name="ce1" office:value-type="float" office:value="18750464" calcext:value-type="float">
            <text:p>1875046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664" calcext:value-type="float">
            <text:p>0.000664</text:p>
          </table:table-cell>
          <table:table-cell table:style-name="ce1" office:value-type="float" office:value="663775000" calcext:value-type="float">
            <text:p>663775000</text:p>
          </table:table-cell>
          <table:table-cell table:style-name="ce1" office:value-type="float" office:value="4.838232" calcext:value-type="float">
            <text:p>4.838232</text:p>
          </table:table-cell>
          <table:table-cell table:style-name="ce1" office:value-type="float" office:value="493495" calcext:value-type="float">
            <text:p>49349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1040" calcext:value-type="float">
            <text:p>210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3884" calcext:value-type="float">
            <text:p>213884</text:p>
          </table:table-cell>
          <table:table-cell table:style-name="ce1" office:value-type="float" office:value="1018784" calcext:value-type="float">
            <text:p>101878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1885" calcext:value-type="float">
            <text:p>0.021885</text:p>
          </table:table-cell>
          <table:table-cell table:style-name="ce1" office:value-type="float" office:value="21885212000" calcext:value-type="float">
            <text:p>21885212000</text:p>
          </table:table-cell>
          <table:table-cell table:style-name="ce1" office:value-type="float" office:value="5.089793" calcext:value-type="float">
            <text:p>5.089793</text:p>
          </table:table-cell>
          <table:table-cell table:style-name="ce1" office:value-type="float" office:value="13482104" calcext:value-type="float">
            <text:p>1348210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16604" calcext:value-type="float">
            <text:p>216604</text:p>
          </table:table-cell>
          <table:table-cell table:style-name="ce1" office:value-type="float" office:value="8926064" calcext:value-type="float">
            <text:p>892606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7629" calcext:value-type="float">
            <text:p>0.027629</text:p>
          </table:table-cell>
          <table:table-cell table:style-name="ce1" office:value-type="float" office:value="27628805000" calcext:value-type="float">
            <text:p>27628805000</text:p>
          </table:table-cell>
          <table:table-cell table:style-name="ce1" office:value-type="float" office:value="4.333399" calcext:value-type="float">
            <text:p>4.333399</text:p>
          </table:table-cell>
          <table:table-cell table:style-name="ce1" office:value-type="float" office:value="25707189" calcext:value-type="float">
            <text:p>2570718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16604" calcext:value-type="float">
            <text:p>216604</text:p>
          </table:table-cell>
          <table:table-cell table:style-name="ce1" office:value-type="float" office:value="4945280" calcext:value-type="float">
            <text:p>494528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691917000" calcext:value-type="float">
            <text:p>691917000</text:p>
          </table:table-cell>
          <table:table-cell table:style-name="ce1" office:value-type="float" office:value="5.056051" calcext:value-type="float">
            <text:p>5.056051</text:p>
          </table:table-cell>
          <table:table-cell table:style-name="ce1" office:value-type="float" office:value="505680" calcext:value-type="float">
            <text:p>505680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5504" calcext:value-type="float">
            <text:p>550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6604" calcext:value-type="float">
            <text:p>216604</text:p>
          </table:table-cell>
          <table:table-cell table:style-name="ce1" office:value-type="float" office:value="512096" calcext:value-type="float">
            <text:p>512096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431" calcext:value-type="float">
            <text:p>0.022431</text:p>
          </table:table-cell>
          <table:table-cell table:style-name="ce1" office:value-type="float" office:value="22430930500" calcext:value-type="float">
            <text:p>22430930500</text:p>
          </table:table-cell>
          <table:table-cell table:style-name="ce1" office:value-type="float" office:value="4.950588" calcext:value-type="float">
            <text:p>4.950588</text:p>
          </table:table-cell>
          <table:table-cell table:style-name="ce1" office:value-type="float" office:value="14556424" calcext:value-type="float">
            <text:p>1455642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29420" calcext:value-type="float">
            <text:p>229420</text:p>
          </table:table-cell>
          <table:table-cell table:style-name="ce1" office:value-type="float" office:value="9855952" calcext:value-type="float">
            <text:p>985595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8627" calcext:value-type="float">
            <text:p>0.028627</text:p>
          </table:table-cell>
          <table:table-cell table:style-name="ce1" office:value-type="float" office:value="28626978000" calcext:value-type="float">
            <text:p>28626978000</text:p>
          </table:table-cell>
          <table:table-cell table:style-name="ce1" office:value-type="float" office:value="4.480449" calcext:value-type="float">
            <text:p>4.480449</text:p>
          </table:table-cell>
          <table:table-cell table:style-name="ce1" office:value-type="float" office:value="25765853" calcext:value-type="float">
            <text:p>2576585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29420" calcext:value-type="float">
            <text:p>229420</text:p>
          </table:table-cell>
          <table:table-cell table:style-name="ce1" office:value-type="float" office:value="5010496" calcext:value-type="float">
            <text:p>5010496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702" calcext:value-type="float">
            <text:p>0.000702</text:p>
          </table:table-cell>
          <table:table-cell table:style-name="ce1" office:value-type="float" office:value="702459000" calcext:value-type="float">
            <text:p>702459000</text:p>
          </table:table-cell>
          <table:table-cell table:style-name="ce1" office:value-type="float" office:value="5.109687" calcext:value-type="float">
            <text:p>5.109687</text:p>
          </table:table-cell>
          <table:table-cell table:style-name="ce1" office:value-type="float" office:value="507951" calcext:value-type="float">
            <text:p>50795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9420" calcext:value-type="float">
            <text:p>229420</text:p>
          </table:table-cell>
          <table:table-cell table:style-name="ce1" office:value-type="float" office:value="515760" calcext:value-type="float">
            <text:p>51576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346" calcext:value-type="float">
            <text:p>0.022346</text:p>
          </table:table-cell>
          <table:table-cell table:style-name="ce1" office:value-type="float" office:value="22345539500" calcext:value-type="float">
            <text:p>22345539500</text:p>
          </table:table-cell>
          <table:table-cell table:style-name="ce1" office:value-type="float" office:value="4.971234" calcext:value-type="float">
            <text:p>4.971234</text:p>
          </table:table-cell>
          <table:table-cell table:style-name="ce1" office:value-type="float" office:value="14628420" calcext:value-type="float">
            <text:p>14628420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30604" calcext:value-type="float">
            <text:p>230604</text:p>
          </table:table-cell>
          <table:table-cell table:style-name="ce1" office:value-type="float" office:value="9568048" calcext:value-type="float">
            <text:p>9568048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7722" calcext:value-type="float">
            <text:p>0.027722</text:p>
          </table:table-cell>
          <table:table-cell table:style-name="ce1" office:value-type="float" office:value="27722440500" calcext:value-type="float">
            <text:p>27722440500</text:p>
          </table:table-cell>
          <table:table-cell table:style-name="ce1" office:value-type="float" office:value="4.340101" calcext:value-type="float">
            <text:p>4.340101</text:p>
          </table:table-cell>
          <table:table-cell table:style-name="ce1" office:value-type="float" office:value="25769449" calcext:value-type="float">
            <text:p>2576944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30604" calcext:value-type="float">
            <text:p>230604</text:p>
          </table:table-cell>
          <table:table-cell table:style-name="ce1" office:value-type="float" office:value="4996256" calcext:value-type="float">
            <text:p>4996256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699931500" calcext:value-type="float">
            <text:p>699931500</text:p>
          </table:table-cell>
          <table:table-cell table:style-name="ce1" office:value-type="float" office:value="5.094183" calcext:value-type="float">
            <text:p>5.094183</text:p>
          </table:table-cell>
          <table:table-cell table:style-name="ce1" office:value-type="float" office:value="508067" calcext:value-type="float">
            <text:p>50806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0604" calcext:value-type="float">
            <text:p>230604</text:p>
          </table:table-cell>
          <table:table-cell table:style-name="ce1" office:value-type="float" office:value="515280" calcext:value-type="float">
            <text:p>51528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311" calcext:value-type="float">
            <text:p>0.022311</text:p>
          </table:table-cell>
          <table:table-cell table:style-name="ce1" office:value-type="float" office:value="22311393000" calcext:value-type="float">
            <text:p>22311393000</text:p>
          </table:table-cell>
          <table:table-cell table:style-name="ce1" office:value-type="float" office:value="4.969224" calcext:value-type="float">
            <text:p>4.969224</text:p>
          </table:table-cell>
          <table:table-cell table:style-name="ce1" office:value-type="float" office:value="14276306" calcext:value-type="float">
            <text:p>14276306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26012" calcext:value-type="float">
            <text:p>226012</text:p>
          </table:table-cell>
          <table:table-cell table:style-name="ce1" office:value-type="float" office:value="9855344" calcext:value-type="float">
            <text:p>985534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8057" calcext:value-type="float">
            <text:p>0.028057</text:p>
          </table:table-cell>
          <table:table-cell table:style-name="ce1" office:value-type="float" office:value="28057092000" calcext:value-type="float">
            <text:p>28057092000</text:p>
          </table:table-cell>
          <table:table-cell table:style-name="ce1" office:value-type="float" office:value="4.392571" calcext:value-type="float">
            <text:p>4.392571</text:p>
          </table:table-cell>
          <table:table-cell table:style-name="ce1" office:value-type="float" office:value="25751293" calcext:value-type="float">
            <text:p>2575129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26012" calcext:value-type="float">
            <text:p>226012</text:p>
          </table:table-cell>
          <table:table-cell table:style-name="ce1" office:value-type="float" office:value="5009072" calcext:value-type="float">
            <text:p>500907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701" calcext:value-type="float">
            <text:p>0.000701</text:p>
          </table:table-cell>
          <table:table-cell table:style-name="ce1" office:value-type="float" office:value="700534000" calcext:value-type="float">
            <text:p>700534000</text:p>
          </table:table-cell>
          <table:table-cell table:style-name="ce1" office:value-type="float" office:value="5.101111" calcext:value-type="float">
            <text:p>5.101111</text:p>
          </table:table-cell>
          <table:table-cell table:style-name="ce1" office:value-type="float" office:value="507421" calcext:value-type="float">
            <text:p>50742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5968" calcext:value-type="float">
            <text:p>596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6012" calcext:value-type="float">
            <text:p>226012</text:p>
          </table:table-cell>
          <table:table-cell table:style-name="ce1" office:value-type="float" office:value="515264" calcext:value-type="float">
            <text:p>51526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226" calcext:value-type="float">
            <text:p>0.022226</text:p>
          </table:table-cell>
          <table:table-cell table:style-name="ce1" office:value-type="float" office:value="22226420500" calcext:value-type="float">
            <text:p>22226420500</text:p>
          </table:table-cell>
          <table:table-cell table:style-name="ce1" office:value-type="float" office:value="4.990137" calcext:value-type="float">
            <text:p>4.990137</text:p>
          </table:table-cell>
          <table:table-cell table:style-name="ce1" office:value-type="float" office:value="14348618" calcext:value-type="float">
            <text:p>1434861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52" calcext:value-type="float">
            <text:p>2352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30060" calcext:value-type="float">
            <text:p>230060</text:p>
          </table:table-cell>
          <table:table-cell table:style-name="ce1" office:value-type="float" office:value="9568592" calcext:value-type="float">
            <text:p>956859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8462" calcext:value-type="float">
            <text:p>0.028462</text:p>
          </table:table-cell>
          <table:table-cell table:style-name="ce1" office:value-type="float" office:value="28461635000" calcext:value-type="float">
            <text:p>28461635000</text:p>
          </table:table-cell>
          <table:table-cell table:style-name="ce1" office:value-type="float" office:value="4.457022" calcext:value-type="float">
            <text:p>4.457022</text:p>
          </table:table-cell>
          <table:table-cell table:style-name="ce1" office:value-type="float" office:value="25755301" calcext:value-type="float">
            <text:p>2575530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30060" calcext:value-type="float">
            <text:p>230060</text:p>
          </table:table-cell>
          <table:table-cell table:style-name="ce1" office:value-type="float" office:value="4996368" calcext:value-type="float">
            <text:p>4996368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697056000" calcext:value-type="float">
            <text:p>697056000</text:p>
          </table:table-cell>
          <table:table-cell table:style-name="ce1" office:value-type="float" office:value="5.075711" calcext:value-type="float">
            <text:p>5.075711</text:p>
          </table:table-cell>
          <table:table-cell table:style-name="ce1" office:value-type="float" office:value="507709" calcext:value-type="float">
            <text:p>50770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0060" calcext:value-type="float">
            <text:p>230060</text:p>
          </table:table-cell>
          <table:table-cell table:style-name="ce1" office:value-type="float" office:value="515360" calcext:value-type="float">
            <text:p>51536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malloc</text:p>
          </table:table-cell>
          <table:table-cell table:style-name="ce1" office:value-type="float" office:value="0.022233" calcext:value-type="float">
            <text:p>0.022233</text:p>
          </table:table-cell>
          <table:table-cell table:style-name="ce1" office:value-type="float" office:value="22232664000" calcext:value-type="float">
            <text:p>22232664000</text:p>
          </table:table-cell>
          <table:table-cell table:style-name="ce1" office:value-type="float" office:value="4.991708" calcext:value-type="float">
            <text:p>4.991708</text:p>
          </table:table-cell>
          <table:table-cell table:style-name="ce1" office:value-type="float" office:value="14348302" calcext:value-type="float">
            <text:p>14348302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27196" calcext:value-type="float">
            <text:p>227196</text:p>
          </table:table-cell>
          <table:table-cell table:style-name="ce1" office:value-type="float" office:value="9567440" calcext:value-type="float">
            <text:p>956744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string</text:p>
          </table:table-cell>
          <table:table-cell table:style-name="ce1" office:value-type="float" office:value="0.028461" calcext:value-type="float">
            <text:p>0.028461</text:p>
          </table:table-cell>
          <table:table-cell table:style-name="ce1" office:value-type="float" office:value="28460821000" calcext:value-type="float">
            <text:p>28460821000</text:p>
          </table:table-cell>
          <table:table-cell table:style-name="ce1" office:value-type="float" office:value="4.457033" calcext:value-type="float">
            <text:p>4.457033</text:p>
          </table:table-cell>
          <table:table-cell table:style-name="ce1" office:value-type="float" office:value="25754889" calcext:value-type="float">
            <text:p>2575488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27196" calcext:value-type="float">
            <text:p>227196</text:p>
          </table:table-cell>
          <table:table-cell table:style-name="ce1" office:value-type="float" office:value="4994832" calcext:value-type="float">
            <text:p>499483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libc-bench_regex</text:p>
          </table:table-cell>
          <table:table-cell table:style-name="ce1" office:value-type="float" office:value="0.000695" calcext:value-type="float">
            <text:p>0.000695</text:p>
          </table:table-cell>
          <table:table-cell table:style-name="ce1" office:value-type="float" office:value="695064000" calcext:value-type="float">
            <text:p>695064000</text:p>
          </table:table-cell>
          <table:table-cell table:style-name="ce1" office:value-type="float" office:value="5.064119" calcext:value-type="float">
            <text:p>5.064119</text:p>
          </table:table-cell>
          <table:table-cell table:style-name="ce1" office:value-type="float" office:value="507537" calcext:value-type="float">
            <text:p>50753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5968" calcext:value-type="float">
            <text:p>596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7196" calcext:value-type="float">
            <text:p>227196</text:p>
          </table:table-cell>
          <table:table-cell table:style-name="ce1" office:value-type="float" office:value="514784" calcext:value-type="float">
            <text:p>51478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1786" calcext:value-type="float">
            <text:p>0.001786</text:p>
          </table:table-cell>
          <table:table-cell table:style-name="ce1" office:value-type="float" office:value="1785561500" calcext:value-type="float">
            <text:p>1785561500</text:p>
          </table:table-cell>
          <table:table-cell table:style-name="ce1" office:value-type="float" office:value="4.665887" calcext:value-type="float">
            <text:p>4.665887</text:p>
          </table:table-cell>
          <table:table-cell table:style-name="ce1" office:value-type="float" office:value="1565738" calcext:value-type="float">
            <text:p>156573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680" calcext:value-type="float">
            <text:p>23680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71896" calcext:value-type="float">
            <text:p>171896</text:p>
          </table:table-cell>
          <table:table-cell table:style-name="ce1" office:value-type="float" office:value="2826496" calcext:value-type="float">
            <text:p>28264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1786" calcext:value-type="float">
            <text:p>0.001786</text:p>
          </table:table-cell>
          <table:table-cell table:style-name="ce1" office:value-type="float" office:value="1785895500" calcext:value-type="float">
            <text:p>1785895500</text:p>
          </table:table-cell>
          <table:table-cell table:style-name="ce1" office:value-type="float" office:value="4.66676" calcext:value-type="float">
            <text:p>4.66676</text:p>
          </table:table-cell>
          <table:table-cell table:style-name="ce1" office:value-type="float" office:value="1567718" calcext:value-type="float">
            <text:p>156771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680" calcext:value-type="float">
            <text:p>23680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71896" calcext:value-type="float">
            <text:p>171896</text:p>
          </table:table-cell>
          <table:table-cell table:style-name="ce1" office:value-type="float" office:value="2826496" calcext:value-type="float">
            <text:p>28264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1786" calcext:value-type="float">
            <text:p>0.001786</text:p>
          </table:table-cell>
          <table:table-cell table:style-name="ce1" office:value-type="float" office:value="1785895500" calcext:value-type="float">
            <text:p>1785895500</text:p>
          </table:table-cell>
          <table:table-cell table:style-name="ce1" office:value-type="float" office:value="4.66676" calcext:value-type="float">
            <text:p>4.66676</text:p>
          </table:table-cell>
          <table:table-cell table:style-name="ce1" office:value-type="float" office:value="1569707" calcext:value-type="float">
            <text:p>156970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680" calcext:value-type="float">
            <text:p>23680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171896" calcext:value-type="float">
            <text:p>171896</text:p>
          </table:table-cell>
          <table:table-cell table:style-name="ce1" office:value-type="float" office:value="2826496" calcext:value-type="float">
            <text:p>28264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194" calcext:value-type="float">
            <text:p>0.002194</text:p>
          </table:table-cell>
          <table:table-cell table:style-name="ce1" office:value-type="float" office:value="2193936000" calcext:value-type="float">
            <text:p>2193936000</text:p>
          </table:table-cell>
          <table:table-cell table:style-name="ce1" office:value-type="float" office:value="3.922364" calcext:value-type="float">
            <text:p>3.922364</text:p>
          </table:table-cell>
          <table:table-cell table:style-name="ce1" office:value-type="float" office:value="1919099" calcext:value-type="float">
            <text:p>191909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680" calcext:value-type="float">
            <text:p>23680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5060" calcext:value-type="float">
            <text:p>195060</text:p>
          </table:table-cell>
          <table:table-cell table:style-name="ce1" office:value-type="float" office:value="2826464" calcext:value-type="float">
            <text:p>282646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2199525000" calcext:value-type="float">
            <text:p>2199525000</text:p>
          </table:table-cell>
          <table:table-cell table:style-name="ce1" office:value-type="float" office:value="3.932356" calcext:value-type="float">
            <text:p>3.932356</text:p>
          </table:table-cell>
          <table:table-cell table:style-name="ce1" office:value-type="float" office:value="1921079" calcext:value-type="float">
            <text:p>192107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680" calcext:value-type="float">
            <text:p>23680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060" calcext:value-type="float">
            <text:p>195060</text:p>
          </table:table-cell>
          <table:table-cell table:style-name="ce1" office:value-type="float" office:value="2826464" calcext:value-type="float">
            <text:p>282646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205" calcext:value-type="float">
            <text:p>0.002205</text:p>
          </table:table-cell>
          <table:table-cell table:style-name="ce1" office:value-type="float" office:value="2205223000" calcext:value-type="float">
            <text:p>2205223000</text:p>
          </table:table-cell>
          <table:table-cell table:style-name="ce1" office:value-type="float" office:value="3.942543" calcext:value-type="float">
            <text:p>3.942543</text:p>
          </table:table-cell>
          <table:table-cell table:style-name="ce1" office:value-type="float" office:value="1923068" calcext:value-type="float">
            <text:p>192306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680" calcext:value-type="float">
            <text:p>23680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195060" calcext:value-type="float">
            <text:p>195060</text:p>
          </table:table-cell>
          <table:table-cell table:style-name="ce1" office:value-type="float" office:value="2826464" calcext:value-type="float">
            <text:p>282646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304" calcext:value-type="float">
            <text:p>0.002304</text:p>
          </table:table-cell>
          <table:table-cell table:style-name="ce1" office:value-type="float" office:value="2303865500" calcext:value-type="float">
            <text:p>2303865500</text:p>
          </table:table-cell>
          <table:table-cell table:style-name="ce1" office:value-type="float" office:value="4.083984" calcext:value-type="float">
            <text:p>4.083984</text:p>
          </table:table-cell>
          <table:table-cell table:style-name="ce1" office:value-type="float" office:value="1939285" calcext:value-type="float">
            <text:p>193928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15408" calcext:value-type="float">
            <text:p>11540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5268" calcext:value-type="float">
            <text:p>195268</text:p>
          </table:table-cell>
          <table:table-cell table:style-name="ce1" office:value-type="float" office:value="6377312" calcext:value-type="float">
            <text:p>637731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531" calcext:value-type="float">
            <text:p>0.002531</text:p>
          </table:table-cell>
          <table:table-cell table:style-name="ce1" office:value-type="float" office:value="2531220500" calcext:value-type="float">
            <text:p>2531220500</text:p>
          </table:table-cell>
          <table:table-cell table:style-name="ce1" office:value-type="float" office:value="4.349609" calcext:value-type="float">
            <text:p>4.349609</text:p>
          </table:table-cell>
          <table:table-cell table:style-name="ce1" office:value-type="float" office:value="2016505" calcext:value-type="float">
            <text:p>201650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648" calcext:value-type="float">
            <text:p>40164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268" calcext:value-type="float">
            <text:p>195268</text:p>
          </table:table-cell>
          <table:table-cell table:style-name="ce1" office:value-type="float" office:value="22384720" calcext:value-type="float">
            <text:p>2238472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718" calcext:value-type="float">
            <text:p>0.002718</text:p>
          </table:table-cell>
          <table:table-cell table:style-name="ce1" office:value-type="float" office:value="2718326500" calcext:value-type="float">
            <text:p>2718326500</text:p>
          </table:table-cell>
          <table:table-cell table:style-name="ce1" office:value-type="float" office:value="4.531661" calcext:value-type="float">
            <text:p>4.531661</text:p>
          </table:table-cell>
          <table:table-cell table:style-name="ce1" office:value-type="float" office:value="2094114" calcext:value-type="float">
            <text:p>209411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688368" calcext:value-type="float">
            <text:p>688368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195268" calcext:value-type="float">
            <text:p>195268</text:p>
          </table:table-cell>
          <table:table-cell table:style-name="ce1" office:value-type="float" office:value="38689296" calcext:value-type="float">
            <text:p>386892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284" calcext:value-type="float">
            <text:p>0.002284</text:p>
          </table:table-cell>
          <table:table-cell table:style-name="ce1" office:value-type="float" office:value="2283550000" calcext:value-type="float">
            <text:p>2283550000</text:p>
          </table:table-cell>
          <table:table-cell table:style-name="ce1" office:value-type="float" office:value="4.047931" calcext:value-type="float">
            <text:p>4.047931</text:p>
          </table:table-cell>
          <table:table-cell table:style-name="ce1" office:value-type="float" office:value="1943489" calcext:value-type="float">
            <text:p>194348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15392" calcext:value-type="float">
            <text:p>115392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5300" calcext:value-type="float">
            <text:p>195300</text:p>
          </table:table-cell>
          <table:table-cell table:style-name="ce1" office:value-type="float" office:value="6376784" calcext:value-type="float">
            <text:p>637678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523" calcext:value-type="float">
            <text:p>0.002523</text:p>
          </table:table-cell>
          <table:table-cell table:style-name="ce1" office:value-type="float" office:value="2523274000" calcext:value-type="float">
            <text:p>2523274000</text:p>
          </table:table-cell>
          <table:table-cell table:style-name="ce1" office:value-type="float" office:value="4.335918" calcext:value-type="float">
            <text:p>4.335918</text:p>
          </table:table-cell>
          <table:table-cell table:style-name="ce1" office:value-type="float" office:value="2036549" calcext:value-type="float">
            <text:p>203654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632" calcext:value-type="float">
            <text:p>401632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300" calcext:value-type="float">
            <text:p>195300</text:p>
          </table:table-cell>
          <table:table-cell table:style-name="ce1" office:value-type="float" office:value="22384336" calcext:value-type="float">
            <text:p>2238433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724" calcext:value-type="float">
            <text:p>0.002724</text:p>
          </table:table-cell>
          <table:table-cell table:style-name="ce1" office:value-type="float" office:value="2724162000" calcext:value-type="float">
            <text:p>2724162000</text:p>
          </table:table-cell>
          <table:table-cell table:style-name="ce1" office:value-type="float" office:value="4.541357" calcext:value-type="float">
            <text:p>4.541357</text:p>
          </table:table-cell>
          <table:table-cell table:style-name="ce1" office:value-type="float" office:value="2130078" calcext:value-type="float">
            <text:p>213007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688352" calcext:value-type="float">
            <text:p>688352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195300" calcext:value-type="float">
            <text:p>195300</text:p>
          </table:table-cell>
          <table:table-cell table:style-name="ce1" office:value-type="float" office:value="38688864" calcext:value-type="float">
            <text:p>3868886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276" calcext:value-type="float">
            <text:p>0.002276</text:p>
          </table:table-cell>
          <table:table-cell table:style-name="ce1" office:value-type="float" office:value="2276311500" calcext:value-type="float">
            <text:p>2276311500</text:p>
          </table:table-cell>
          <table:table-cell table:style-name="ce1" office:value-type="float" office:value="4.046599" calcext:value-type="float">
            <text:p>4.046599</text:p>
          </table:table-cell>
          <table:table-cell table:style-name="ce1" office:value-type="float" office:value="1929721" calcext:value-type="float">
            <text:p>192972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15408" calcext:value-type="float">
            <text:p>11540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5204" calcext:value-type="float">
            <text:p>195204</text:p>
          </table:table-cell>
          <table:table-cell table:style-name="ce1" office:value-type="float" office:value="6377312" calcext:value-type="float">
            <text:p>637731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437" calcext:value-type="float">
            <text:p>0.002437</text:p>
          </table:table-cell>
          <table:table-cell table:style-name="ce1" office:value-type="float" office:value="2436598500" calcext:value-type="float">
            <text:p>2436598500</text:p>
          </table:table-cell>
          <table:table-cell table:style-name="ce1" office:value-type="float" office:value="4.241955" calcext:value-type="float">
            <text:p>4.241955</text:p>
          </table:table-cell>
          <table:table-cell table:style-name="ce1" office:value-type="float" office:value="1971301" calcext:value-type="float">
            <text:p>197130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648" calcext:value-type="float">
            <text:p>40164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204" calcext:value-type="float">
            <text:p>195204</text:p>
          </table:table-cell>
          <table:table-cell table:style-name="ce1" office:value-type="float" office:value="22384720" calcext:value-type="float">
            <text:p>2238472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554" calcext:value-type="float">
            <text:p>0.002554</text:p>
          </table:table-cell>
          <table:table-cell table:style-name="ce1" office:value-type="float" office:value="2554240500" calcext:value-type="float">
            <text:p>2554240500</text:p>
          </table:table-cell>
          <table:table-cell table:style-name="ce1" office:value-type="float" office:value="4.35621" calcext:value-type="float">
            <text:p>4.35621</text:p>
          </table:table-cell>
          <table:table-cell table:style-name="ce1" office:value-type="float" office:value="2013090" calcext:value-type="float">
            <text:p>2013090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688368" calcext:value-type="float">
            <text:p>688368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195204" calcext:value-type="float">
            <text:p>195204</text:p>
          </table:table-cell>
          <table:table-cell table:style-name="ce1" office:value-type="float" office:value="38689296" calcext:value-type="float">
            <text:p>386892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304" calcext:value-type="float">
            <text:p>0.002304</text:p>
          </table:table-cell>
          <table:table-cell table:style-name="ce1" office:value-type="float" office:value="2304092000" calcext:value-type="float">
            <text:p>2304092000</text:p>
          </table:table-cell>
          <table:table-cell table:style-name="ce1" office:value-type="float" office:value="4.005491" calcext:value-type="float">
            <text:p>4.005491</text:p>
          </table:table-cell>
          <table:table-cell table:style-name="ce1" office:value-type="float" office:value="1959345" calcext:value-type="float">
            <text:p>195934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15392" calcext:value-type="float">
            <text:p>115392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5428" calcext:value-type="float">
            <text:p>195428</text:p>
          </table:table-cell>
          <table:table-cell table:style-name="ce1" office:value-type="float" office:value="6376784" calcext:value-type="float">
            <text:p>637678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63" calcext:value-type="float">
            <text:p>0.00263</text:p>
          </table:table-cell>
          <table:table-cell table:style-name="ce1" office:value-type="float" office:value="2629732000" calcext:value-type="float">
            <text:p>2629732000</text:p>
          </table:table-cell>
          <table:table-cell table:style-name="ce1" office:value-type="float" office:value="4.143706" calcext:value-type="float">
            <text:p>4.143706</text:p>
          </table:table-cell>
          <table:table-cell table:style-name="ce1" office:value-type="float" office:value="2111805" calcext:value-type="float">
            <text:p>211180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632" calcext:value-type="float">
            <text:p>401632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428" calcext:value-type="float">
            <text:p>195428</text:p>
          </table:table-cell>
          <table:table-cell table:style-name="ce1" office:value-type="float" office:value="22384336" calcext:value-type="float">
            <text:p>2238433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972" calcext:value-type="float">
            <text:p>0.002972</text:p>
          </table:table-cell>
          <table:table-cell table:style-name="ce1" office:value-type="float" office:value="2972362000" calcext:value-type="float">
            <text:p>2972362000</text:p>
          </table:table-cell>
          <table:table-cell table:style-name="ce1" office:value-type="float" office:value="4.280891" calcext:value-type="float">
            <text:p>4.280891</text:p>
          </table:table-cell>
          <table:table-cell table:style-name="ce1" office:value-type="float" office:value="2265034" calcext:value-type="float">
            <text:p>226503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688352" calcext:value-type="float">
            <text:p>688352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195428" calcext:value-type="float">
            <text:p>195428</text:p>
          </table:table-cell>
          <table:table-cell table:style-name="ce1" office:value-type="float" office:value="38688864" calcext:value-type="float">
            <text:p>3868886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27" calcext:value-type="float">
            <text:p>0.00227</text:p>
          </table:table-cell>
          <table:table-cell table:style-name="ce1" office:value-type="float" office:value="2270213000" calcext:value-type="float">
            <text:p>2270213000</text:p>
          </table:table-cell>
          <table:table-cell table:style-name="ce1" office:value-type="float" office:value="4.035717" calcext:value-type="float">
            <text:p>4.035717</text:p>
          </table:table-cell>
          <table:table-cell table:style-name="ce1" office:value-type="float" office:value="1933925" calcext:value-type="float">
            <text:p>193392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15392" calcext:value-type="float">
            <text:p>115392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5236" calcext:value-type="float">
            <text:p>195236</text:p>
          </table:table-cell>
          <table:table-cell table:style-name="ce1" office:value-type="float" office:value="6376784" calcext:value-type="float">
            <text:p>637678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441" calcext:value-type="float">
            <text:p>0.002441</text:p>
          </table:table-cell>
          <table:table-cell table:style-name="ce1" office:value-type="float" office:value="2441231000" calcext:value-type="float">
            <text:p>2441231000</text:p>
          </table:table-cell>
          <table:table-cell table:style-name="ce1" office:value-type="float" office:value="4.249873" calcext:value-type="float">
            <text:p>4.249873</text:p>
          </table:table-cell>
          <table:table-cell table:style-name="ce1" office:value-type="float" office:value="1991345" calcext:value-type="float">
            <text:p>199134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632" calcext:value-type="float">
            <text:p>401632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236" calcext:value-type="float">
            <text:p>195236</text:p>
          </table:table-cell>
          <table:table-cell table:style-name="ce1" office:value-type="float" office:value="22384336" calcext:value-type="float">
            <text:p>2238433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574" calcext:value-type="float">
            <text:p>0.002574</text:p>
          </table:table-cell>
          <table:table-cell table:style-name="ce1" office:value-type="float" office:value="2574316000" calcext:value-type="float">
            <text:p>2574316000</text:p>
          </table:table-cell>
          <table:table-cell table:style-name="ce1" office:value-type="float" office:value="4.39022" calcext:value-type="float">
            <text:p>4.39022</text:p>
          </table:table-cell>
          <table:table-cell table:style-name="ce1" office:value-type="float" office:value="2049054" calcext:value-type="float">
            <text:p>204905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688352" calcext:value-type="float">
            <text:p>688352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195236" calcext:value-type="float">
            <text:p>195236</text:p>
          </table:table-cell>
          <table:table-cell table:style-name="ce1" office:value-type="float" office:value="38688864" calcext:value-type="float">
            <text:p>3868886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409" calcext:value-type="float">
            <text:p>0.002409</text:p>
          </table:table-cell>
          <table:table-cell table:style-name="ce1" office:value-type="float" office:value="2409378000" calcext:value-type="float">
            <text:p>2409378000</text:p>
          </table:table-cell>
          <table:table-cell table:style-name="ce1" office:value-type="float" office:value="4.28775" calcext:value-type="float">
            <text:p>4.28775</text:p>
          </table:table-cell>
          <table:table-cell table:style-name="ce1" office:value-type="float" office:value="2100452" calcext:value-type="float">
            <text:p>2100452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744" calcext:value-type="float">
            <text:p>23744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04584" calcext:value-type="float">
            <text:p>204584</text:p>
          </table:table-cell>
          <table:table-cell table:style-name="ce1" office:value-type="float" office:value="2867584" calcext:value-type="float">
            <text:p>286758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412" calcext:value-type="float">
            <text:p>0.002412</text:p>
          </table:table-cell>
          <table:table-cell table:style-name="ce1" office:value-type="float" office:value="2411956000" calcext:value-type="float">
            <text:p>2411956000</text:p>
          </table:table-cell>
          <table:table-cell table:style-name="ce1" office:value-type="float" office:value="4.292338" calcext:value-type="float">
            <text:p>4.292338</text:p>
          </table:table-cell>
          <table:table-cell table:style-name="ce1" office:value-type="float" office:value="2102432" calcext:value-type="float">
            <text:p>2102432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744" calcext:value-type="float">
            <text:p>23744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584" calcext:value-type="float">
            <text:p>204584</text:p>
          </table:table-cell>
          <table:table-cell table:style-name="ce1" office:value-type="float" office:value="2867584" calcext:value-type="float">
            <text:p>286758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415" calcext:value-type="float">
            <text:p>0.002415</text:p>
          </table:table-cell>
          <table:table-cell table:style-name="ce1" office:value-type="float" office:value="2414982000" calcext:value-type="float">
            <text:p>2414982000</text:p>
          </table:table-cell>
          <table:table-cell table:style-name="ce1" office:value-type="float" office:value="4.297723" calcext:value-type="float">
            <text:p>4.297723</text:p>
          </table:table-cell>
          <table:table-cell table:style-name="ce1" office:value-type="float" office:value="2104421" calcext:value-type="float">
            <text:p>210442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3744" calcext:value-type="float">
            <text:p>23744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204584" calcext:value-type="float">
            <text:p>204584</text:p>
          </table:table-cell>
          <table:table-cell table:style-name="ce1" office:value-type="float" office:value="2867584" calcext:value-type="float">
            <text:p>286758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436" calcext:value-type="float">
            <text:p>0.002436</text:p>
          </table:table-cell>
          <table:table-cell table:style-name="ce1" office:value-type="float" office:value="2436303500" calcext:value-type="float">
            <text:p>2436303500</text:p>
          </table:table-cell>
          <table:table-cell table:style-name="ce1" office:value-type="float" office:value="4.304033" calcext:value-type="float">
            <text:p>4.304033</text:p>
          </table:table-cell>
          <table:table-cell table:style-name="ce1" office:value-type="float" office:value="2101988" calcext:value-type="float">
            <text:p>210198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4624" calcext:value-type="float">
            <text:p>24624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04856" calcext:value-type="float">
            <text:p>204856</text:p>
          </table:table-cell>
          <table:table-cell table:style-name="ce1" office:value-type="float" office:value="2882544" calcext:value-type="float">
            <text:p>288254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584" calcext:value-type="float">
            <text:p>0.002584</text:p>
          </table:table-cell>
          <table:table-cell table:style-name="ce1" office:value-type="float" office:value="2584241500" calcext:value-type="float">
            <text:p>2584241500</text:p>
          </table:table-cell>
          <table:table-cell table:style-name="ce1" office:value-type="float" office:value="4.395796" calcext:value-type="float">
            <text:p>4.395796</text:p>
          </table:table-cell>
          <table:table-cell table:style-name="ce1" office:value-type="float" office:value="2199820" calcext:value-type="float">
            <text:p>2199820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7136" calcext:value-type="float">
            <text:p>27136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856" calcext:value-type="float">
            <text:p>204856</text:p>
          </table:table-cell>
          <table:table-cell table:style-name="ce1" office:value-type="float" office:value="3041872" calcext:value-type="float">
            <text:p>304187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727" calcext:value-type="float">
            <text:p>0.002727</text:p>
          </table:table-cell>
          <table:table-cell table:style-name="ce1" office:value-type="float" office:value="2726879500" calcext:value-type="float">
            <text:p>2726879500</text:p>
          </table:table-cell>
          <table:table-cell table:style-name="ce1" office:value-type="float" office:value="4.471179" calcext:value-type="float">
            <text:p>4.471179</text:p>
          </table:table-cell>
          <table:table-cell table:style-name="ce1" office:value-type="float" office:value="2298729" calcext:value-type="float">
            <text:p>229872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30336" calcext:value-type="float">
            <text:p>30336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204856" calcext:value-type="float">
            <text:p>204856</text:p>
          </table:table-cell>
          <table:table-cell table:style-name="ce1" office:value-type="float" office:value="3202672" calcext:value-type="float">
            <text:p>320267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432" calcext:value-type="float">
            <text:p>0.002432</text:p>
          </table:table-cell>
          <table:table-cell table:style-name="ce1" office:value-type="float" office:value="2432380000" calcext:value-type="float">
            <text:p>2432380000</text:p>
          </table:table-cell>
          <table:table-cell table:style-name="ce1" office:value-type="float" office:value="4.297058" calcext:value-type="float">
            <text:p>4.297058</text:p>
          </table:table-cell>
          <table:table-cell table:style-name="ce1" office:value-type="float" office:value="2106192" calcext:value-type="float">
            <text:p>2106192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4624" calcext:value-type="float">
            <text:p>24624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04888" calcext:value-type="float">
            <text:p>204888</text:p>
          </table:table-cell>
          <table:table-cell table:style-name="ce1" office:value-type="float" office:value="2882544" calcext:value-type="float">
            <text:p>288254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598" calcext:value-type="float">
            <text:p>0.002598</text:p>
          </table:table-cell>
          <table:table-cell table:style-name="ce1" office:value-type="float" office:value="2597936000" calcext:value-type="float">
            <text:p>2597936000</text:p>
          </table:table-cell>
          <table:table-cell table:style-name="ce1" office:value-type="float" office:value="4.41905" calcext:value-type="float">
            <text:p>4.41905</text:p>
          </table:table-cell>
          <table:table-cell table:style-name="ce1" office:value-type="float" office:value="2219864" calcext:value-type="float">
            <text:p>221986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7136" calcext:value-type="float">
            <text:p>27136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888" calcext:value-type="float">
            <text:p>204888</text:p>
          </table:table-cell>
          <table:table-cell table:style-name="ce1" office:value-type="float" office:value="3041872" calcext:value-type="float">
            <text:p>304187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767" calcext:value-type="float">
            <text:p>0.002767</text:p>
          </table:table-cell>
          <table:table-cell table:style-name="ce1" office:value-type="float" office:value="2767324000" calcext:value-type="float">
            <text:p>2767324000</text:p>
          </table:table-cell>
          <table:table-cell table:style-name="ce1" office:value-type="float" office:value="4.537457" calcext:value-type="float">
            <text:p>4.537457</text:p>
          </table:table-cell>
          <table:table-cell table:style-name="ce1" office:value-type="float" office:value="2334693" calcext:value-type="float">
            <text:p>233469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30336" calcext:value-type="float">
            <text:p>30336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204888" calcext:value-type="float">
            <text:p>204888</text:p>
          </table:table-cell>
          <table:table-cell table:style-name="ce1" office:value-type="float" office:value="3202672" calcext:value-type="float">
            <text:p>320267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411" calcext:value-type="float">
            <text:p>0.002411</text:p>
          </table:table-cell>
          <table:table-cell table:style-name="ce1" office:value-type="float" office:value="2411395500" calcext:value-type="float">
            <text:p>2411395500</text:p>
          </table:table-cell>
          <table:table-cell table:style-name="ce1" office:value-type="float" office:value="4.26959" calcext:value-type="float">
            <text:p>4.26959</text:p>
          </table:table-cell>
          <table:table-cell table:style-name="ce1" office:value-type="float" office:value="2097053" calcext:value-type="float">
            <text:p>209705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4448" calcext:value-type="float">
            <text:p>2444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04792" calcext:value-type="float">
            <text:p>204792</text:p>
          </table:table-cell>
          <table:table-cell table:style-name="ce1" office:value-type="float" office:value="2879360" calcext:value-type="float">
            <text:p>287936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483" calcext:value-type="float">
            <text:p>0.002483</text:p>
          </table:table-cell>
          <table:table-cell table:style-name="ce1" office:value-type="float" office:value="2482813500" calcext:value-type="float">
            <text:p>2482813500</text:p>
          </table:table-cell>
          <table:table-cell table:style-name="ce1" office:value-type="float" office:value="4.275054" calcext:value-type="float">
            <text:p>4.275054</text:p>
          </table:table-cell>
          <table:table-cell table:style-name="ce1" office:value-type="float" office:value="2160465" calcext:value-type="float">
            <text:p>216046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6464" calcext:value-type="float">
            <text:p>26464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792" calcext:value-type="float">
            <text:p>204792</text:p>
          </table:table-cell>
          <table:table-cell table:style-name="ce1" office:value-type="float" office:value="3008384" calcext:value-type="float">
            <text:p>300838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554" calcext:value-type="float">
            <text:p>0.002554</text:p>
          </table:table-cell>
          <table:table-cell table:style-name="ce1" office:value-type="float" office:value="2554376500" calcext:value-type="float">
            <text:p>2554376500</text:p>
          </table:table-cell>
          <table:table-cell table:style-name="ce1" office:value-type="float" office:value="4.280338" calcext:value-type="float">
            <text:p>4.280338</text:p>
          </table:table-cell>
          <table:table-cell table:style-name="ce1" office:value-type="float" office:value="2223341" calcext:value-type="float">
            <text:p>222334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9024" calcext:value-type="float">
            <text:p>29024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204792" calcext:value-type="float">
            <text:p>204792</text:p>
          </table:table-cell>
          <table:table-cell table:style-name="ce1" office:value-type="float" office:value="3137056" calcext:value-type="float">
            <text:p>3137056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45" calcext:value-type="float">
            <text:p>0.00245</text:p>
          </table:table-cell>
          <table:table-cell table:style-name="ce1" office:value-type="float" office:value="2450009000" calcext:value-type="float">
            <text:p>2450009000</text:p>
          </table:table-cell>
          <table:table-cell table:style-name="ce1" office:value-type="float" office:value="4.243654" calcext:value-type="float">
            <text:p>4.243654</text:p>
          </table:table-cell>
          <table:table-cell table:style-name="ce1" office:value-type="float" office:value="2124474" calcext:value-type="float">
            <text:p>212447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6864" calcext:value-type="float">
            <text:p>26864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05000" calcext:value-type="float">
            <text:p>205000</text:p>
          </table:table-cell>
          <table:table-cell table:style-name="ce1" office:value-type="float" office:value="2978400" calcext:value-type="float">
            <text:p>297840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657" calcext:value-type="float">
            <text:p>0.002657</text:p>
          </table:table-cell>
          <table:table-cell table:style-name="ce1" office:value-type="float" office:value="2657102000" calcext:value-type="float">
            <text:p>2657102000</text:p>
          </table:table-cell>
          <table:table-cell table:style-name="ce1" office:value-type="float" office:value="4.143092" calcext:value-type="float">
            <text:p>4.143092</text:p>
          </table:table-cell>
          <table:table-cell table:style-name="ce1" office:value-type="float" office:value="2305736" calcext:value-type="float">
            <text:p>2305736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35088" calcext:value-type="float">
            <text:p>3508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5000" calcext:value-type="float">
            <text:p>205000</text:p>
          </table:table-cell>
          <table:table-cell table:style-name="ce1" office:value-type="float" office:value="3495488" calcext:value-type="float">
            <text:p>3495488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872" calcext:value-type="float">
            <text:p>0.002872</text:p>
          </table:table-cell>
          <table:table-cell table:style-name="ce1" office:value-type="float" office:value="2872037000" calcext:value-type="float">
            <text:p>2872037000</text:p>
          </table:table-cell>
          <table:table-cell table:style-name="ce1" office:value-type="float" office:value="4.06718" calcext:value-type="float">
            <text:p>4.06718</text:p>
          </table:table-cell>
          <table:table-cell table:style-name="ce1" office:value-type="float" office:value="2494829" calcext:value-type="float">
            <text:p>249482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4848" calcext:value-type="float">
            <text:p>44848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205000" calcext:value-type="float">
            <text:p>205000</text:p>
          </table:table-cell>
          <table:table-cell table:style-name="ce1" office:value-type="float" office:value="4023104" calcext:value-type="float">
            <text:p>402310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1</text:p>
          </table:table-cell>
          <table:table-cell table:style-name="ce1" office:value-type="float" office:value="0.002422" calcext:value-type="float">
            <text:p>0.002422</text:p>
          </table:table-cell>
          <table:table-cell table:style-name="ce1" office:value-type="float" office:value="2421870000" calcext:value-type="float">
            <text:p>2421870000</text:p>
          </table:table-cell>
          <table:table-cell table:style-name="ce1" office:value-type="float" office:value="4.287651" calcext:value-type="float">
            <text:p>4.287651</text:p>
          </table:table-cell>
          <table:table-cell table:style-name="ce1" office:value-type="float" office:value="2101257" calcext:value-type="float">
            <text:p>210125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4448" calcext:value-type="float">
            <text:p>2444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04824" calcext:value-type="float">
            <text:p>204824</text:p>
          </table:table-cell>
          <table:table-cell table:style-name="ce1" office:value-type="float" office:value="2879360" calcext:value-type="float">
            <text:p>287936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5</text:p>
          </table:table-cell>
          <table:table-cell table:style-name="ce1" office:value-type="float" office:value="0.002505" calcext:value-type="float">
            <text:p>0.002505</text:p>
          </table:table-cell>
          <table:table-cell table:style-name="ce1" office:value-type="float" office:value="2505450000" calcext:value-type="float">
            <text:p>2505450000</text:p>
          </table:table-cell>
          <table:table-cell table:style-name="ce1" office:value-type="float" office:value="4.313988" calcext:value-type="float">
            <text:p>4.313988</text:p>
          </table:table-cell>
          <table:table-cell table:style-name="ce1" office:value-type="float" office:value="2180521" calcext:value-type="float">
            <text:p>218052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6464" calcext:value-type="float">
            <text:p>26464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824" calcext:value-type="float">
            <text:p>204824</text:p>
          </table:table-cell>
          <table:table-cell table:style-name="ce1" office:value-type="float" office:value="3008384" calcext:value-type="float">
            <text:p>300838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-0.9</text:p>
          </table:table-cell>
          <table:table-cell table:style-name="ce1" office:value-type="float" office:value="0.002589" calcext:value-type="float">
            <text:p>0.002589</text:p>
          </table:table-cell>
          <table:table-cell table:style-name="ce1" office:value-type="float" office:value="2588661000" calcext:value-type="float">
            <text:p>2588661000</text:p>
          </table:table-cell>
          <table:table-cell table:style-name="ce1" office:value-type="float" office:value="4.337747" calcext:value-type="float">
            <text:p>4.337747</text:p>
          </table:table-cell>
          <table:table-cell table:style-name="ce1" office:value-type="float" office:value="2259315" calcext:value-type="float">
            <text:p>225931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9024" calcext:value-type="float">
            <text:p>29024</text:p>
          </table:table-cell>
          <table:table-cell table:style-name="ce1" office:value-type="float" office:value="4499" calcext:value-type="float">
            <text:p>4499</text:p>
          </table:table-cell>
          <table:table-cell table:style-name="ce1" office:value-type="float" office:value="204824" calcext:value-type="float">
            <text:p>204824</text:p>
          </table:table-cell>
          <table:table-cell table:style-name="ce1" office:value-type="float" office:value="3137056" calcext:value-type="float">
            <text:p>3137056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1786" calcext:value-type="float">
            <text:p>0.001786</text:p>
          </table:table-cell>
          <table:table-cell table:style-name="ce1" office:value-type="float" office:value="1786071500" calcext:value-type="float">
            <text:p>1786071500</text:p>
          </table:table-cell>
          <table:table-cell table:style-name="ce1" office:value-type="float" office:value="4.666708" calcext:value-type="float">
            <text:p>4.666708</text:p>
          </table:table-cell>
          <table:table-cell table:style-name="ce1" office:value-type="float" office:value="1567886" calcext:value-type="float">
            <text:p>1567886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39040" calcext:value-type="float">
            <text:p>39040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71896" calcext:value-type="float">
            <text:p>171896</text:p>
          </table:table-cell>
          <table:table-cell table:style-name="ce1" office:value-type="float" office:value="3630336" calcext:value-type="float">
            <text:p>363033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364" calcext:value-type="float">
            <text:p>0.002364</text:p>
          </table:table-cell>
          <table:table-cell table:style-name="ce1" office:value-type="float" office:value="2363778500" calcext:value-type="float">
            <text:p>2363778500</text:p>
          </table:table-cell>
          <table:table-cell table:style-name="ce1" office:value-type="float" office:value="3.877449" calcext:value-type="float">
            <text:p>3.877449</text:p>
          </table:table-cell>
          <table:table-cell table:style-name="ce1" office:value-type="float" office:value="2021727" calcext:value-type="float">
            <text:p>202172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39040" calcext:value-type="float">
            <text:p>39040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060" calcext:value-type="float">
            <text:p>195060</text:p>
          </table:table-cell>
          <table:table-cell table:style-name="ce1" office:value-type="float" office:value="3630304" calcext:value-type="float">
            <text:p>363030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723" calcext:value-type="float">
            <text:p>0.002723</text:p>
          </table:table-cell>
          <table:table-cell table:style-name="ce1" office:value-type="float" office:value="2722920000" calcext:value-type="float">
            <text:p>2722920000</text:p>
          </table:table-cell>
          <table:table-cell table:style-name="ce1" office:value-type="float" office:value="4.306891" calcext:value-type="float">
            <text:p>4.306891</text:p>
          </table:table-cell>
          <table:table-cell table:style-name="ce1" office:value-type="float" office:value="2117153" calcext:value-type="float">
            <text:p>211715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808" calcext:value-type="float">
            <text:p>40180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268" calcext:value-type="float">
            <text:p>195268</text:p>
          </table:table-cell>
          <table:table-cell table:style-name="ce1" office:value-type="float" office:value="22404080" calcext:value-type="float">
            <text:p>2240408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729" calcext:value-type="float">
            <text:p>0.002729</text:p>
          </table:table-cell>
          <table:table-cell table:style-name="ce1" office:value-type="float" office:value="2728944000" calcext:value-type="float">
            <text:p>2728944000</text:p>
          </table:table-cell>
          <table:table-cell table:style-name="ce1" office:value-type="float" office:value="4.316467" calcext:value-type="float">
            <text:p>4.316467</text:p>
          </table:table-cell>
          <table:table-cell table:style-name="ce1" office:value-type="float" office:value="2137197" calcext:value-type="float">
            <text:p>213719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792" calcext:value-type="float">
            <text:p>401792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300" calcext:value-type="float">
            <text:p>195300</text:p>
          </table:table-cell>
          <table:table-cell table:style-name="ce1" office:value-type="float" office:value="22403696" calcext:value-type="float">
            <text:p>224036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627" calcext:value-type="float">
            <text:p>0.002627</text:p>
          </table:table-cell>
          <table:table-cell table:style-name="ce1" office:value-type="float" office:value="2627152000" calcext:value-type="float">
            <text:p>2627152000</text:p>
          </table:table-cell>
          <table:table-cell table:style-name="ce1" office:value-type="float" office:value="4.205553" calcext:value-type="float">
            <text:p>4.205553</text:p>
          </table:table-cell>
          <table:table-cell table:style-name="ce1" office:value-type="float" office:value="2071949" calcext:value-type="float">
            <text:p>2071949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808" calcext:value-type="float">
            <text:p>40180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204" calcext:value-type="float">
            <text:p>195204</text:p>
          </table:table-cell>
          <table:table-cell table:style-name="ce1" office:value-type="float" office:value="22404080" calcext:value-type="float">
            <text:p>2240408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821" calcext:value-type="float">
            <text:p>0.002821</text:p>
          </table:table-cell>
          <table:table-cell table:style-name="ce1" office:value-type="float" office:value="2821164000" calcext:value-type="float">
            <text:p>2821164000</text:p>
          </table:table-cell>
          <table:table-cell table:style-name="ce1" office:value-type="float" office:value="4.119074" calcext:value-type="float">
            <text:p>4.119074</text:p>
          </table:table-cell>
          <table:table-cell table:style-name="ce1" office:value-type="float" office:value="2212453" calcext:value-type="float">
            <text:p>221245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792" calcext:value-type="float">
            <text:p>401792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428" calcext:value-type="float">
            <text:p>195428</text:p>
          </table:table-cell>
          <table:table-cell table:style-name="ce1" office:value-type="float" office:value="22403696" calcext:value-type="float">
            <text:p>224036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636" calcext:value-type="float">
            <text:p>0.002636</text:p>
          </table:table-cell>
          <table:table-cell table:style-name="ce1" office:value-type="float" office:value="2636131000" calcext:value-type="float">
            <text:p>2636131000</text:p>
          </table:table-cell>
          <table:table-cell table:style-name="ce1" office:value-type="float" office:value="4.219974" calcext:value-type="float">
            <text:p>4.219974</text:p>
          </table:table-cell>
          <table:table-cell table:style-name="ce1" office:value-type="float" office:value="2091993" calcext:value-type="float">
            <text:p>209199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792" calcext:value-type="float">
            <text:p>401792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236" calcext:value-type="float">
            <text:p>195236</text:p>
          </table:table-cell>
          <table:table-cell table:style-name="ce1" office:value-type="float" office:value="22403696" calcext:value-type="float">
            <text:p>2240369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553" calcext:value-type="float">
            <text:p>0.002553</text:p>
          </table:table-cell>
          <table:table-cell table:style-name="ce1" office:value-type="float" office:value="2552735500" calcext:value-type="float">
            <text:p>2552735500</text:p>
          </table:table-cell>
          <table:table-cell table:style-name="ce1" office:value-type="float" office:value="4.169765" calcext:value-type="float">
            <text:p>4.169765</text:p>
          </table:table-cell>
          <table:table-cell table:style-name="ce1" office:value-type="float" office:value="2203052" calcext:value-type="float">
            <text:p>2203052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39168" calcext:value-type="float">
            <text:p>3916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584" calcext:value-type="float">
            <text:p>204584</text:p>
          </table:table-cell>
          <table:table-cell table:style-name="ce1" office:value-type="float" office:value="3671392" calcext:value-type="float">
            <text:p>367139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726" calcext:value-type="float">
            <text:p>0.002726</text:p>
          </table:table-cell>
          <table:table-cell table:style-name="ce1" office:value-type="float" office:value="2725598000" calcext:value-type="float">
            <text:p>2725598000</text:p>
          </table:table-cell>
          <table:table-cell table:style-name="ce1" office:value-type="float" office:value="4.262921" calcext:value-type="float">
            <text:p>4.262921</text:p>
          </table:table-cell>
          <table:table-cell table:style-name="ce1" office:value-type="float" office:value="2317128" calcext:value-type="float">
            <text:p>231712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2560" calcext:value-type="float">
            <text:p>42560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856" calcext:value-type="float">
            <text:p>204856</text:p>
          </table:table-cell>
          <table:table-cell table:style-name="ce1" office:value-type="float" office:value="3864752" calcext:value-type="float">
            <text:p>386475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741" calcext:value-type="float">
            <text:p>0.002741</text:p>
          </table:table-cell>
          <table:table-cell table:style-name="ce1" office:value-type="float" office:value="2740615000" calcext:value-type="float">
            <text:p>2740615000</text:p>
          </table:table-cell>
          <table:table-cell table:style-name="ce1" office:value-type="float" office:value="4.286536" calcext:value-type="float">
            <text:p>4.286536</text:p>
          </table:table-cell>
          <table:table-cell table:style-name="ce1" office:value-type="float" office:value="2337172" calcext:value-type="float">
            <text:p>2337172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2560" calcext:value-type="float">
            <text:p>42560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888" calcext:value-type="float">
            <text:p>204888</text:p>
          </table:table-cell>
          <table:table-cell table:style-name="ce1" office:value-type="float" office:value="3864752" calcext:value-type="float">
            <text:p>386475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622" calcext:value-type="float">
            <text:p>0.002622</text:p>
          </table:table-cell>
          <table:table-cell table:style-name="ce1" office:value-type="float" office:value="2621779000" calcext:value-type="float">
            <text:p>2621779000</text:p>
          </table:table-cell>
          <table:table-cell table:style-name="ce1" office:value-type="float" office:value="4.140509" calcext:value-type="float">
            <text:p>4.140509</text:p>
          </table:table-cell>
          <table:table-cell table:style-name="ce1" office:value-type="float" office:value="2291063" calcext:value-type="float">
            <text:p>2291063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1888" calcext:value-type="float">
            <text:p>4188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792" calcext:value-type="float">
            <text:p>204792</text:p>
          </table:table-cell>
          <table:table-cell table:style-name="ce1" office:value-type="float" office:value="3846464" calcext:value-type="float">
            <text:p>384646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805" calcext:value-type="float">
            <text:p>0.002805</text:p>
          </table:table-cell>
          <table:table-cell table:style-name="ce1" office:value-type="float" office:value="2805429000" calcext:value-type="float">
            <text:p>2805429000</text:p>
          </table:table-cell>
          <table:table-cell table:style-name="ce1" office:value-type="float" office:value="4.048099" calcext:value-type="float">
            <text:p>4.048099</text:p>
          </table:table-cell>
          <table:table-cell table:style-name="ce1" office:value-type="float" office:value="2426297" calcext:value-type="float">
            <text:p>242629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50352" calcext:value-type="float">
            <text:p>50352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5000" calcext:value-type="float">
            <text:p>205000</text:p>
          </table:table-cell>
          <table:table-cell table:style-name="ce1" office:value-type="float" office:value="4322080" calcext:value-type="float">
            <text:p>4322080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large-alloc-0.5</text:p>
          </table:table-cell>
          <table:table-cell table:style-name="ce1" office:value-type="float" office:value="0.002663" calcext:value-type="float">
            <text:p>0.002663</text:p>
          </table:table-cell>
          <table:table-cell table:style-name="ce1" office:value-type="float" office:value="2662830000" calcext:value-type="float">
            <text:p>2662830000</text:p>
          </table:table-cell>
          <table:table-cell table:style-name="ce1" office:value-type="float" office:value="4.205468" calcext:value-type="float">
            <text:p>4.205468</text:p>
          </table:table-cell>
          <table:table-cell table:style-name="ce1" office:value-type="float" office:value="2311107" calcext:value-type="float">
            <text:p>231110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1888" calcext:value-type="float">
            <text:p>4188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824" calcext:value-type="float">
            <text:p>204824</text:p>
          </table:table-cell>
          <table:table-cell table:style-name="ce1" office:value-type="float" office:value="3846464" calcext:value-type="float">
            <text:p>384646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1784" calcext:value-type="float">
            <text:p>0.001784</text:p>
          </table:table-cell>
          <table:table-cell table:style-name="ce1" office:value-type="float" office:value="1784442500" calcext:value-type="float">
            <text:p>1784442500</text:p>
          </table:table-cell>
          <table:table-cell table:style-name="ce1" office:value-type="float" office:value="4.662451" calcext:value-type="float">
            <text:p>4.662451</text:p>
          </table:table-cell>
          <table:table-cell table:style-name="ce1" office:value-type="float" office:value="1567886" calcext:value-type="float">
            <text:p>1567886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7536" calcext:value-type="float">
            <text:p>17536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71896" calcext:value-type="float">
            <text:p>171896</text:p>
          </table:table-cell>
          <table:table-cell table:style-name="ce1" office:value-type="float" office:value="2504960" calcext:value-type="float">
            <text:p>250496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164" calcext:value-type="float">
            <text:p>0.002164</text:p>
          </table:table-cell>
          <table:table-cell table:style-name="ce1" office:value-type="float" office:value="2164421000" calcext:value-type="float">
            <text:p>2164421000</text:p>
          </table:table-cell>
          <table:table-cell table:style-name="ce1" office:value-type="float" office:value="4.013493" calcext:value-type="float">
            <text:p>4.013493</text:p>
          </table:table-cell>
          <table:table-cell table:style-name="ce1" office:value-type="float" office:value="1881055" calcext:value-type="float">
            <text:p>188105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7536" calcext:value-type="float">
            <text:p>17536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060" calcext:value-type="float">
            <text:p>195060</text:p>
          </table:table-cell>
          <table:table-cell table:style-name="ce1" office:value-type="float" office:value="2504928" calcext:value-type="float">
            <text:p>2504928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419" calcext:value-type="float">
            <text:p>0.002419</text:p>
          </table:table-cell>
          <table:table-cell table:style-name="ce1" office:value-type="float" office:value="2419158000" calcext:value-type="float">
            <text:p>2419158000</text:p>
          </table:table-cell>
          <table:table-cell table:style-name="ce1" office:value-type="float" office:value="4.305318" calcext:value-type="float">
            <text:p>4.305318</text:p>
          </table:table-cell>
          <table:table-cell table:style-name="ce1" office:value-type="float" office:value="1976481" calcext:value-type="float">
            <text:p>197648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584" calcext:value-type="float">
            <text:p>401584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268" calcext:value-type="float">
            <text:p>195268</text:p>
          </table:table-cell>
          <table:table-cell table:style-name="ce1" office:value-type="float" office:value="22376976" calcext:value-type="float">
            <text:p>2237697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463" calcext:value-type="float">
            <text:p>0.002463</text:p>
          </table:table-cell>
          <table:table-cell table:style-name="ce1" office:value-type="float" office:value="2462990500" calcext:value-type="float">
            <text:p>2462990500</text:p>
          </table:table-cell>
          <table:table-cell table:style-name="ce1" office:value-type="float" office:value="4.383473" calcext:value-type="float">
            <text:p>4.383473</text:p>
          </table:table-cell>
          <table:table-cell table:style-name="ce1" office:value-type="float" office:value="1996525" calcext:value-type="float">
            <text:p>1996525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568" calcext:value-type="float">
            <text:p>40156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300" calcext:value-type="float">
            <text:p>195300</text:p>
          </table:table-cell>
          <table:table-cell table:style-name="ce1" office:value-type="float" office:value="22376592" calcext:value-type="float">
            <text:p>2237659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338" calcext:value-type="float">
            <text:p>0.002338</text:p>
          </table:table-cell>
          <table:table-cell table:style-name="ce1" office:value-type="float" office:value="2337813000" calcext:value-type="float">
            <text:p>2337813000</text:p>
          </table:table-cell>
          <table:table-cell table:style-name="ce1" office:value-type="float" office:value="4.216976" calcext:value-type="float">
            <text:p>4.216976</text:p>
          </table:table-cell>
          <table:table-cell table:style-name="ce1" office:value-type="float" office:value="1931277" calcext:value-type="float">
            <text:p>1931277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584" calcext:value-type="float">
            <text:p>401584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204" calcext:value-type="float">
            <text:p>195204</text:p>
          </table:table-cell>
          <table:table-cell table:style-name="ce1" office:value-type="float" office:value="22376976" calcext:value-type="float">
            <text:p>2237697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554" calcext:value-type="float">
            <text:p>0.002554</text:p>
          </table:table-cell>
          <table:table-cell table:style-name="ce1" office:value-type="float" office:value="2553823500" calcext:value-type="float">
            <text:p>2553823500</text:p>
          </table:table-cell>
          <table:table-cell table:style-name="ce1" office:value-type="float" office:value="4.155487" calcext:value-type="float">
            <text:p>4.155487</text:p>
          </table:table-cell>
          <table:table-cell table:style-name="ce1" office:value-type="float" office:value="2071781" calcext:value-type="float">
            <text:p>207178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568" calcext:value-type="float">
            <text:p>40156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428" calcext:value-type="float">
            <text:p>195428</text:p>
          </table:table-cell>
          <table:table-cell table:style-name="ce1" office:value-type="float" office:value="22376592" calcext:value-type="float">
            <text:p>2237659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363" calcext:value-type="float">
            <text:p>0.002363</text:p>
          </table:table-cell>
          <table:table-cell table:style-name="ce1" office:value-type="float" office:value="2363126500" calcext:value-type="float">
            <text:p>2363126500</text:p>
          </table:table-cell>
          <table:table-cell table:style-name="ce1" office:value-type="float" office:value="4.262927" calcext:value-type="float">
            <text:p>4.262927</text:p>
          </table:table-cell>
          <table:table-cell table:style-name="ce1" office:value-type="float" office:value="1951321" calcext:value-type="float">
            <text:p>195132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401568" calcext:value-type="float">
            <text:p>401568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195236" calcext:value-type="float">
            <text:p>195236</text:p>
          </table:table-cell>
          <table:table-cell table:style-name="ce1" office:value-type="float" office:value="22376592" calcext:value-type="float">
            <text:p>2237659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344" calcext:value-type="float">
            <text:p>0.002344</text:p>
          </table:table-cell>
          <table:table-cell table:style-name="ce1" office:value-type="float" office:value="2344408000" calcext:value-type="float">
            <text:p>2344408000</text:p>
          </table:table-cell>
          <table:table-cell table:style-name="ce1" office:value-type="float" office:value="4.343322" calcext:value-type="float">
            <text:p>4.343322</text:p>
          </table:table-cell>
          <table:table-cell table:style-name="ce1" office:value-type="float" office:value="2032924" calcext:value-type="float">
            <text:p>203292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17600" calcext:value-type="float">
            <text:p>17600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584" calcext:value-type="float">
            <text:p>204584</text:p>
          </table:table-cell>
          <table:table-cell table:style-name="ce1" office:value-type="float" office:value="2512352" calcext:value-type="float">
            <text:p>251235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537" calcext:value-type="float">
            <text:p>0.002537</text:p>
          </table:table-cell>
          <table:table-cell table:style-name="ce1" office:value-type="float" office:value="2537044000" calcext:value-type="float">
            <text:p>2537044000</text:p>
          </table:table-cell>
          <table:table-cell table:style-name="ce1" office:value-type="float" office:value="4.467139" calcext:value-type="float">
            <text:p>4.467139</text:p>
          </table:table-cell>
          <table:table-cell table:style-name="ce1" office:value-type="float" office:value="2160720" calcext:value-type="float">
            <text:p>2160720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1024" calcext:value-type="float">
            <text:p>21024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856" calcext:value-type="float">
            <text:p>204856</text:p>
          </table:table-cell>
          <table:table-cell table:style-name="ce1" office:value-type="float" office:value="2721392" calcext:value-type="float">
            <text:p>272139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559" calcext:value-type="float">
            <text:p>0.002559</text:p>
          </table:table-cell>
          <table:table-cell table:style-name="ce1" office:value-type="float" office:value="2558758500" calcext:value-type="float">
            <text:p>2558758500</text:p>
          </table:table-cell>
          <table:table-cell table:style-name="ce1" office:value-type="float" office:value="4.505695" calcext:value-type="float">
            <text:p>4.505695</text:p>
          </table:table-cell>
          <table:table-cell table:style-name="ce1" office:value-type="float" office:value="2180764" calcext:value-type="float">
            <text:p>2180764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1024" calcext:value-type="float">
            <text:p>21024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888" calcext:value-type="float">
            <text:p>204888</text:p>
          </table:table-cell>
          <table:table-cell table:style-name="ce1" office:value-type="float" office:value="2721392" calcext:value-type="float">
            <text:p>272139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no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423" calcext:value-type="float">
            <text:p>0.002423</text:p>
          </table:table-cell>
          <table:table-cell table:style-name="ce1" office:value-type="float" office:value="2422972000" calcext:value-type="float">
            <text:p>2422972000</text:p>
          </table:table-cell>
          <table:table-cell table:style-name="ce1" office:value-type="float" office:value="4.324647" calcext:value-type="float">
            <text:p>4.324647</text:p>
          </table:table-cell>
          <table:table-cell table:style-name="ce1" office:value-type="float" office:value="2114088" calcext:value-type="float">
            <text:p>211408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0304" calcext:value-type="float">
            <text:p>20304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792" calcext:value-type="float">
            <text:p>204792</text:p>
          </table:table-cell>
          <table:table-cell table:style-name="ce1" office:value-type="float" office:value="2679552" calcext:value-type="float">
            <text:p>267955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576" calcext:value-type="float">
            <text:p>0.002576</text:p>
          </table:table-cell>
          <table:table-cell table:style-name="ce1" office:value-type="float" office:value="2575630500" calcext:value-type="float">
            <text:p>2575630500</text:p>
          </table:table-cell>
          <table:table-cell table:style-name="ce1" office:value-type="float" office:value="4.152248" calcext:value-type="float">
            <text:p>4.152248</text:p>
          </table:table-cell>
          <table:table-cell table:style-name="ce1" office:value-type="float" office:value="2252168" calcext:value-type="float">
            <text:p>2252168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8976" calcext:value-type="float">
            <text:p>28976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5000" calcext:value-type="float">
            <text:p>205000</text:p>
          </table:table-cell>
          <table:table-cell table:style-name="ce1" office:value-type="float" office:value="3158464" calcext:value-type="float">
            <text:p>3158464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redu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random-callstack-ubench+small-alloc-0.5</text:p>
          </table:table-cell>
          <table:table-cell table:style-name="ce1" office:value-type="float" office:value="0.002429" calcext:value-type="float">
            <text:p>0.002429</text:p>
          </table:table-cell>
          <table:table-cell table:style-name="ce1" office:value-type="float" office:value="2429191500" calcext:value-type="float">
            <text:p>2429191500</text:p>
          </table:table-cell>
          <table:table-cell table:style-name="ce1" office:value-type="float" office:value="4.3359" calcext:value-type="float">
            <text:p>4.3359</text:p>
          </table:table-cell>
          <table:table-cell table:style-name="ce1" office:value-type="float" office:value="2134141" calcext:value-type="float">
            <text:p>2134141</text:p>
          </table:table-cell>
          <table:table-cell table:style-name="ce1" office:value-type="string" calcext:value-type="string">
            <text:p>8M</text:p>
          </table:table-cell>
          <table:table-cell table:style-name="ce1" office:value-type="float" office:value="20304" calcext:value-type="float">
            <text:p>20304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204824" calcext:value-type="float">
            <text:p>204824</text:p>
          </table:table-cell>
          <table:table-cell table:style-name="ce1" office:value-type="float" office:value="2679552" calcext:value-type="float">
            <text:p>2679552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reduce</text:p>
          </table:table-cell>
          <table:table-cell table:number-columns-repeated="1009"/>
        </table:table-row>
        <table:table-row table:style-name="ro1" table:number-rows-repeated="9">
          <table:table-cell table:style-name="ce1" table:number-columns-repeated="14"/>
          <table:table-cell table:number-columns-repeated="1010"/>
        </table:table-row>
        <table:table-row table:style-name="ro1" table:number-rows-repeated="28">
          <table:table-cell table:style-name="ce1" table:number-columns-repeated="11"/>
          <table:table-cell table:number-columns-repeated="1013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e size data" table:style-name="ta2"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number-columns-repeated="6" table:default-cell-style-name="Default"/>
        <table:table-column table:style-name="co17" table:default-cell-style-name="Default"/>
        <table:table-column table:style-name="co15" table:number-columns-repeated="1014" table:default-cell-style-name="Default"/>
        <table:table-row table:style-name="ro1"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encap</text:p>
          </table:table-cell>
          <table:table-cell table:style-name="ce3" office:value-type="string" calcext:value-type="string">
            <text:p>clearregs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libc-bench</text:p>
          </table:table-cell>
          <table:table-cell table:style-name="ce1" office:value-type="string" calcext:value-type="string">
            <text:p>random-callstack-ubench</text:p>
          </table:table-cell>
          <table:table-cell table:number-columns-repeated="1017"/>
        </table:table-row>
        <table:table-row table:style-name="ro1">
          <table:table-cell table:number-columns-repeated="3" table:style-name="ce1" office:value-type="string" calcext:value-type="string">
            <text:p>none</text:p>
          </table:table-cell>
          <table:table-cell table:style-name="ce3" office:value-type="string" calcext:value-type="string">
            <text:p>noclear</text:p>
          </table:table-cell>
          <table:table-cell table:style-name="ce4" table:formula="of:=IFERROR(__xludf.dummyfunction(&quot;QUERY(Data!$A:$N,&quot;&quot;SELECT L WHERE (A='&quot;&quot;&amp;$A2&amp;&quot;&quot;' AND B='&quot;&quot;&amp;$C2&amp;&quot;&quot;' AND C='&quot;&quot;&amp;$D2&amp;&quot;&quot;' AND N='&quot;&quot;&amp;$B2&amp;&quot;&quot;' AND D CONTAINS '&quot;&quot;&amp;E$1&amp;&quot;&quot;') LIMIT 1&quot;&quot;,0)&quot;);124728)" office:value-type="float" office:value="124728" calcext:value-type="float">
            <text:p>124728</text:p>
          </table:table-cell>
          <table:table-cell table:style-name="ce4" table:formula="of:=IFERROR(__xludf.dummyfunction(&quot;QUERY(Data!$A:$N,&quot;&quot;SELECT L WHERE (A='&quot;&quot;&amp;$A2&amp;&quot;&quot;' AND B='&quot;&quot;&amp;$C2&amp;&quot;&quot;' AND C='&quot;&quot;&amp;$D2&amp;&quot;&quot;' AND N='&quot;&quot;&amp;$B2&amp;&quot;&quot;' AND D CONTAINS '&quot;&quot;&amp;F$1&amp;&quot;&quot;') LIMIT 1&quot;&quot;,0)&quot;);179716)" office:value-type="float" office:value="179716" calcext:value-type="float">
            <text:p>179716</text:p>
          </table:table-cell>
          <table:table-cell table:style-name="ce4" table:formula="of:=IFERROR(__xludf.dummyfunction(&quot;QUERY(Data!$A:$N,&quot;&quot;SELECT L WHERE (A='&quot;&quot;&amp;$A2&amp;&quot;&quot;' AND B='&quot;&quot;&amp;$C2&amp;&quot;&quot;' AND C='&quot;&quot;&amp;$D2&amp;&quot;&quot;' AND N='&quot;&quot;&amp;$B2&amp;&quot;&quot;' AND D CONTAINS '&quot;&quot;&amp;G$1&amp;&quot;&quot;') LIMIT 1&quot;&quot;,0)&quot;);171896)" office:value-type="float" office:value="171896" calcext:value-type="float">
            <text:p>17189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ce3" office:value-type="string" calcext:value-type="string">
            <text:p>noclear</text:p>
          </table:table-cell>
          <table:table-cell table:style-name="ce4" table:formula="of:=IFERROR(__xludf.dummyfunction(&quot;QUERY(Data!$A:$N,&quot;&quot;SELECT L WHERE (A='&quot;&quot;&amp;$A3&amp;&quot;&quot;' AND B='&quot;&quot;&amp;$C3&amp;&quot;&quot;' AND C='&quot;&quot;&amp;$D3&amp;&quot;&quot;' AND N='&quot;&quot;&amp;$B3&amp;&quot;&quot;' AND D CONTAINS '&quot;&quot;&amp;E$1&amp;&quot;&quot;') LIMIT 1&quot;&quot;,0)&quot;);140592)" office:value-type="float" office:value="140592" calcext:value-type="float">
            <text:p>140592</text:p>
          </table:table-cell>
          <table:table-cell table:style-name="ce4" table:formula="of:=IFERROR(__xludf.dummyfunction(&quot;QUERY(Data!$A:$N,&quot;&quot;SELECT L WHERE (A='&quot;&quot;&amp;$A3&amp;&quot;&quot;' AND B='&quot;&quot;&amp;$C3&amp;&quot;&quot;' AND C='&quot;&quot;&amp;$D3&amp;&quot;&quot;' AND N='&quot;&quot;&amp;$B3&amp;&quot;&quot;' AND D CONTAINS '&quot;&quot;&amp;F$1&amp;&quot;&quot;') LIMIT 1&quot;&quot;,0)&quot;);206140)" office:value-type="float" office:value="206140" calcext:value-type="float">
            <text:p>206140</text:p>
          </table:table-cell>
          <table:table-cell table:style-name="ce4" table:formula="of:=IFERROR(__xludf.dummyfunction(&quot;QUERY(Data!$A:$N,&quot;&quot;SELECT L WHERE (A='&quot;&quot;&amp;$A3&amp;&quot;&quot;' AND B='&quot;&quot;&amp;$C3&amp;&quot;&quot;' AND C='&quot;&quot;&amp;$D3&amp;&quot;&quot;' AND N='&quot;&quot;&amp;$B3&amp;&quot;&quot;' AND D CONTAINS '&quot;&quot;&amp;G$1&amp;&quot;&quot;') LIMIT 1&quot;&quot;,0)&quot;);195060)" office:value-type="float" office:value="195060" calcext:value-type="float">
            <text:p>19506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noclear</text:p>
          </table:table-cell>
          <table:table-cell table:style-name="ce4" table:formula="of:=IFERROR(__xludf.dummyfunction(&quot;QUERY(Data!$A:$N,&quot;&quot;SELECT L WHERE (A='&quot;&quot;&amp;$A4&amp;&quot;&quot;' AND B='&quot;&quot;&amp;$C4&amp;&quot;&quot;' AND C='&quot;&quot;&amp;$D4&amp;&quot;&quot;' AND N='&quot;&quot;&amp;$B4&amp;&quot;&quot;' AND D CONTAINS '&quot;&quot;&amp;E$1&amp;&quot;&quot;') LIMIT 1&quot;&quot;,0)&quot;);147144)" office:value-type="float" office:value="147144" calcext:value-type="float">
            <text:p>147144</text:p>
          </table:table-cell>
          <table:table-cell table:style-name="ce4" table:formula="of:=IFERROR(__xludf.dummyfunction(&quot;QUERY(Data!$A:$N,&quot;&quot;SELECT L WHERE (A='&quot;&quot;&amp;$A4&amp;&quot;&quot;' AND B='&quot;&quot;&amp;$C4&amp;&quot;&quot;' AND C='&quot;&quot;&amp;$D4&amp;&quot;&quot;' AND N='&quot;&quot;&amp;$B4&amp;&quot;&quot;' AND D CONTAINS '&quot;&quot;&amp;F$1&amp;&quot;&quot;') LIMIT 1&quot;&quot;,0)&quot;);216604)" office:value-type="float" office:value="216604" calcext:value-type="float">
            <text:p>216604</text:p>
          </table:table-cell>
          <table:table-cell table:style-name="ce4" table:formula="of:=IFERROR(__xludf.dummyfunction(&quot;QUERY(Data!$A:$N,&quot;&quot;SELECT L WHERE (A='&quot;&quot;&amp;$A4&amp;&quot;&quot;' AND B='&quot;&quot;&amp;$C4&amp;&quot;&quot;' AND C='&quot;&quot;&amp;$D4&amp;&quot;&quot;' AND N='&quot;&quot;&amp;$B4&amp;&quot;&quot;' AND D CONTAINS '&quot;&quot;&amp;G$1&amp;&quot;&quot;') LIMIT 1&quot;&quot;,0)&quot;);204584)" office:value-type="float" office:value="204584" calcext:value-type="float">
            <text:p>204584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rampoline</text:p>
          </table:table-cell>
          <table:table-cell table:style-name="ce3" office:value-type="string" calcext:value-type="string">
            <text:p>noclear</text:p>
          </table:table-cell>
          <table:table-cell table:style-name="ce4" table:formula="of:=IFERROR(__xludf.dummyfunction(&quot;QUERY(Data!$A:$N,&quot;&quot;SELECT L WHERE (A='&quot;&quot;&amp;$A5&amp;&quot;&quot;' AND B='&quot;&quot;&amp;$C5&amp;&quot;&quot;' AND C='&quot;&quot;&amp;$D5&amp;&quot;&quot;' AND N='&quot;&quot;&amp;$B5&amp;&quot;&quot;' AND D CONTAINS '&quot;&quot;&amp;E$1&amp;&quot;&quot;') LIMIT 1&quot;&quot;,0)&quot;);141856)" office:value-type="float" office:value="141856" calcext:value-type="float">
            <text:p>141856</text:p>
          </table:table-cell>
          <table:table-cell table:style-name="ce4" table:formula="of:=IFERROR(__xludf.dummyfunction(&quot;QUERY(Data!$A:$N,&quot;&quot;SELECT L WHERE (A='&quot;&quot;&amp;$A5&amp;&quot;&quot;' AND B='&quot;&quot;&amp;$C5&amp;&quot;&quot;' AND C='&quot;&quot;&amp;$D5&amp;&quot;&quot;' AND N='&quot;&quot;&amp;$B5&amp;&quot;&quot;' AND D CONTAINS '&quot;&quot;&amp;F$1&amp;&quot;&quot;') LIMIT 1&quot;&quot;,0)&quot;);216028)" office:value-type="float" office:value="216028" calcext:value-type="float">
            <text:p>216028</text:p>
          </table:table-cell>
          <table:table-cell table:style-name="ce4" table:formula="of:=IFERROR(__xludf.dummyfunction(&quot;QUERY(Data!$A:$N,&quot;&quot;SELECT L WHERE (A='&quot;&quot;&amp;$A5&amp;&quot;&quot;' AND B='&quot;&quot;&amp;$C5&amp;&quot;&quot;' AND C='&quot;&quot;&amp;$D5&amp;&quot;&quot;' AND N='&quot;&quot;&amp;$B5&amp;&quot;&quot;' AND D CONTAINS '&quot;&quot;&amp;G$1&amp;&quot;&quot;') LIMIT 1&quot;&quot;,0)&quot;);195268)" office:value-type="float" office:value="195268" calcext:value-type="float">
            <text:p>195268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rampoline</text:p>
          </table:table-cell>
          <table:table-cell table:style-name="ce3" office:value-type="string" calcext:value-type="string">
            <text:p>clear</text:p>
          </table:table-cell>
          <table:table-cell table:style-name="ce4" table:formula="of:=IFERROR(__xludf.dummyfunction(&quot;QUERY(Data!$A:$N,&quot;&quot;SELECT L WHERE (A='&quot;&quot;&amp;$A6&amp;&quot;&quot;' AND B='&quot;&quot;&amp;$C6&amp;&quot;&quot;' AND C='&quot;&quot;&amp;$D6&amp;&quot;&quot;' AND N='&quot;&quot;&amp;$B6&amp;&quot;&quot;' AND D CONTAINS '&quot;&quot;&amp;E$1&amp;&quot;&quot;') LIMIT 1&quot;&quot;,0)&quot;);142176)" office:value-type="float" office:value="142176" calcext:value-type="float">
            <text:p>142176</text:p>
          </table:table-cell>
          <table:table-cell table:style-name="ce4" table:formula="of:=IFERROR(__xludf.dummyfunction(&quot;QUERY(Data!$A:$N,&quot;&quot;SELECT L WHERE (A='&quot;&quot;&amp;$A6&amp;&quot;&quot;' AND B='&quot;&quot;&amp;$C6&amp;&quot;&quot;' AND C='&quot;&quot;&amp;$D6&amp;&quot;&quot;' AND N='&quot;&quot;&amp;$B6&amp;&quot;&quot;' AND D CONTAINS '&quot;&quot;&amp;F$1&amp;&quot;&quot;') LIMIT 1&quot;&quot;,0)&quot;);217212)" office:value-type="float" office:value="217212" calcext:value-type="float">
            <text:p>217212</text:p>
          </table:table-cell>
          <table:table-cell table:style-name="ce4" table:formula="of:=IFERROR(__xludf.dummyfunction(&quot;QUERY(Data!$A:$N,&quot;&quot;SELECT L WHERE (A='&quot;&quot;&amp;$A6&amp;&quot;&quot;' AND B='&quot;&quot;&amp;$C6&amp;&quot;&quot;' AND C='&quot;&quot;&amp;$D6&amp;&quot;&quot;' AND N='&quot;&quot;&amp;$B6&amp;&quot;&quot;' AND D CONTAINS '&quot;&quot;&amp;G$1&amp;&quot;&quot;') LIMIT 1&quot;&quot;,0)&quot;);195300)" office:value-type="float" office:value="195300" calcext:value-type="float">
            <text:p>19530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isentry</text:p>
          </table:table-cell>
          <table:table-cell table:style-name="ce3" office:value-type="string" calcext:value-type="string">
            <text:p>noclear</text:p>
          </table:table-cell>
          <table:table-cell table:style-name="ce4" table:formula="of:=IFERROR(__xludf.dummyfunction(&quot;QUERY(Data!$A:$N,&quot;&quot;SELECT L WHERE (A='&quot;&quot;&amp;$A7&amp;&quot;&quot;' AND B='&quot;&quot;&amp;$C7&amp;&quot;&quot;' AND C='&quot;&quot;&amp;$D7&amp;&quot;&quot;' AND N='&quot;&quot;&amp;$B7&amp;&quot;&quot;' AND D CONTAINS '&quot;&quot;&amp;E$1&amp;&quot;&quot;') LIMIT 1&quot;&quot;,0)&quot;);141408)" office:value-type="float" office:value="141408" calcext:value-type="float">
            <text:p>141408</text:p>
          </table:table-cell>
          <table:table-cell table:style-name="ce4" table:formula="of:=IFERROR(__xludf.dummyfunction(&quot;QUERY(Data!$A:$N,&quot;&quot;SELECT L WHERE (A='&quot;&quot;&amp;$A7&amp;&quot;&quot;' AND B='&quot;&quot;&amp;$C7&amp;&quot;&quot;' AND C='&quot;&quot;&amp;$D7&amp;&quot;&quot;' AND N='&quot;&quot;&amp;$B7&amp;&quot;&quot;' AND D CONTAINS '&quot;&quot;&amp;F$1&amp;&quot;&quot;') LIMIT 1&quot;&quot;,0)&quot;);212700)" office:value-type="float" office:value="212700" calcext:value-type="float">
            <text:p>212700</text:p>
          </table:table-cell>
          <table:table-cell table:style-name="ce4" table:formula="of:=IFERROR(__xludf.dummyfunction(&quot;QUERY(Data!$A:$N,&quot;&quot;SELECT L WHERE (A='&quot;&quot;&amp;$A7&amp;&quot;&quot;' AND B='&quot;&quot;&amp;$C7&amp;&quot;&quot;' AND C='&quot;&quot;&amp;$D7&amp;&quot;&quot;' AND N='&quot;&quot;&amp;$B7&amp;&quot;&quot;' AND D CONTAINS '&quot;&quot;&amp;G$1&amp;&quot;&quot;') LIMIT 1&quot;&quot;,0)&quot;);195204)" office:value-type="float" office:value="195204" calcext:value-type="float">
            <text:p>195204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4" table:formula="of:=IFERROR(__xludf.dummyfunction(&quot;QUERY(Data!$A:$N,&quot;&quot;SELECT L WHERE (A='&quot;&quot;&amp;$A8&amp;&quot;&quot;' AND B='&quot;&quot;&amp;$C8&amp;&quot;&quot;' AND C='&quot;&quot;&amp;$D8&amp;&quot;&quot;' AND N='&quot;&quot;&amp;$B8&amp;&quot;&quot;' AND D CONTAINS '&quot;&quot;&amp;E$1&amp;&quot;&quot;') LIMIT 1&quot;&quot;,0)&quot;);141904)" office:value-type="float" office:value="141904" calcext:value-type="float">
            <text:p>141904</text:p>
          </table:table-cell>
          <table:table-cell table:style-name="ce4" table:formula="of:=IFERROR(__xludf.dummyfunction(&quot;QUERY(Data!$A:$N,&quot;&quot;SELECT L WHERE (A='&quot;&quot;&amp;$A8&amp;&quot;&quot;' AND B='&quot;&quot;&amp;$C8&amp;&quot;&quot;' AND C='&quot;&quot;&amp;$D8&amp;&quot;&quot;' AND N='&quot;&quot;&amp;$B8&amp;&quot;&quot;' AND D CONTAINS '&quot;&quot;&amp;F$1&amp;&quot;&quot;') LIMIT 1&quot;&quot;,0)&quot;);216764)" office:value-type="float" office:value="216764" calcext:value-type="float">
            <text:p>216764</text:p>
          </table:table-cell>
          <table:table-cell table:style-name="ce4" table:formula="of:=IFERROR(__xludf.dummyfunction(&quot;QUERY(Data!$A:$N,&quot;&quot;SELECT L WHERE (A='&quot;&quot;&amp;$A8&amp;&quot;&quot;' AND B='&quot;&quot;&amp;$C8&amp;&quot;&quot;' AND C='&quot;&quot;&amp;$D8&amp;&quot;&quot;' AND N='&quot;&quot;&amp;$B8&amp;&quot;&quot;' AND D CONTAINS '&quot;&quot;&amp;G$1&amp;&quot;&quot;') LIMIT 1&quot;&quot;,0)&quot;);195428)" office:value-type="float" office:value="195428" calcext:value-type="float">
            <text:p>1954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trampoline</text:p>
          </table:table-cell>
          <table:table-cell table:style-name="ce3" office:value-type="string" calcext:value-type="string">
            <text:p>noclear</text:p>
          </table:table-cell>
          <table:table-cell table:style-name="ce4" table:formula="of:=IFERROR(__xludf.dummyfunction(&quot;QUERY(Data!$A:$N,&quot;&quot;SELECT L WHERE (A='&quot;&quot;&amp;$A9&amp;&quot;&quot;' AND B='&quot;&quot;&amp;$C9&amp;&quot;&quot;' AND C='&quot;&quot;&amp;$D9&amp;&quot;&quot;' AND N='&quot;&quot;&amp;$B9&amp;&quot;&quot;' AND D CONTAINS '&quot;&quot;&amp;E$1&amp;&quot;&quot;') LIMIT 1&quot;&quot;,0)&quot;);148824)" office:value-type="float" office:value="148824" calcext:value-type="float">
            <text:p>148824</text:p>
          </table:table-cell>
          <table:table-cell table:style-name="ce4" table:formula="of:=IFERROR(__xludf.dummyfunction(&quot;QUERY(Data!$A:$N,&quot;&quot;SELECT L WHERE (A='&quot;&quot;&amp;$A9&amp;&quot;&quot;' AND B='&quot;&quot;&amp;$C9&amp;&quot;&quot;' AND C='&quot;&quot;&amp;$D9&amp;&quot;&quot;' AND N='&quot;&quot;&amp;$B9&amp;&quot;&quot;' AND D CONTAINS '&quot;&quot;&amp;F$1&amp;&quot;&quot;') LIMIT 1&quot;&quot;,0)&quot;);229420)" office:value-type="float" office:value="229420" calcext:value-type="float">
            <text:p>229420</text:p>
          </table:table-cell>
          <table:table-cell table:style-name="ce4" table:formula="of:=IFERROR(__xludf.dummyfunction(&quot;QUERY(Data!$A:$N,&quot;&quot;SELECT L WHERE (A='&quot;&quot;&amp;$A9&amp;&quot;&quot;' AND B='&quot;&quot;&amp;$C9&amp;&quot;&quot;' AND C='&quot;&quot;&amp;$D9&amp;&quot;&quot;' AND N='&quot;&quot;&amp;$B9&amp;&quot;&quot;' AND D CONTAINS '&quot;&quot;&amp;G$1&amp;&quot;&quot;') LIMIT 1&quot;&quot;,0)&quot;);204856)" office:value-type="float" office:value="204856" calcext:value-type="float">
            <text:p>2048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trampoline</text:p>
          </table:table-cell>
          <table:table-cell table:style-name="ce3" office:value-type="string" calcext:value-type="string">
            <text:p>clear</text:p>
          </table:table-cell>
          <table:table-cell table:style-name="ce4" table:formula="of:=IFERROR(__xludf.dummyfunction(&quot;QUERY(Data!$A:$N,&quot;&quot;SELECT L WHERE (A='&quot;&quot;&amp;$A10&amp;&quot;&quot;' AND B='&quot;&quot;&amp;$C10&amp;&quot;&quot;' AND C='&quot;&quot;&amp;$D10&amp;&quot;&quot;' AND N='&quot;&quot;&amp;$B10&amp;&quot;&quot;' AND D CONTAINS '&quot;&quot;&amp;E$1&amp;&quot;&quot;') LIMIT 1&quot;&quot;,0)&quot;);149160)" office:value-type="float" office:value="149160" calcext:value-type="float">
            <text:p>149160</text:p>
          </table:table-cell>
          <table:table-cell table:style-name="ce4" table:formula="of:=IFERROR(__xludf.dummyfunction(&quot;QUERY(Data!$A:$N,&quot;&quot;SELECT L WHERE (A='&quot;&quot;&amp;$A10&amp;&quot;&quot;' AND B='&quot;&quot;&amp;$C10&amp;&quot;&quot;' AND C='&quot;&quot;&amp;$D10&amp;&quot;&quot;' AND N='&quot;&quot;&amp;$B10&amp;&quot;&quot;' AND D CONTAINS '&quot;&quot;&amp;F$1&amp;&quot;&quot;') LIMIT 1&quot;&quot;,0)&quot;);230604)" office:value-type="float" office:value="230604" calcext:value-type="float">
            <text:p>230604</text:p>
          </table:table-cell>
          <table:table-cell table:style-name="ce4" table:formula="of:=IFERROR(__xludf.dummyfunction(&quot;QUERY(Data!$A:$N,&quot;&quot;SELECT L WHERE (A='&quot;&quot;&amp;$A10&amp;&quot;&quot;' AND B='&quot;&quot;&amp;$C10&amp;&quot;&quot;' AND C='&quot;&quot;&amp;$D10&amp;&quot;&quot;' AND N='&quot;&quot;&amp;$B10&amp;&quot;&quot;' AND D CONTAINS '&quot;&quot;&amp;G$1&amp;&quot;&quot;') LIMIT 1&quot;&quot;,0)&quot;);204888)" office:value-type="float" office:value="204888" calcext:value-type="float">
            <text:p>20488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isentry</text:p>
          </table:table-cell>
          <table:table-cell table:style-name="ce3" office:value-type="string" calcext:value-type="string">
            <text:p>noclear</text:p>
          </table:table-cell>
          <table:table-cell table:style-name="ce4" table:formula="of:=IFERROR(__xludf.dummyfunction(&quot;QUERY(Data!$A:$N,&quot;&quot;SELECT L WHERE (A='&quot;&quot;&amp;$A11&amp;&quot;&quot;' AND B='&quot;&quot;&amp;$C11&amp;&quot;&quot;' AND C='&quot;&quot;&amp;$D11&amp;&quot;&quot;' AND N='&quot;&quot;&amp;$B11&amp;&quot;&quot;' AND D CONTAINS '&quot;&quot;&amp;E$1&amp;&quot;&quot;') LIMIT 1&quot;&quot;,0)&quot;);148344)" office:value-type="float" office:value="148344" calcext:value-type="float">
            <text:p>148344</text:p>
          </table:table-cell>
          <table:table-cell table:style-name="ce4" table:formula="of:=IFERROR(__xludf.dummyfunction(&quot;QUERY(Data!$A:$N,&quot;&quot;SELECT L WHERE (A='&quot;&quot;&amp;$A11&amp;&quot;&quot;' AND B='&quot;&quot;&amp;$C11&amp;&quot;&quot;' AND C='&quot;&quot;&amp;$D11&amp;&quot;&quot;' AND N='&quot;&quot;&amp;$B11&amp;&quot;&quot;' AND D CONTAINS '&quot;&quot;&amp;F$1&amp;&quot;&quot;') LIMIT 1&quot;&quot;,0)&quot;);226012)" office:value-type="float" office:value="226012" calcext:value-type="float">
            <text:p>226012</text:p>
          </table:table-cell>
          <table:table-cell table:style-name="ce4" table:formula="of:=IFERROR(__xludf.dummyfunction(&quot;QUERY(Data!$A:$N,&quot;&quot;SELECT L WHERE (A='&quot;&quot;&amp;$A11&amp;&quot;&quot;' AND B='&quot;&quot;&amp;$C11&amp;&quot;&quot;' AND C='&quot;&quot;&amp;$D11&amp;&quot;&quot;' AND N='&quot;&quot;&amp;$B11&amp;&quot;&quot;' AND D CONTAINS '&quot;&quot;&amp;G$1&amp;&quot;&quot;') LIMIT 1&quot;&quot;,0)&quot;);204792)" office:value-type="float" office:value="204792" calcext:value-type="float">
            <text:p>2047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lear</text:p>
          </table:table-cell>
          <table:table-cell table:style-name="ce4" table:formula="of:=IFERROR(__xludf.dummyfunction(&quot;QUERY(Data!$A:$N,&quot;&quot;SELECT L WHERE (A='&quot;&quot;&amp;$A12&amp;&quot;&quot;' AND B='&quot;&quot;&amp;$C12&amp;&quot;&quot;' AND C='&quot;&quot;&amp;$D12&amp;&quot;&quot;' AND N='&quot;&quot;&amp;$B12&amp;&quot;&quot;' AND D CONTAINS '&quot;&quot;&amp;E$1&amp;&quot;&quot;') LIMIT 1&quot;&quot;,0)&quot;);148872)" office:value-type="float" office:value="148872" calcext:value-type="float">
            <text:p>148872</text:p>
          </table:table-cell>
          <table:table-cell table:style-name="ce4" table:formula="of:=IFERROR(__xludf.dummyfunction(&quot;QUERY(Data!$A:$N,&quot;&quot;SELECT L WHERE (A='&quot;&quot;&amp;$A12&amp;&quot;&quot;' AND B='&quot;&quot;&amp;$C12&amp;&quot;&quot;' AND C='&quot;&quot;&amp;$D12&amp;&quot;&quot;' AND N='&quot;&quot;&amp;$B12&amp;&quot;&quot;' AND D CONTAINS '&quot;&quot;&amp;F$1&amp;&quot;&quot;') LIMIT 1&quot;&quot;,0)&quot;);230060)" office:value-type="float" office:value="230060" calcext:value-type="float">
            <text:p>230060</text:p>
          </table:table-cell>
          <table:table-cell table:style-name="ce4" table:formula="of:=IFERROR(__xludf.dummyfunction(&quot;QUERY(Data!$A:$N,&quot;&quot;SELECT L WHERE (A='&quot;&quot;&amp;$A12&amp;&quot;&quot;' AND B='&quot;&quot;&amp;$C12&amp;&quot;&quot;' AND C='&quot;&quot;&amp;$D12&amp;&quot;&quot;' AND N='&quot;&quot;&amp;$B12&amp;&quot;&quot;' AND D CONTAINS '&quot;&quot;&amp;G$1&amp;&quot;&quot;') LIMIT 1&quot;&quot;,0)&quot;);205000)" office:value-type="float" office:value="205000" calcext:value-type="float">
            <text:p>2050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cumulative ovh ideal case</text:p>
          </table:table-cell>
          <table:table-cell table:number-columns-repeated="3"/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Libc-bench</text:p>
          </table:table-cell>
          <table:table-cell table:style-name="ce1" office:value-type="string" calcext:value-type="string">
            <text:p>Random callstack μbenchma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ack Revocation</text:p>
          </table:table-cell>
          <table:table-cell table:number-columns-repeated="3"/>
          <table:table-cell table:style-name="ce5" table:formula="of:=([.E3]-[.E2])/[.E2]" office:value-type="percentage" office:value="0.127188762747739" calcext:value-type="percentage">
            <text:p>12.72%</text:p>
          </table:table-cell>
          <table:table-cell table:style-name="ce5" table:formula="of:=([.F3]-[.F2])/[.F2]" office:value-type="percentage" office:value="0.147031983796657" calcext:value-type="percentage">
            <text:p>14.70%</text:p>
          </table:table-cell>
          <table:table-cell table:style-name="ce5" table:formula="of:=([.G3]-[.G2])/[.G2]" office:value-type="percentage" office:value="0.134755898915623" calcext:value-type="percentage">
            <text:p>13.48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serve Stack</text:p>
          </table:table-cell>
          <table:table-cell table:number-columns-repeated="3"/>
          <table:table-cell table:style-name="ce5" table:formula="of:=([.E4]-[.E3])/[.E3]" office:value-type="percentage" office:value="0.0466029361556845" calcext:value-type="percentage">
            <text:p>4.66%</text:p>
          </table:table-cell>
          <table:table-cell table:style-name="ce5" table:formula="of:=([.F4]-[.F3])/[.F3]" office:value-type="percentage" office:value="0.0507616183176482" calcext:value-type="percentage">
            <text:p>5.08%</text:p>
          </table:table-cell>
          <table:table-cell table:style-name="ce5" table:formula="of:=([.G4]-[.G3])/[.G3]" office:value-type="percentage" office:value="0.0488260022557162" calcext:value-type="percentage">
            <text:p>4.88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capsulation</text:p>
          </table:table-cell>
          <table:table-cell table:number-columns-repeated="3"/>
          <table:table-cell table:style-name="ce5" table:formula="of:=([.E11]-[.E4])/[.E4]" office:value-type="percentage" office:value="0.00815527646387213" calcext:value-type="percentage">
            <text:p>0.82%</text:p>
          </table:table-cell>
          <table:table-cell table:style-name="ce5" table:formula="of:=([.F11]-[.F4])/[.F4]" office:value-type="percentage" office:value="0.0434341009399642" calcext:value-type="percentage">
            <text:p>4.34%</text:p>
          </table:table-cell>
          <table:table-cell table:style-name="ce5" table:formula="of:=([.G11]-[.G4])/[.G4]" office:value-type="percentage" office:value="0.00101669729793141" calcext:value-type="percentage">
            <text:p>0.10%</text:p>
          </table:table-cell>
          <table:table-cell/>
          <table:table-cell table:style-name="ce5" table:number-columns-repeated="2"/>
          <table:table-cell table:style-name="ce5" table:formula="of:=([.G9]-[.G4])/[.G4]" office:value-type="percentage" office:value="0.001329527236" calcext:value-type="percentage">
            <text:p>0.13%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gister Clearing</text:p>
          </table:table-cell>
          <table:table-cell table:style-name="ce1" table:number-columns-repeated="2"/>
          <table:table-cell/>
          <table:table-cell table:style-name="ce5" table:formula="of:=([.E12]-[.E11])/[.E11]" office:value-type="percentage" office:value="0.00355929461252225" calcext:value-type="percentage">
            <text:p>0.36%</text:p>
          </table:table-cell>
          <table:table-cell table:style-name="ce5" table:formula="of:=([.F12]-[.F11])/[.F11]" office:value-type="percentage" office:value="0.0179105534219422" calcext:value-type="percentage">
            <text:p>1.79%</text:p>
          </table:table-cell>
          <table:table-cell table:style-name="ce5" table:formula="of:=([.G12]-[.G11])/[.G11]" office:value-type="percentage" office:value="0.00101566467440134" calcext:value-type="percentage">
            <text:p>0.10%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number-columns-repeated="4"/>
          <table:table-cell>
            <draw:frame table:end-cell-address="'Code size data'.M28" table:end-x="39.4pt" table:end-y="7.48pt" draw:z-index="0" draw:name="Chart 1" draw:style-name="gr1" draw:text-style-name="P1" svg:width="404.99pt" svg:height="136.46pt" svg:x="24.75pt" svg:y="12.76pt">
              <draw:object draw:notify-on-update-of-ranges="'Code size data'.B14:'Code size data'.G14 'Code size data'.A15:'Code size data'.A15 'Code size data'.B15:'Code size data'.G15 'Code size data'.A16:'Code size data'.A16 'Code size data'.B16:'Code size data'.G16 'Code size data'.A17:'Code size data'.A17 'Code size data'.B17:'Code size data'.G17 'Code size data'.A18:'Code size data'.A18 'Code size data'.B18:'Code size data'.G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_data_8M_stack" table:style-name="ta3">
        <table:table-column table:style-name="co15" table:number-columns-repeated="1024" table:default-cell-style-name="Default"/>
        <table:table-row table:style-name="ro1"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encap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imSeconds</text:p>
          </table:table-cell>
          <table:table-cell table:style-name="ce1" office:value-type="string" calcext:value-type="string">
            <text:p>simTicks</text:p>
          </table:table-cell>
          <table:table-cell table:style-name="ce1" office:value-type="string" calcext:value-type="string">
            <text:p>system.cpu.cpi</text:p>
          </table:table-cell>
          <table:table-cell table:style-name="ce1" office:value-type="string" calcext:value-type="string">
            <text:p>sail.Instructions</text:p>
          </table:table-cell>
          <table:table-cell table:style-name="ce1" office:value-type="string" calcext:value-type="string">
            <text:p>guest.stack.pressure</text:p>
          </table:table-cell>
          <table:table-cell table:style-name="ce1" office:value-type="string" calcext:value-type="string">
            <text:p>secureCall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coremark</text:p>
          </table:table-cell>
          <table:table-cell table:style-name="ce7" office:value-type="float" office:value="25436" calcext:value-type="float">
            <text:p>25,436</text:p>
          </table:table-cell>
          <table:table-cell table:style-name="ce1" office:value-type="float" office:value="25436201000" calcext:value-type="float">
            <text:p>25436201000</text:p>
          </table:table-cell>
          <table:table-cell table:style-name="ce7" office:value-type="float" office:value="10538813" calcext:value-type="float">
            <text:p>10,538,813</text:p>
          </table:table-cell>
          <table:table-cell table:style-name="ce1" office:value-type="float" office:value="23821899" calcext:value-type="float">
            <text:p>23821899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coremark</text:p>
          </table:table-cell>
          <table:table-cell table:style-name="ce7" office:value-type="float" office:value="26707" calcext:value-type="float">
            <text:p>26,707</text:p>
          </table:table-cell>
          <table:table-cell table:style-name="ce1" office:value-type="float" office:value="26707437000" calcext:value-type="float">
            <text:p>26707437000</text:p>
          </table:table-cell>
          <table:table-cell table:style-name="ce7" office:value-type="float" office:value="8962154" calcext:value-type="float">
            <text:p>8,962,154</text:p>
          </table:table-cell>
          <table:table-cell table:style-name="ce1" office:value-type="float" office:value="24894325" calcext:value-type="float">
            <text:p>24894325</text:p>
          </table:table-cell>
          <table:table-cell table:style-name="ce1" office:value-type="float" office:value="4784" calcext:value-type="float">
            <text:p>47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oremark</text:p>
          </table:table-cell>
          <table:table-cell table:style-name="ce7" office:value-type="float" office:value="27618" calcext:value-type="float">
            <text:p>27,618</text:p>
          </table:table-cell>
          <table:table-cell table:style-name="ce1" office:value-type="float" office:value="27617735000" calcext:value-type="float">
            <text:p>27617735000</text:p>
          </table:table-cell>
          <table:table-cell table:style-name="ce7" office:value-type="float" office:value="8592087" calcext:value-type="float">
            <text:p>8,592,087</text:p>
          </table:table-cell>
          <table:table-cell table:style-name="ce1" office:value-type="float" office:value="25375080" calcext:value-type="float">
            <text:p>2537508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coremark</text:p>
          </table:table-cell>
          <table:table-cell table:style-name="ce7" office:value-type="float" office:value="201" calcext:value-type="float">
            <text:p>201</text:p>
          </table:table-cell>
          <table:table-cell table:style-name="ce1" office:value-type="float" office:value="201228500" calcext:value-type="float">
            <text:p>201228500</text:p>
          </table:table-cell>
          <table:table-cell table:style-name="ce7" office:value-type="float" office:value="8324026" calcext:value-type="float">
            <text:p>8,324,026</text:p>
          </table:table-cell>
          <table:table-cell table:style-name="ce1" office:value-type="float" office:value="134794" calcext:value-type="float">
            <text:p>134794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malloc</text:p>
          </table:table-cell>
          <table:table-cell table:style-name="ce7" office:value-type="float" office:value="20262" calcext:value-type="float">
            <text:p>20,262</text:p>
          </table:table-cell>
          <table:table-cell table:style-name="ce1" office:value-type="float" office:value="20261889500" calcext:value-type="float">
            <text:p>20261889500</text:p>
          </table:table-cell>
          <table:table-cell table:style-name="ce7" office:value-type="float" office:value="5415671" calcext:value-type="float">
            <text:p>5,415,671</text:p>
          </table:table-cell>
          <table:table-cell table:style-name="ce1" office:value-type="float" office:value="12126863" calcext:value-type="float">
            <text:p>12126863</text:p>
          </table:table-cell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string</text:p>
          </table:table-cell>
          <table:table-cell table:style-name="ce7" office:value-type="float" office:value="27657" calcext:value-type="float">
            <text:p>27,657</text:p>
          </table:table-cell>
          <table:table-cell table:style-name="ce1" office:value-type="float" office:value="27657455500" calcext:value-type="float">
            <text:p>27657455500</text:p>
          </table:table-cell>
          <table:table-cell table:style-name="ce7" office:value-type="float" office:value="4559374" calcext:value-type="float">
            <text:p>4,559,374</text:p>
          </table:table-cell>
          <table:table-cell table:style-name="ce1" office:value-type="float" office:value="24992367" calcext:value-type="float">
            <text:p>24992367</text:p>
          </table:table-cell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stdio</text:p>
          </table:table-cell>
          <table:table-cell table:style-name="ce7" office:value-type="float" office:value="2981" calcext:value-type="float">
            <text:p>2,981</text:p>
          </table:table-cell>
          <table:table-cell table:style-name="ce1" office:value-type="float" office:value="2981162500" calcext:value-type="float">
            <text:p>2981162500</text:p>
          </table:table-cell>
          <table:table-cell table:style-name="ce7" office:value-type="float" office:value="4443718" calcext:value-type="float">
            <text:p>4,443,718</text:p>
          </table:table-cell>
          <table:table-cell table:style-name="ce1" office:value-type="float" office:value="2584228" calcext:value-type="float">
            <text:p>2584228</text:p>
          </table:table-cell>
          <table:table-cell table:style-name="ce1" office:value-type="float" office:value="4496" calcext:value-type="float">
            <text:p>44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regex</text:p>
          </table:table-cell>
          <table:table-cell table:style-name="ce7" office:value-type="float" office:value="572" calcext:value-type="float">
            <text:p>572</text:p>
          </table:table-cell>
          <table:table-cell table:style-name="ce1" office:value-type="float" office:value="571713500" calcext:value-type="float">
            <text:p>571713500</text:p>
          </table:table-cell>
          <table:table-cell table:style-name="ce7" office:value-type="float" office:value="5486581" calcext:value-type="float">
            <text:p>5,486,581</text:p>
          </table:table-cell>
          <table:table-cell table:style-name="ce1" office:value-type="float" office:value="425575" calcext:value-type="float">
            <text:p>425575</text:p>
          </table:table-cell>
          <table:table-cell table:style-name="ce1" office:value-type="float" office:value="5504" calcext:value-type="float">
            <text:p>55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malloc</text:p>
          </table:table-cell>
          <table:table-cell table:style-name="ce7" office:value-type="float" office:value="21877" calcext:value-type="float">
            <text:p>21,877</text:p>
          </table:table-cell>
          <table:table-cell table:style-name="ce1" office:value-type="float" office:value="21876915500" calcext:value-type="float">
            <text:p>21876915500</text:p>
          </table:table-cell>
          <table:table-cell table:style-name="ce7" office:value-type="float" office:value="5088664" calcext:value-type="float">
            <text:p>5,088,664</text:p>
          </table:table-cell>
          <table:table-cell table:style-name="ce1" office:value-type="float" office:value="13242597" calcext:value-type="float">
            <text:p>13242597</text:p>
          </table:table-cell>
          <table:table-cell table:style-name="ce1" office:value-type="float" office:value="3344" calcext:value-type="float">
            <text:p>33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string</text:p>
          </table:table-cell>
          <table:table-cell table:style-name="ce7" office:value-type="float" office:value="28358" calcext:value-type="float">
            <text:p>28,358</text:p>
          </table:table-cell>
          <table:table-cell table:style-name="ce1" office:value-type="float" office:value="28357504000" calcext:value-type="float">
            <text:p>28357504000</text:p>
          </table:table-cell>
          <table:table-cell table:style-name="ce7" office:value-type="float" office:value="4448181" calcext:value-type="float">
            <text:p>4,448,181</text:p>
          </table:table-cell>
          <table:table-cell table:style-name="ce1" office:value-type="float" office:value="25610505" calcext:value-type="float">
            <text:p>25610505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stdio</text:p>
          </table:table-cell>
          <table:table-cell table:style-name="ce7" office:value-type="float" office:value="3823" calcext:value-type="float">
            <text:p>3,823</text:p>
          </table:table-cell>
          <table:table-cell table:style-name="ce1" office:value-type="float" office:value="3822899000" calcext:value-type="float">
            <text:p>3822899000</text:p>
          </table:table-cell>
          <table:table-cell table:style-name="ce7" office:value-type="float" office:value="3722082" calcext:value-type="float">
            <text:p>3,722,082</text:p>
          </table:table-cell>
          <table:table-cell table:style-name="ce1" office:value-type="float" office:value="3291596" calcext:value-type="float">
            <text:p>3291596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regex</text:p>
          </table:table-cell>
          <table:table-cell table:style-name="ce7" office:value-type="float" office:value="649" calcext:value-type="float">
            <text:p>649</text:p>
          </table:table-cell>
          <table:table-cell table:style-name="ce1" office:value-type="float" office:value="648742000" calcext:value-type="float">
            <text:p>648742000</text:p>
          </table:table-cell>
          <table:table-cell table:style-name="ce7" office:value-type="float" office:value="4767084" calcext:value-type="float">
            <text:p>4,767,084</text:p>
          </table:table-cell>
          <table:table-cell table:style-name="ce1" office:value-type="float" office:value="489354" calcext:value-type="float">
            <text:p>489354</text:p>
          </table:table-cell>
          <table:table-cell table:style-name="ce1" office:value-type="float" office:value="6528" calcext:value-type="float">
            <text:p>65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malloc</text:p>
          </table:table-cell>
          <table:table-cell table:style-name="ce7" office:value-type="float" office:value="22301" calcext:value-type="float">
            <text:p>22,301</text:p>
          </table:table-cell>
          <table:table-cell table:style-name="ce1" office:value-type="float" office:value="22300790000" calcext:value-type="float">
            <text:p>22300790000</text:p>
          </table:table-cell>
          <table:table-cell table:style-name="ce7" office:value-type="float" office:value="4981834" calcext:value-type="float">
            <text:p>4,981,834</text:p>
          </table:table-cell>
          <table:table-cell table:style-name="ce1" office:value-type="float" office:value="14191189" calcext:value-type="float">
            <text:p>14191189</text:p>
          </table:table-cell>
          <table:table-cell table:style-name="ce1" office:value-type="float" office:value="17184" calcext:value-type="float">
            <text:p>17184</text:p>
          </table:table-cell>
          <table:table-cell table:style-name="ce1"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string</text:p>
          </table:table-cell>
          <table:table-cell table:style-name="ce7" office:value-type="float" office:value="27773" calcext:value-type="float">
            <text:p>27,773</text:p>
          </table:table-cell>
          <table:table-cell table:style-name="ce1" office:value-type="float" office:value="27772513000" calcext:value-type="float">
            <text:p>27772513000</text:p>
          </table:table-cell>
          <table:table-cell table:style-name="ce7" office:value-type="float" office:value="4348922" calcext:value-type="float">
            <text:p>4,348,922</text:p>
          </table:table-cell>
          <table:table-cell table:style-name="ce1" office:value-type="float" office:value="25663217" calcext:value-type="float">
            <text:p>25663217</text:p>
          </table:table-cell>
          <table:table-cell table:style-name="ce1" office:value-type="float" office:value="16864" calcext:value-type="float">
            <text:p>16864</text:p>
          </table:table-cell>
          <table:table-cell table:style-name="ce1" office:value-type="float" office:value="898" calcext:value-type="float">
            <text:p>8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stdio</text:p>
          </table:table-cell>
          <table:table-cell table:style-name="ce7" office:value-type="float" office:value="6783" calcext:value-type="float">
            <text:p>6,783</text:p>
          </table:table-cell>
          <table:table-cell table:style-name="ce1" office:value-type="float" office:value="6782754000" calcext:value-type="float">
            <text:p>6782754000</text:p>
          </table:table-cell>
          <table:table-cell table:style-name="ce7" office:value-type="float" office:value="4742063" calcext:value-type="float">
            <text:p>4,742,063</text:p>
          </table:table-cell>
          <table:table-cell table:style-name="ce1" office:value-type="float" office:value="5462405" calcext:value-type="float">
            <text:p>5462405</text:p>
          </table:table-cell>
          <table:table-cell table:style-name="ce1" office:value-type="float" office:value="20096" calcext:value-type="float">
            <text:p>20096</text:p>
          </table:table-cell>
          <table:table-cell table:style-name="ce1" office:value-type="float" office:value="40004" calcext:value-type="float">
            <text:p>4000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regex</text:p>
          </table:table-cell>
          <table:table-cell table:style-name="ce7" office:value-type="float" office:value="659" calcext:value-type="float">
            <text:p>659</text:p>
          </table:table-cell>
          <table:table-cell table:style-name="ce1" office:value-type="float" office:value="659048000" calcext:value-type="float">
            <text:p>659048000</text:p>
          </table:table-cell>
          <table:table-cell table:style-name="ce7" office:value-type="float" office:value="4822287" calcext:value-type="float">
            <text:p>4,822,287</text:p>
          </table:table-cell>
          <table:table-cell table:style-name="ce1" office:value-type="float" office:value="491520" calcext:value-type="float">
            <text:p>491520</text:p>
          </table:table-cell>
          <table:table-cell table:style-name="ce1" office:value-type="float" office:value="21040" calcext:value-type="float">
            <text:p>2104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libc-bench_malloc</text:p>
          </table:table-cell>
          <table:table-cell table:style-name="ce7" office:value-type="float" office:value="22199" calcext:value-type="float">
            <text:p>22,199</text:p>
          </table:table-cell>
          <table:table-cell table:style-name="ce1" office:value-type="float" office:value="22198540000" calcext:value-type="float">
            <text:p>22198540000</text:p>
          </table:table-cell>
          <table:table-cell table:style-name="ce7" office:value-type="float" office:value="5004886" calcext:value-type="float">
            <text:p>5,004,886</text:p>
          </table:table-cell>
          <table:table-cell table:style-name="ce1" office:value-type="float" office:value="13911071" calcext:value-type="float">
            <text:p>13911071</text:p>
          </table:table-cell>
          <table:table-cell table:style-name="ce1" office:value-type="float" office:value="17184" calcext:value-type="float">
            <text:p>17184</text:p>
          </table:table-cell>
          <table:table-cell table:style-name="ce1"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libc-bench_string</text:p>
          </table:table-cell>
          <table:table-cell table:style-name="ce7" office:value-type="float" office:value="28189" calcext:value-type="float">
            <text:p>28,189</text:p>
          </table:table-cell>
          <table:table-cell table:style-name="ce1" office:value-type="float" office:value="28189012000" calcext:value-type="float">
            <text:p>28189012000</text:p>
          </table:table-cell>
          <table:table-cell table:style-name="ce7" office:value-type="float" office:value="4415465" calcext:value-type="float">
            <text:p>4,415,465</text:p>
          </table:table-cell>
          <table:table-cell table:style-name="ce1" office:value-type="float" office:value="25648657" calcext:value-type="float">
            <text:p>25648657</text:p>
          </table:table-cell>
          <table:table-cell table:style-name="ce1" office:value-type="float" office:value="16864" calcext:value-type="float">
            <text:p>16864</text:p>
          </table:table-cell>
          <table:table-cell table:style-name="ce1" office:value-type="float" office:value="898" calcext:value-type="float">
            <text:p>8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libc-bench_stdio</text:p>
          </table:table-cell>
          <table:table-cell table:style-name="ce7" office:value-type="float" office:value="549" calcext:value-type="float">
            <text:p>549</text:p>
          </table:table-cell>
          <table:table-cell table:style-name="ce1" office:value-type="float" office:value="5490179000" calcext:value-type="float">
            <text:p>5490179000</text:p>
          </table:table-cell>
          <table:table-cell table:style-name="ce7" office:value-type="float" office:value="4059598" calcext:value-type="float">
            <text:p>4,059,598</text:p>
          </table:table-cell>
          <table:table-cell table:style-name="ce1" office:value-type="float" office:value="4829153" calcext:value-type="float">
            <text:p>4829153</text:p>
          </table:table-cell>
          <table:table-cell table:style-name="ce1" office:value-type="float" office:value="20096" calcext:value-type="float">
            <text:p>20096</text:p>
          </table:table-cell>
          <table:table-cell table:style-name="ce1" office:value-type="float" office:value="40004" calcext:value-type="float">
            <text:p>4000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1" office:value-type="string" calcext:value-type="string">
            <text:p>libc-bench_regex</text:p>
          </table:table-cell>
          <table:table-cell table:style-name="ce7" office:value-type="float" office:value="66" calcext:value-type="float">
            <text:p>66</text:p>
          </table:table-cell>
          <table:table-cell table:style-name="ce1" office:value-type="float" office:value="659575000" calcext:value-type="float">
            <text:p>659575000</text:p>
          </table:table-cell>
          <table:table-cell table:style-name="ce7" office:value-type="float" office:value="4831287" calcext:value-type="float">
            <text:p>4,831,287</text:p>
          </table:table-cell>
          <table:table-cell table:style-name="ce1" office:value-type="float" office:value="490990" calcext:value-type="float">
            <text:p>490990</text:p>
          </table:table-cell>
          <table:table-cell table:style-name="ce1" office:value-type="float" office:value="21040" calcext:value-type="float">
            <text:p>2104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_data_16K_stack" table:style-name="ta4">
        <table:table-column table:style-name="co15" table:number-columns-repeated="2" table:default-cell-style-name="Default"/>
        <table:table-column table:style-name="co18" table:default-cell-style-name="Default"/>
        <table:table-column table:style-name="co15" table:number-columns-repeated="1021" table:default-cell-style-name="Default"/>
        <table:table-row table:style-name="ro1"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encap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imSeconds</text:p>
          </table:table-cell>
          <table:table-cell table:style-name="ce1" office:value-type="string" calcext:value-type="string">
            <text:p>simTicks</text:p>
          </table:table-cell>
          <table:table-cell table:style-name="ce1" office:value-type="string" calcext:value-type="string">
            <text:p>system.cpu.cpi</text:p>
          </table:table-cell>
          <table:table-cell table:style-name="ce1" office:value-type="string" calcext:value-type="string">
            <text:p>sail.Instructions</text:p>
          </table:table-cell>
          <table:table-cell table:style-name="ce1" office:value-type="string" calcext:value-type="string">
            <text:p>guest.stack.pressure.16K</text:p>
          </table:table-cell>
          <table:table-cell table:style-name="ce1" office:value-type="string" calcext:value-type="string">
            <text:p>secureCall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coremark</text:p>
          </table:table-cell>
          <table:table-cell table:style-name="ce7" office:value-type="float" office:value="23932" calcext:value-type="float">
            <text:p>23,932</text:p>
          </table:table-cell>
          <table:table-cell table:style-name="ce1" office:value-type="float" office:value="23931926000" calcext:value-type="float">
            <text:p>23931926000</text:p>
          </table:table-cell>
          <table:table-cell table:style-name="ce7" office:value-type="float" office:value="10201979" calcext:value-type="float">
            <text:p>10,201,979</text:p>
          </table:table-cell>
          <table:table-cell table:style-name="ce1" office:value-type="float" office:value="22223379" calcext:value-type="float">
            <text:p>22223379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oremark</text:p>
          </table:table-cell>
          <table:table-cell table:style-name="ce7" office:value-type="float" office:value="23932" calcext:value-type="float">
            <text:p>23,932</text:p>
          </table:table-cell>
          <table:table-cell table:style-name="ce1" office:value-type="float" office:value="23932090000" calcext:value-type="float">
            <text:p>23932090000</text:p>
          </table:table-cell>
          <table:table-cell table:style-name="ce7" office:value-type="float" office:value="10201959" calcext:value-type="float">
            <text:p>10,201,959</text:p>
          </table:table-cell>
          <table:table-cell table:style-name="ce1" office:value-type="float" office:value="22223463" calcext:value-type="float">
            <text:p>22223463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coremark</text:p>
          </table:table-cell>
          <table:table-cell table:style-name="ce7" office:value-type="float" office:value="24808" calcext:value-type="float">
            <text:p>24,808</text:p>
          </table:table-cell>
          <table:table-cell table:style-name="ce1" office:value-type="float" office:value="24807779000" calcext:value-type="float">
            <text:p>24807779000</text:p>
          </table:table-cell>
          <table:table-cell table:style-name="ce7" office:value-type="float" office:value="8650949" calcext:value-type="float">
            <text:p>8,650,949</text:p>
          </table:table-cell>
          <table:table-cell table:style-name="ce1" office:value-type="float" office:value="23204150" calcext:value-type="float">
            <text:p>23204150</text:p>
          </table:table-cell>
          <table:table-cell table:style-name="ce1" office:value-type="float" office:value="4784" calcext:value-type="float">
            <text:p>47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coremark</text:p>
          </table:table-cell>
          <table:table-cell table:style-name="ce7" office:value-type="float" office:value="24807" calcext:value-type="float">
            <text:p>24,807</text:p>
          </table:table-cell>
          <table:table-cell table:style-name="ce1" office:value-type="float" office:value="24807475000" calcext:value-type="float">
            <text:p>24807475000</text:p>
          </table:table-cell>
          <table:table-cell table:style-name="ce7" office:value-type="float" office:value="865078" calcext:value-type="float">
            <text:p>865,078</text:p>
          </table:table-cell>
          <table:table-cell table:style-name="ce1" office:value-type="float" office:value="23204234" calcext:value-type="float">
            <text:p>23204234</text:p>
          </table:table-cell>
          <table:table-cell table:style-name="ce1" office:value-type="float" office:value="4784" calcext:value-type="float">
            <text:p>47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malloc</text:p>
          </table:table-cell>
          <table:table-cell table:style-name="ce7" office:value-type="float" office:value="61" calcext:value-type="float">
            <text:p>61</text:p>
          </table:table-cell>
          <table:table-cell table:style-name="ce1" office:value-type="float" office:value="609882000" calcext:value-type="float">
            <text:p>609882000</text:p>
          </table:table-cell>
          <table:table-cell table:style-name="ce7" office:value-type="float" office:value="4892649" calcext:value-type="float">
            <text:p>4,892,649</text:p>
          </table:table-cell>
          <table:table-cell table:style-name="ce1" office:value-type="float" office:value="461815" calcext:value-type="float">
            <text:p>461815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string</text:p>
          </table:table-cell>
          <table:table-cell table:style-name="ce7" office:value-type="float" office:value="83882" calcext:value-type="float">
            <text:p>83,882</text:p>
          </table:table-cell>
          <table:table-cell table:style-name="ce1" office:value-type="float" office:value="83882001000" calcext:value-type="float">
            <text:p>83882001000</text:p>
          </table:table-cell>
          <table:table-cell table:style-name="ce7" office:value-type="float" office:value="4487921" calcext:value-type="float">
            <text:p>4,487,921</text:p>
          </table:table-cell>
          <table:table-cell table:style-name="ce1" office:value-type="float" office:value="74861156" calcext:value-type="float">
            <text:p>74861156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stdio</text:p>
          </table:table-cell>
          <table:table-cell table:style-name="ce7" office:value-type="float" office:value="2903" calcext:value-type="float">
            <text:p>2,903</text:p>
          </table:table-cell>
          <table:table-cell table:style-name="ce1" office:value-type="float" office:value="2903414000" calcext:value-type="float">
            <text:p>2903414000</text:p>
          </table:table-cell>
          <table:table-cell table:style-name="ce7" office:value-type="float" office:value="4401594" calcext:value-type="float">
            <text:p>4,401,594</text:p>
          </table:table-cell>
          <table:table-cell table:style-name="ce1" office:value-type="float" office:value="2541428" calcext:value-type="float">
            <text:p>2541428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regex</text:p>
          </table:table-cell>
          <table:table-cell table:style-name="ce7" office:value-type="float" office:value="568" calcext:value-type="float">
            <text:p>568</text:p>
          </table:table-cell>
          <table:table-cell table:style-name="ce1" office:value-type="float" office:value="568371000" calcext:value-type="float">
            <text:p>568371000</text:p>
          </table:table-cell>
          <table:table-cell table:style-name="ce7" office:value-type="float" office:value="5456913" calcext:value-type="float">
            <text:p>5,456,913</text:p>
          </table:table-cell>
          <table:table-cell table:style-name="ce1" office:value-type="float" office:value="425390" calcext:value-type="float">
            <text:p>42539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malloc</text:p>
          </table:table-cell>
          <table:table-cell table:style-name="ce7" office:value-type="float" office:value="704" calcext:value-type="float">
            <text:p>704</text:p>
          </table:table-cell>
          <table:table-cell table:style-name="ce1" office:value-type="float" office:value="704203000" calcext:value-type="float">
            <text:p>704203000</text:p>
          </table:table-cell>
          <table:table-cell table:style-name="ce7" office:value-type="float" office:value="5164608" calcext:value-type="float">
            <text:p>5,164,608</text:p>
          </table:table-cell>
          <table:table-cell table:style-name="ce1" office:value-type="float" office:value="531055" calcext:value-type="float">
            <text:p>531055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string</text:p>
          </table:table-cell>
          <table:table-cell table:style-name="ce7" office:value-type="float" office:value="81776" calcext:value-type="float">
            <text:p>81,776</text:p>
          </table:table-cell>
          <table:table-cell table:style-name="ce1" office:value-type="float" office:value="81775857000" calcext:value-type="float">
            <text:p>81775857000</text:p>
          </table:table-cell>
          <table:table-cell table:style-name="ce7" office:value-type="float" office:value="4374719" calcext:value-type="float">
            <text:p>4,374,719</text:p>
          </table:table-cell>
          <table:table-cell table:style-name="ce1" office:value-type="float" office:value="74874120" calcext:value-type="float">
            <text:p>74874120</text:p>
          </table:table-cell>
          <table:table-cell table:style-name="ce1" office:value-type="float" office:value="16848" calcext:value-type="float">
            <text:p>16848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stdio</text:p>
          </table:table-cell>
          <table:table-cell table:style-name="ce7" office:value-type="float" office:value="7317" calcext:value-type="float">
            <text:p>7,317</text:p>
          </table:table-cell>
          <table:table-cell table:style-name="ce1" office:value-type="float" office:value="7317412000" calcext:value-type="float">
            <text:p>7317412000</text:p>
          </table:table-cell>
          <table:table-cell table:style-name="ce7" office:value-type="float" office:value="5612131" calcext:value-type="float">
            <text:p>5,612,131</text:p>
          </table:table-cell>
          <table:table-cell table:style-name="ce1" office:value-type="float" office:value="6058871" calcext:value-type="float">
            <text:p>6058871</text:p>
          </table:table-cell>
          <table:table-cell table:style-name="ce1" office:value-type="float" office:value="20096" calcext:value-type="float">
            <text:p>20096</text:p>
          </table:table-cell>
          <table:table-cell table:style-name="ce1" office:value-type="float" office:value="40004" calcext:value-type="float">
            <text:p>4000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regex</text:p>
          </table:table-cell>
          <table:table-cell table:style-name="ce7" office:value-type="float" office:value="573" calcext:value-type="float">
            <text:p>573</text:p>
          </table:table-cell>
          <table:table-cell table:style-name="ce1" office:value-type="float" office:value="573216000" calcext:value-type="float">
            <text:p>573216000</text:p>
          </table:table-cell>
          <table:table-cell table:style-name="ce7" office:value-type="float" office:value="5484395" calcext:value-type="float">
            <text:p>5,484,395</text:p>
          </table:table-cell>
          <table:table-cell table:style-name="ce1" office:value-type="float" office:value="427052" calcext:value-type="float">
            <text:p>427052</text:p>
          </table:table-cell>
          <table:table-cell table:style-name="ce1" office:value-type="float" office:value="5230" calcext:value-type="float">
            <text:p>52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malloc</text:p>
          </table:table-cell>
          <table:table-cell table:style-name="ce7" office:value-type="float" office:value="71" calcext:value-type="float">
            <text:p>71</text:p>
          </table:table-cell>
          <table:table-cell table:style-name="ce1" office:value-type="float" office:value="710200000" calcext:value-type="float">
            <text:p>710200000</text:p>
          </table:table-cell>
          <table:table-cell table:style-name="ce7" office:value-type="float" office:value="4306951" calcext:value-type="float">
            <text:p>4,306,951</text:p>
          </table:table-cell>
          <table:table-cell table:style-name="ce1" office:value-type="float" office:value="542431" calcext:value-type="float">
            <text:p>542431</text:p>
          </table:table-cell>
          <table:table-cell table:style-name="ce1" office:value-type="float" office:value="3344" calcext:value-type="float">
            <text:p>33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string</text:p>
          </table:table-cell>
          <table:table-cell table:style-name="ce7" office:value-type="float" office:value="85063" calcext:value-type="float">
            <text:p>85,063</text:p>
          </table:table-cell>
          <table:table-cell table:style-name="ce1" office:value-type="float" office:value="85063413000" calcext:value-type="float">
            <text:p>85063413000</text:p>
          </table:table-cell>
          <table:table-cell table:style-name="ce7" office:value-type="float" office:value="4262715" calcext:value-type="float">
            <text:p>4,262,715</text:p>
          </table:table-cell>
          <table:table-cell table:style-name="ce1" office:value-type="float" office:value="77390492" calcext:value-type="float">
            <text:p>77390492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stdio</text:p>
          </table:table-cell>
          <table:table-cell table:style-name="ce7" office:value-type="float" office:value="372" calcext:value-type="float">
            <text:p>372</text:p>
          </table:table-cell>
          <table:table-cell table:style-name="ce1" office:value-type="float" office:value="3720137000" calcext:value-type="float">
            <text:p>3720137000</text:p>
          </table:table-cell>
          <table:table-cell table:style-name="ce7" office:value-type="float" office:value="3670898" calcext:value-type="float">
            <text:p>3,670,898</text:p>
          </table:table-cell>
          <table:table-cell table:style-name="ce1" office:value-type="float" office:value="3246652" calcext:value-type="float">
            <text:p>3246652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libc-bench_regex</text:p>
          </table:table-cell>
          <table:table-cell table:style-name="ce7" office:value-type="float" office:value="653" calcext:value-type="float">
            <text:p>653</text:p>
          </table:table-cell>
          <table:table-cell table:style-name="ce1" office:value-type="float" office:value="653431000" calcext:value-type="float">
            <text:p>653431000</text:p>
          </table:table-cell>
          <table:table-cell table:style-name="ce7" office:value-type="float" office:value="4803537" calcext:value-type="float">
            <text:p>4,803,537</text:p>
          </table:table-cell>
          <table:table-cell table:style-name="ce1" office:value-type="float" office:value="489169" calcext:value-type="float">
            <text:p>489169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malloc</text:p>
          </table:table-cell>
          <table:table-cell table:style-name="ce7" office:value-type="float" office:value="812" calcext:value-type="float">
            <text:p>812</text:p>
          </table:table-cell>
          <table:table-cell table:style-name="ce1" office:value-type="float" office:value="812284000" calcext:value-type="float">
            <text:p>812284000</text:p>
          </table:table-cell>
          <table:table-cell table:style-name="ce7" office:value-type="float" office:value="4513213" calcext:value-type="float">
            <text:p>4,513,213</text:p>
          </table:table-cell>
          <table:table-cell table:style-name="ce1" office:value-type="float" office:value="618439" calcext:value-type="float">
            <text:p>618439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string</text:p>
          </table:table-cell>
          <table:table-cell table:style-name="ce7" office:value-type="float" office:value="85029" calcext:value-type="float">
            <text:p>85,029</text:p>
          </table:table-cell>
          <table:table-cell table:style-name="ce1" office:value-type="float" office:value="85029408000" calcext:value-type="float">
            <text:p>85029408000</text:p>
          </table:table-cell>
          <table:table-cell table:style-name="ce7" office:value-type="float" office:value="426036" calcext:value-type="float">
            <text:p>426,036</text:p>
          </table:table-cell>
          <table:table-cell table:style-name="ce1" office:value-type="float" office:value="77405136" calcext:value-type="float">
            <text:p>77405136</text:p>
          </table:table-cell>
          <table:table-cell table:style-name="ce1" office:value-type="float" office:value="16848" calcext:value-type="float">
            <text:p>16848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stdio</text:p>
          </table:table-cell>
          <table:table-cell table:style-name="ce7" office:value-type="float" office:value="9052" calcext:value-type="float">
            <text:p>9,052</text:p>
          </table:table-cell>
          <table:table-cell table:style-name="ce1" office:value-type="float" office:value="9051909000" calcext:value-type="float">
            <text:p>9051909000</text:p>
          </table:table-cell>
          <table:table-cell table:style-name="ce7" office:value-type="float" office:value="448067" calcext:value-type="float">
            <text:p>448,067</text:p>
          </table:table-cell>
          <table:table-cell table:style-name="ce1" office:value-type="float" office:value="7493282" calcext:value-type="float">
            <text:p>7493282</text:p>
          </table:table-cell>
          <table:table-cell table:style-name="ce1" office:value-type="float" office:value="20096" calcext:value-type="float">
            <text:p>20096</text:p>
          </table:table-cell>
          <table:table-cell table:style-name="ce1" office:value-type="float" office:value="40004" calcext:value-type="float">
            <text:p>4000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libc-bench_regex</text:p>
          </table:table-cell>
          <table:table-cell table:style-name="ce7" office:value-type="float" office:value="667" calcext:value-type="float">
            <text:p>667</text:p>
          </table:table-cell>
          <table:table-cell table:style-name="ce1" office:value-type="float" office:value="666921000" calcext:value-type="float">
            <text:p>666921000</text:p>
          </table:table-cell>
          <table:table-cell table:style-name="ce7" office:value-type="float" office:value="4882377" calcext:value-type="float">
            <text:p>4,882,377</text:p>
          </table:table-cell>
          <table:table-cell table:style-name="ce1" office:value-type="float" office:value="491241" calcext:value-type="float">
            <text:p>491241</text:p>
          </table:table-cell>
          <table:table-cell table:style-name="ce1" office:value-type="float" office:value="5230" calcext:value-type="float">
            <text:p>52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m5 cycles" table:style-name="ta5">
        <table:table-column table:style-name="co19" table:default-cell-style-name="Default"/>
        <table:table-column table:style-name="co20" table:default-cell-style-name="Default"/>
        <table:table-column table:style-name="co21" table:number-columns-repeated="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number-columns-repeated="995" table:default-cell-style-name="Default"/>
        <table:table-row table:style-name="ro1">
          <table:table-cell/>
          <table:table-cell table:style-name="ce8" table:number-columns-repeated="14"/>
          <table:table-cell/>
          <table:table-cell table:style-name="ce26" office:value-type="string" calcext:value-type="string" table:number-columns-spanned="11" table:number-rows-spanned="1">
            <text:p>Overheads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Stack Revocatio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one</text:p>
          </table:table-cell>
          <table:table-cell table:number-columns-repeated="11" table:style-name="ce9" office:value-type="string" calcext:value-type="string">
            <text:p>uninit</text:p>
          </table:table-cell>
          <table:table-cell table:style-name="ce8" office:value-type="string" calcext:value-type="string">
            <text:p>uninit</text:p>
          </table:table-cell>
          <table:table-cell table:style-name="ce23" office:value-type="string" calcext:value-type="string" table:number-columns-spanned="1" table:number-rows-spanned="6">
            <text:p>Secure calls per 1000 insts</text:p>
          </table:table-cell>
          <table:table-cell table:style-name="ce26" office:value-type="string" calcext:value-type="string" table:number-columns-spanned="11" table:number-rows-spanned="1">
            <text:p>Uninit</text:p>
          </table:table-cell>
          <table:covered-table-cell table:number-columns-repeated="10"/>
          <table:table-cell/>
          <table:table-cell table:style-name="ce23" office:value-type="string" calcext:value-type="string" table:number-columns-spanned="1" table:number-rows-spanned="5">
            <text:p>Encapsulation Comparison (Negative = in favor of Indirect Sentry)</text:p>
          </table:table-cell>
          <table:table-cell table:style-name="ce23" table:number-columns-spanned="1" table:number-rows-spanned="5"/>
          <table:table-cell table:number-columns-repeated="994"/>
        </table:table-row>
        <table:table-row table:style-name="ro1">
          <table:table-cell table:style-name="ce2" office:value-type="string" calcext:value-type="string">
            <text:p>Reserve stack</text:p>
          </table:table-cell>
          <table:table-cell table:style-name="ce9" office:value-type="string" calcext:value-type="string">
            <text:p>N</text:p>
          </table:table-cell>
          <table:table-cell table:number-columns-repeated="6" table:style-name="ce9" office:value-type="string" calcext:value-type="string">
            <text:p>none</text:p>
          </table:table-cell>
          <table:table-cell table:number-columns-repeated="6" table:style-name="ce9" office:value-type="string" calcext:value-type="string">
            <text:p>reserve</text:p>
          </table:table-cell>
          <table:table-cell table:style-name="ce8" office:value-type="string" calcext:value-type="string">
            <text:p>reserve</text:p>
          </table:table-cell>
          <table:covered-table-cell/>
          <table:table-cell table:style-name="ce27" table:number-columns-repeated="2"/>
          <table:table-cell table:style-name="ce8" table:number-columns-repeated="3"/>
          <table:table-cell table:style-name="ce36" office:value-type="string" calcext:value-type="string" table:number-columns-spanned="6" table:number-rows-spanned="1">
            <text:p>Reserve</text:p>
          </table:table-cell>
          <table:covered-table-cell table:number-columns-repeated="4"/>
          <table:covered-table-cell table:style-name="ce42"/>
          <table:table-cell/>
          <table:covered-table-cell table:number-columns-repeated="2"/>
          <table:table-cell table:number-columns-repeated="994"/>
        </table:table-row>
        <table:table-row table:style-name="ro1">
          <table:table-cell table:style-name="ce2" office:value-type="string" calcext:value-type="string">
            <text:p>Return Encapsulation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9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trampoline</text:p>
          </table:table-cell>
          <table:table-cell table:number-columns-repeated="2" table:style-name="ce9" office:value-type="string" calcext:value-type="string">
            <text:p>isentry</text:p>
          </table:table-cell>
          <table:table-cell table:style-name="ce9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trampoline</text:p>
          </table:table-cell>
          <table:table-cell table:number-columns-repeated="3" table:style-name="ce9" office:value-type="string" calcext:value-type="string">
            <text:p>isentry</text:p>
          </table:table-cell>
          <table:table-cell table:style-name="ce8" office:value-type="string" calcext:value-type="string">
            <text:p>isentry</text:p>
          </table:table-cell>
          <table:covered-table-cell/>
          <table:table-cell table:style-name="ce27"/>
          <table:table-cell table:style-name="ce30" office:value-type="string" calcext:value-type="string" table:number-columns-spanned="2" table:number-rows-spanned="1">
            <text:p>Trampoline</text:p>
          </table:table-cell>
          <table:covered-table-cell table:style-name="ce31"/>
          <table:table-cell table:style-name="ce35" office:value-type="string" calcext:value-type="string" table:number-columns-spanned="2" table:number-rows-spanned="1">
            <text:p>Isentry</text:p>
          </table:table-cell>
          <table:covered-table-cell table:style-name="ce31"/>
          <table:table-cell table:style-name="ce27"/>
          <table:table-cell table:style-name="ce37" office:value-type="string" calcext:value-type="string" table:number-columns-spanned="2" table:number-rows-spanned="1">
            <text:p>Trampoline</text:p>
          </table:table-cell>
          <table:covered-table-cell table:style-name="ce31"/>
          <table:table-cell table:style-name="ce41" office:value-type="string" calcext:value-type="string" table:number-columns-spanned="3" table:number-rows-spanned="1">
            <text:p>Isentry</text:p>
          </table:table-cell>
          <table:covered-table-cell/>
          <table:covered-table-cell table:style-name="ce42"/>
          <table:table-cell/>
          <table:covered-table-cell table:number-columns-repeated="2"/>
          <table:table-cell table:number-columns-repeated="994"/>
        </table:table-row>
        <table:table-row table:style-name="ro1">
          <table:table-cell table:style-name="ce2" office:value-type="string" calcext:value-type="string">
            <text:p>Clear Registers</text:p>
          </table:table-cell>
          <table:table-cell table:style-name="ce9" office:value-type="string" calcext:value-type="string">
            <text:p>C</text:p>
          </table:table-cell>
          <table:table-cell table:number-columns-repeated="3"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number-columns-repeated="2"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noclear</text:p>
          </table:table-cell>
          <table:table-cell table:number-columns-repeated="2" table:style-name="ce9" office:value-type="string" calcext:value-type="string">
            <text:p>clear</text:p>
          </table:table-cell>
          <table:table-cell table:style-name="ce8" office:value-type="string" calcext:value-type="string">
            <text:p>clear</text:p>
          </table:table-cell>
          <table:covered-table-cell/>
          <table:table-cell table:style-name="ce27" table:number-columns-repeated="2"/>
          <table:table-cell table:style-name="ce32" office:value-type="string" calcext:value-type="string">
            <text:p>Clear</text:p>
          </table:table-cell>
          <table:table-cell table:style-name="ce8"/>
          <table:table-cell table:style-name="ce8" office:value-type="string" calcext:value-type="string">
            <text:p>Clear</text:p>
          </table:table-cell>
          <table:table-cell table:style-name="ce27"/>
          <table:table-cell table:style-name="ce38"/>
          <table:table-cell table:style-name="ce32" office:value-type="string" calcext:value-type="string">
            <text:p>Clear</text:p>
          </table:table-cell>
          <table:table-cell table:style-name="ce8"/>
          <table:table-cell table:style-name="ce8" office:value-type="string" calcext:value-type="string">
            <text:p>Clear</text:p>
          </table:table-cell>
          <table:table-cell table:style-name="ce43"/>
          <table:table-cell/>
          <table:covered-table-cell table:number-columns-repeated="2"/>
          <table:table-cell table:number-columns-repeated="994"/>
        </table:table-row>
        <table:table-row table:style-name="ro1">
          <table:table-cell table:style-name="ce2" office:value-type="string" calcext:value-type="string">
            <text:p>Reduce callee-saved registers</text:p>
          </table:table-cell>
          <table:table-cell table:style-name="ce9" office:value-type="string" calcext:value-type="string">
            <text:p>O</text:p>
          </table:table-cell>
          <table:table-cell table:number-columns-repeated="11" table:style-name="ce9" office:value-type="string" calcext:value-type="string">
            <text:p>reduce</text:p>
          </table:table-cell>
          <table:table-cell table:style-name="ce9" office:value-type="string" calcext:value-type="string">
            <text:p>noreduce</text:p>
          </table:table-cell>
          <table:table-cell table:style-name="ce8" office:value-type="string" calcext:value-type="string">
            <text:p>reduce</text:p>
          </table:table-cell>
          <table:covered-table-cell/>
          <table:table-cell table:style-name="ce27" table:number-columns-repeated="2"/>
          <table:table-cell table:style-name="ce32"/>
          <table:table-cell table:style-name="ce8" table:number-columns-repeated="2"/>
          <table:table-cell table:style-name="ce27"/>
          <table:table-cell table:style-name="ce38"/>
          <table:table-cell table:style-name="ce32"/>
          <table:table-cell table:style-name="ce8" table:number-columns-repeated="2"/>
          <table:table-cell table:style-name="ce43" office:value-type="string" calcext:value-type="string">
            <text:p>Noreduce</text:p>
          </table:table-cell>
          <table:table-cell/>
          <table:covered-table-cell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8" office:value-type="string" calcext:value-type="string">
            <text:p>D</text:p>
          </table:table-cell>
          <table:table-cell table:number-columns-repeated="11"/>
          <table:table-cell table:style-name="ce1"/>
          <table:table-cell table:style-name="ce1" office:value-type="string" calcext:value-type="string">
            <text:p>Secure calls</text:p>
          </table:table-cell>
          <table:covered-table-cell/>
          <table:table-cell table:style-name="ce28" table:number-columns-repeated="2"/>
          <table:table-cell table:style-name="ce33"/>
          <table:table-cell table:number-columns-repeated="2"/>
          <table:table-cell table:style-name="ce28"/>
          <table:table-cell table:style-name="ce39"/>
          <table:table-cell table:style-name="ce33"/>
          <table:table-cell table:number-columns-repeated="2"/>
          <table:table-cell table:style-name="ce44"/>
          <table:table-cell table:number-columns-repeated="997"/>
        </table:table-row>
        <table:table-row table:style-name="ro1">
          <table:table-cell table:style-name="ce4" table:formula="of:=IFERROR(__xludf.dummyfunction(&quot;UNIQUE(FILTER(INDIRECT($D$21),INDIRECT($D$21)&lt;&gt;&quot;&quot;&quot;&quot;))&quot;);&quot;coremark&quot;)" office:value-type="string" office:string-value="coremark" calcext:value-type="string">
            <text:p>coremark</text:p>
          </table:table-cell>
          <table:table-cell table:style-name="ce10"/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C$2:C$6,$B$2:$B$6,LAMBDA(value,column,column&amp;&quot;&quot;='&quot;&quot;&amp;value&amp;&quot;&quot;'&quot;&quot;)),LAMBDA(acc,val,acc&amp;&quot;&quot; AND &quot;&quot;&amp;val))&amp;&quot;&quot;)&quot;&quot;)&quot;);24631345000)" office:value-type="float" office:value="24631345000" calcext:value-type="float">
            <text:p>2.4631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D$2:D$6,$B$2:$B$6,LAMBDA(value,column,column&amp;&quot;&quot;='&quot;&quot;&amp;value&amp;&quot;&quot;'&quot;&quot;)),LAMBDA(acc,val,acc&amp;&quot;&quot; AND &quot;&quot;&amp;val))&amp;&quot;&quot;)&quot;&quot;)&quot;);24599032000)" office:value-type="float" office:value="24599032000" calcext:value-type="float">
            <text:p>2.4599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E$2:E$6,$B$2:$B$6,LAMBDA(value,column,column&amp;&quot;&quot;='&quot;&quot;&amp;value&amp;&quot;&quot;'&quot;&quot;)),LAMBDA(acc,val,acc&amp;&quot;&quot; AND &quot;&quot;&amp;val))&amp;&quot;&quot;)&quot;&quot;)&quot;);24998163000)" office:value-type="float" office:value="24998163000" calcext:value-type="float">
            <text:p>2.4998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F$2:F$6,$B$2:$B$6,LAMBDA(value,column,column&amp;&quot;&quot;='&quot;&quot;&amp;value&amp;&quot;&quot;'&quot;&quot;)),LAMBDA(acc,val,acc&amp;&quot;&quot; AND &quot;&quot;&amp;val))&amp;&quot;&quot;)&quot;&quot;)&quot;);24900983000)" office:value-type="float" office:value="24900983000" calcext:value-type="float">
            <text:p>2.4901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G$2:G$6,$B$2:$B$6,LAMBDA(value,column,column&amp;&quot;&quot;='&quot;&quot;&amp;value&amp;&quot;&quot;'&quot;&quot;)),LAMBDA(acc,val,acc&amp;&quot;&quot; AND &quot;&quot;&amp;val))&amp;&quot;&quot;)&quot;&quot;)&quot;);25115979000)" office:value-type="float" office:value="25115979000" calcext:value-type="float">
            <text:p>2.5116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H$2:H$6,$B$2:$B$6,LAMBDA(value,column,column&amp;&quot;&quot;='&quot;&quot;&amp;value&amp;&quot;&quot;'&quot;&quot;)),LAMBDA(acc,val,acc&amp;&quot;&quot; AND &quot;&quot;&amp;val))&amp;&quot;&quot;)&quot;&quot;)&quot;);24813294500)" office:value-type="float" office:value="24813294500" calcext:value-type="float">
            <text:p>2.4813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I$2:I$6,$B$2:$B$6,LAMBDA(value,column,column&amp;&quot;&quot;='&quot;&quot;&amp;value&amp;&quot;&quot;'&quot;&quot;)),LAMBDA(acc,val,acc&amp;&quot;&quot; AND &quot;&quot;&amp;val))&amp;&quot;&quot;)&quot;&quot;)&quot;);24959087000)" office:value-type="float" office:value="24959087000" calcext:value-type="float">
            <text:p>2.4959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J$2:J$6,$B$2:$B$6,LAMBDA(value,column,column&amp;&quot;&quot;='&quot;&quot;&amp;value&amp;&quot;&quot;'&quot;&quot;)),LAMBDA(acc,val,acc&amp;&quot;&quot; AND &quot;&quot;&amp;val))&amp;&quot;&quot;)&quot;&quot;)&quot;);25022025000)" office:value-type="float" office:value="25022025000" calcext:value-type="float">
            <text:p>2.5022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K$2:K$6,$B$2:$B$6,LAMBDA(value,column,column&amp;&quot;&quot;='&quot;&quot;&amp;value&amp;&quot;&quot;'&quot;&quot;)),LAMBDA(acc,val,acc&amp;&quot;&quot; AND &quot;&quot;&amp;val))&amp;&quot;&quot;)&quot;&quot;)&quot;);25409478000)" office:value-type="float" office:value="25409478000" calcext:value-type="float">
            <text:p>2.5409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L$2:L$6,$B$2:$B$6,LAMBDA(value,column,column&amp;&quot;&quot;='&quot;&quot;&amp;value&amp;&quot;&quot;'&quot;&quot;)),LAMBDA(acc,val,acc&amp;&quot;&quot; AND &quot;&quot;&amp;val))&amp;&quot;&quot;)&quot;&quot;)&quot;);25053861500)" office:value-type="float" office:value="25053861500" calcext:value-type="float">
            <text:p>2.5054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M$2:M$6,$B$2:$B$6,LAMBDA(value,column,column&amp;&quot;&quot;='&quot;&quot;&amp;value&amp;&quot;&quot;'&quot;&quot;)),LAMBDA(acc,val,acc&amp;&quot;&quot; AND &quot;&quot;&amp;val))&amp;&quot;&quot;)&quot;&quot;)&quot;);24996775500)" office:value-type="float" office:value="24996775500" calcext:value-type="float">
            <text:p>2.4997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8&amp;&quot;&quot;'&quot;&quot;,MAP(N$2:N$6,$B$2:$B$6,LAMBDA(value,column,column&amp;&quot;&quot;='&quot;&quot;&amp;value&amp;&quot;&quot;'&quot;&quot;)),LAMBDA(acc,val,acc&amp;&quot;&quot; AND &quot;&quot;&amp;val))&amp;&quot;&quot;)&quot;&quot;)&quot;);28123847000)" office:value-type="float" office:value="28123847000" calcext:value-type="float">
            <text:p>2.8124E+10</text:p>
          </table:table-cell>
          <table:table-cell table:style-name="ce22" table:formula="of:=IFERROR(__xludf.dummyfunction(&quot;QUERY(INDIRECT($D$20),&quot;&quot;SELECT &quot;&quot;&amp;$D$23&amp;&quot;&quot; WHERE (&quot;&quot;&amp;REDUCE($B$7&amp;&quot;&quot;='&quot;&quot;&amp;$A8&amp;&quot;&quot;'&quot;&quot;,MAP(O$2:O$6,$B$2:$B$6,LAMBDA(value,column,column&amp;&quot;&quot;='&quot;&quot;&amp;value&amp;&quot;&quot;'&quot;&quot;)),LAMBDA(acc,val,acc&amp;&quot;&quot; AND &quot;&quot;&amp;val))&amp;&quot;&quot;)&quot;&quot;)&quot;);603)" office:value-type="float" office:value="603" calcext:value-type="float">
            <text:p>603</text:p>
          </table:table-cell>
          <table:table-cell table:style-name="ce24" table:number-matrix-columns-spanned="1" table:number-matrix-rows-spanned="9" table:formula="of:=[$Instructions.P8:.P16]" office:value-type="float" office:value="0.0257224916827411" calcext:value-type="float">
            <text:p>0.0257</text:p>
          </table:table-cell>
          <table:table-cell table:style-name="ce29" table:formula="of:=([.D8]-[.C8])/[.C8]" office:value-type="percentage" office:value="-0.00131186502401716" calcext:value-type="percentage">
            <text:p>-0.13%</text:p>
          </table:table-cell>
          <table:table-cell table:style-name="ce29" table:formula="of:=([.E8]-[.D8])/[.D8]" office:value-type="percentage" office:value="0.0162254758642535" calcext:value-type="percentage">
            <text:p>1.62%</text:p>
          </table:table-cell>
          <table:table-cell table:style-name="ce34" table:formula="of:=([.F8]-[.E8])/[.E8]" office:value-type="percentage" office:value="-0.00388748565244574" calcext:value-type="percentage">
            <text:p>-0.39%</text:p>
          </table:table-cell>
          <table:table-cell table:style-name="ce5" table:formula="of:=([.G8]-[.D8])/[.D8]" office:value-type="percentage" office:value="0.0210149326201129" calcext:value-type="percentage">
            <text:p>2.10%</text:p>
          </table:table-cell>
          <table:table-cell table:style-name="ce5" table:formula="of:=([.H8]-[.G8])/[.G8]" office:value-type="percentage" office:value="-0.0120514712964205" calcext:value-type="percentage">
            <text:p>-1.21%</text:p>
          </table:table-cell>
          <table:table-cell table:style-name="ce29" table:formula="of:=([.I8]-[.D8])/[.D8]" office:value-type="percentage" office:value="0.0146369580721713" calcext:value-type="percentage">
            <text:p>1.46%</text:p>
          </table:table-cell>
          <table:table-cell table:style-name="ce40" table:formula="of:=([.J8]-[.I8])/[.I8]" office:value-type="percentage" office:value="0.00252164672529889" calcext:value-type="percentage">
            <text:p>0.25%</text:p>
          </table:table-cell>
          <table:table-cell table:style-name="ce34" table:formula="of:=([.K8]-[.J8])/[.J8]" office:value-type="percentage" office:value="0.0154844781747281" calcext:value-type="percentage">
            <text:p>1.55%</text:p>
          </table:table-cell>
          <table:table-cell table:style-name="ce5" table:formula="of:=([.L8]-[.I8])/[.I8]" office:value-type="percentage" office:value="0.00379719418422637" calcext:value-type="percentage">
            <text:p>0.38%</text:p>
          </table:table-cell>
          <table:table-cell table:style-name="ce5" table:formula="of:=([.M8]-[.L8])/[.L8]" office:value-type="percentage" office:value="-0.00227853099611012" calcext:value-type="percentage">
            <text:p>-0.23%</text:p>
          </table:table-cell>
          <table:table-cell table:style-name="ce45" table:formula="of:=([.N8]-[.M8])/[.M8]" office:value-type="percentage" office:value="0.12509899526841" calcext:value-type="percentage">
            <text:p>12.51%</text:p>
          </table:table-cell>
          <table:table-cell table:style-name="ce5"/>
          <table:table-cell table:style-name="ce5" table:formula="of:=([.$M8]-[.$K8])/[.$I8]" office:value-type="percentage" office:value="-0.01653516012024" calcext:value-type="percentage">
            <text:p>-1.65%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 table:style-name="ce4" table:formula="of:=IFERROR(__xludf.dummyfunction(&quot;&quot;&quot;COMPUTED_VALUE&quot;&quot;&quot;);&quot;libc-bench_malloc&quot;)" office:value-type="string" office:string-value="libc-bench_malloc" calcext:value-type="string">
            <text:p>libc-bench_malloc</text:p>
          </table:table-cell>
          <table:table-cell table:style-name="ce10"/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C$2:C$6,$B$2:$B$6,LAMBDA(value,column,column&amp;&quot;&quot;='&quot;&quot;&amp;value&amp;&quot;&quot;'&quot;&quot;)),LAMBDA(acc,val,acc&amp;&quot;&quot; AND &quot;&quot;&amp;val))&amp;&quot;&quot;)&quot;&quot;)&quot;);20262890000)" office:value-type="float" office:value="20262890000" calcext:value-type="float">
            <text:p>2.0263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D$2:D$6,$B$2:$B$6,LAMBDA(value,column,column&amp;&quot;&quot;='&quot;&quot;&amp;value&amp;&quot;&quot;'&quot;&quot;)),LAMBDA(acc,val,acc&amp;&quot;&quot; AND &quot;&quot;&amp;val))&amp;&quot;&quot;)&quot;&quot;)&quot;);21882971000)" office:value-type="float" office:value="21882971000" calcext:value-type="float">
            <text:p>2.1883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E$2:E$6,$B$2:$B$6,LAMBDA(value,column,column&amp;&quot;&quot;='&quot;&quot;&amp;value&amp;&quot;&quot;'&quot;&quot;)),LAMBDA(acc,val,acc&amp;&quot;&quot; AND &quot;&quot;&amp;val))&amp;&quot;&quot;)&quot;&quot;)&quot;);22438127000)" office:value-type="float" office:value="22438127000" calcext:value-type="float">
            <text:p>2.2438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F$2:F$6,$B$2:$B$6,LAMBDA(value,column,column&amp;&quot;&quot;='&quot;&quot;&amp;value&amp;&quot;&quot;'&quot;&quot;)),LAMBDA(acc,val,acc&amp;&quot;&quot; AND &quot;&quot;&amp;val))&amp;&quot;&quot;)&quot;&quot;)&quot;);22314762000)" office:value-type="float" office:value="22314762000" calcext:value-type="float">
            <text:p>2.2315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G$2:G$6,$B$2:$B$6,LAMBDA(value,column,column&amp;&quot;&quot;='&quot;&quot;&amp;value&amp;&quot;&quot;'&quot;&quot;)),LAMBDA(acc,val,acc&amp;&quot;&quot; AND &quot;&quot;&amp;val))&amp;&quot;&quot;)&quot;&quot;)&quot;);22274785000)" office:value-type="float" office:value="22274785000" calcext:value-type="float">
            <text:p>2.2275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H$2:H$6,$B$2:$B$6,LAMBDA(value,column,column&amp;&quot;&quot;='&quot;&quot;&amp;value&amp;&quot;&quot;'&quot;&quot;)),LAMBDA(acc,val,acc&amp;&quot;&quot; AND &quot;&quot;&amp;val))&amp;&quot;&quot;)&quot;&quot;)&quot;);22190127000)" office:value-type="float" office:value="22190127000" calcext:value-type="float">
            <text:p>2.2190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I$2:I$6,$B$2:$B$6,LAMBDA(value,column,column&amp;&quot;&quot;='&quot;&quot;&amp;value&amp;&quot;&quot;'&quot;&quot;)),LAMBDA(acc,val,acc&amp;&quot;&quot; AND &quot;&quot;&amp;val))&amp;&quot;&quot;)&quot;&quot;)&quot;);21885212000)" office:value-type="float" office:value="21885212000" calcext:value-type="float">
            <text:p>2.1885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J$2:J$6,$B$2:$B$6,LAMBDA(value,column,column&amp;&quot;&quot;='&quot;&quot;&amp;value&amp;&quot;&quot;'&quot;&quot;)),LAMBDA(acc,val,acc&amp;&quot;&quot; AND &quot;&quot;&amp;val))&amp;&quot;&quot;)&quot;&quot;)&quot;);22430930500)" office:value-type="float" office:value="22430930500" calcext:value-type="float">
            <text:p>2.2431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K$2:K$6,$B$2:$B$6,LAMBDA(value,column,column&amp;&quot;&quot;='&quot;&quot;&amp;value&amp;&quot;&quot;'&quot;&quot;)),LAMBDA(acc,val,acc&amp;&quot;&quot; AND &quot;&quot;&amp;val))&amp;&quot;&quot;)&quot;&quot;)&quot;);22345539500)" office:value-type="float" office:value="22345539500" calcext:value-type="float">
            <text:p>2.2346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L$2:L$6,$B$2:$B$6,LAMBDA(value,column,column&amp;&quot;&quot;='&quot;&quot;&amp;value&amp;&quot;&quot;'&quot;&quot;)),LAMBDA(acc,val,acc&amp;&quot;&quot; AND &quot;&quot;&amp;val))&amp;&quot;&quot;)&quot;&quot;)&quot;);22311393000)" office:value-type="float" office:value="22311393000" calcext:value-type="float">
            <text:p>2.2311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M$2:M$6,$B$2:$B$6,LAMBDA(value,column,column&amp;&quot;&quot;='&quot;&quot;&amp;value&amp;&quot;&quot;'&quot;&quot;)),LAMBDA(acc,val,acc&amp;&quot;&quot; AND &quot;&quot;&amp;val))&amp;&quot;&quot;)&quot;&quot;)&quot;);22232664000)" office:value-type="float" office:value="22232664000" calcext:value-type="float">
            <text:p>2.2233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9&amp;&quot;&quot;'&quot;&quot;,MAP(N$2:N$6,$B$2:$B$6,LAMBDA(value,column,column&amp;&quot;&quot;='&quot;&quot;&amp;value&amp;&quot;&quot;'&quot;&quot;)),LAMBDA(acc,val,acc&amp;&quot;&quot; AND &quot;&quot;&amp;val))&amp;&quot;&quot;)&quot;&quot;)&quot;);22226420500)" office:value-type="float" office:value="22226420500" calcext:value-type="float">
            <text:p>2.2226E+10</text:p>
          </table:table-cell>
          <table:table-cell table:style-name="ce22" table:formula="of:=IFERROR(__xludf.dummyfunction(&quot;QUERY(INDIRECT($D$20),&quot;&quot;SELECT &quot;&quot;&amp;$D$23&amp;&quot;&quot; WHERE (&quot;&quot;&amp;REDUCE($B$7&amp;&quot;&quot;='&quot;&quot;&amp;$A9&amp;&quot;&quot;'&quot;&quot;,MAP(O$2:O$6,$B$2:$B$6,LAMBDA(value,column,column&amp;&quot;&quot;='&quot;&quot;&amp;value&amp;&quot;&quot;'&quot;&quot;)),LAMBDA(acc,val,acc&amp;&quot;&quot; AND &quot;&quot;&amp;val))&amp;&quot;&quot;)&quot;&quot;)&quot;);18000)" office:value-type="float" office:value="18000" calcext:value-type="float">
            <text:p>18,000</text:p>
          </table:table-cell>
          <table:table-cell table:style-name="ce24" office:value-type="float" office:value="1.25450384303313" calcext:value-type="float">
            <text:p>1.2545</text:p>
          </table:table-cell>
          <table:table-cell table:style-name="ce29" table:formula="of:=([.D9]-[.C9])/[.C9]" office:value-type="percentage" office:value="0.079953106393017" calcext:value-type="percentage">
            <text:p>8.00%</text:p>
          </table:table-cell>
          <table:table-cell table:style-name="ce29" table:formula="of:=([.E9]-[.D9])/[.D9]" office:value-type="percentage" office:value="0.0253693157112898" calcext:value-type="percentage">
            <text:p>2.54%</text:p>
          </table:table-cell>
          <table:table-cell table:style-name="ce34" table:formula="of:=([.F9]-[.E9])/[.E9]" office:value-type="percentage" office:value="-0.00549800792196247" calcext:value-type="percentage">
            <text:p>-0.55%</text:p>
          </table:table-cell>
          <table:table-cell table:style-name="ce5" table:formula="of:=([.G9]-[.D9])/[.D9]" office:value-type="percentage" office:value="0.017904972775406" calcext:value-type="percentage">
            <text:p>1.79%</text:p>
          </table:table-cell>
          <table:table-cell table:style-name="ce5" table:formula="of:=([.H9]-[.G9])/[.G9]" office:value-type="percentage" office:value="-0.00380062029779412" calcext:value-type="percentage">
            <text:p>-0.38%</text:p>
          </table:table-cell>
          <table:table-cell table:style-name="ce29" table:formula="of:=([.I9]-[.D9])/[.D9]" office:value-type="percentage" office:value="0.000102408397835925" calcext:value-type="percentage">
            <text:p>0.01%</text:p>
          </table:table-cell>
          <table:table-cell table:style-name="ce40" table:formula="of:=([.J9]-[.I9])/[.I9]" office:value-type="percentage" office:value="0.0249354906865878" calcext:value-type="percentage">
            <text:p>2.49%</text:p>
          </table:table-cell>
          <table:table-cell table:style-name="ce34" table:formula="of:=([.K9]-[.J9])/[.J9]" office:value-type="percentage" office:value="-0.00380684162879467" calcext:value-type="percentage">
            <text:p>-0.38%</text:p>
          </table:table-cell>
          <table:table-cell table:style-name="ce5" table:formula="of:=([.L9]-[.I9])/[.I9]" office:value-type="percentage" office:value="0.0194734691169544" calcext:value-type="percentage">
            <text:p>1.95%</text:p>
          </table:table-cell>
          <table:table-cell table:style-name="ce5" table:formula="of:=([.M9]-[.L9])/[.L9]" office:value-type="percentage" office:value="-0.00352864565650383" calcext:value-type="percentage">
            <text:p>-0.35%</text:p>
          </table:table-cell>
          <table:table-cell table:style-name="ce45" table:formula="of:=([.N9]-[.M9])/[.M9]" office:value-type="percentage" office:value="-0.00028082554569259" calcext:value-type="percentage">
            <text:p>-0.03%</text:p>
          </table:table-cell>
          <table:table-cell table:style-name="ce5"/>
          <table:table-cell table:style-name="ce5" table:formula="of:=([.$M9]-[.$K9])/[.$I9]" office:value-type="percentage" office:value="-0.00515761510557905" calcext:value-type="percentage">
            <text:p>-0.52%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 table:style-name="ce4" table:formula="of:=IFERROR(__xludf.dummyfunction(&quot;&quot;&quot;COMPUTED_VALUE&quot;&quot;&quot;);&quot;libc-bench_string&quot;)" office:value-type="string" office:string-value="libc-bench_string" calcext:value-type="string">
            <text:p>libc-bench_string</text:p>
          </table:table-cell>
          <table:table-cell table:style-name="ce10"/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C$2:C$6,$B$2:$B$6,LAMBDA(value,column,column&amp;&quot;&quot;='&quot;&quot;&amp;value&amp;&quot;&quot;'&quot;&quot;)),LAMBDA(acc,val,acc&amp;&quot;&quot; AND &quot;&quot;&amp;val))&amp;&quot;&quot;)&quot;&quot;)&quot;);26672351000)" office:value-type="float" office:value="26672351000" calcext:value-type="float">
            <text:p>2.6672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D$2:D$6,$B$2:$B$6,LAMBDA(value,column,column&amp;&quot;&quot;='&quot;&quot;&amp;value&amp;&quot;&quot;'&quot;&quot;)),LAMBDA(acc,val,acc&amp;&quot;&quot; AND &quot;&quot;&amp;val))&amp;&quot;&quot;)&quot;&quot;)&quot;);27707000000)" office:value-type="float" office:value="27707000000" calcext:value-type="float">
            <text:p>2.7707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E$2:E$6,$B$2:$B$6,LAMBDA(value,column,column&amp;&quot;&quot;='&quot;&quot;&amp;value&amp;&quot;&quot;'&quot;&quot;)),LAMBDA(acc,val,acc&amp;&quot;&quot; AND &quot;&quot;&amp;val))&amp;&quot;&quot;)&quot;&quot;)&quot;);28631733000)" office:value-type="float" office:value="28631733000" calcext:value-type="float">
            <text:p>2.8632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F$2:F$6,$B$2:$B$6,LAMBDA(value,column,column&amp;&quot;&quot;='&quot;&quot;&amp;value&amp;&quot;&quot;'&quot;&quot;)),LAMBDA(acc,val,acc&amp;&quot;&quot; AND &quot;&quot;&amp;val))&amp;&quot;&quot;)&quot;&quot;)&quot;);27497865000)" office:value-type="float" office:value="27497865000" calcext:value-type="float">
            <text:p>2.7498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G$2:G$6,$B$2:$B$6,LAMBDA(value,column,column&amp;&quot;&quot;='&quot;&quot;&amp;value&amp;&quot;&quot;'&quot;&quot;)),LAMBDA(acc,val,acc&amp;&quot;&quot; AND &quot;&quot;&amp;val))&amp;&quot;&quot;)&quot;&quot;)&quot;);28599859000)" office:value-type="float" office:value="28599859000" calcext:value-type="float">
            <text:p>2.8600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H$2:H$6,$B$2:$B$6,LAMBDA(value,column,column&amp;&quot;&quot;='&quot;&quot;&amp;value&amp;&quot;&quot;'&quot;&quot;)),LAMBDA(acc,val,acc&amp;&quot;&quot; AND &quot;&quot;&amp;val))&amp;&quot;&quot;)&quot;&quot;)&quot;);27979075000)" office:value-type="float" office:value="27979075000" calcext:value-type="float">
            <text:p>2.7979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I$2:I$6,$B$2:$B$6,LAMBDA(value,column,column&amp;&quot;&quot;='&quot;&quot;&amp;value&amp;&quot;&quot;'&quot;&quot;)),LAMBDA(acc,val,acc&amp;&quot;&quot; AND &quot;&quot;&amp;val))&amp;&quot;&quot;)&quot;&quot;)&quot;);27628805000)" office:value-type="float" office:value="27628805000" calcext:value-type="float">
            <text:p>2.7629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J$2:J$6,$B$2:$B$6,LAMBDA(value,column,column&amp;&quot;&quot;='&quot;&quot;&amp;value&amp;&quot;&quot;'&quot;&quot;)),LAMBDA(acc,val,acc&amp;&quot;&quot; AND &quot;&quot;&amp;val))&amp;&quot;&quot;)&quot;&quot;)&quot;);28626978000)" office:value-type="float" office:value="28626978000" calcext:value-type="float">
            <text:p>2.8627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K$2:K$6,$B$2:$B$6,LAMBDA(value,column,column&amp;&quot;&quot;='&quot;&quot;&amp;value&amp;&quot;&quot;'&quot;&quot;)),LAMBDA(acc,val,acc&amp;&quot;&quot; AND &quot;&quot;&amp;val))&amp;&quot;&quot;)&quot;&quot;)&quot;);27722440500)" office:value-type="float" office:value="27722440500" calcext:value-type="float">
            <text:p>2.7722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L$2:L$6,$B$2:$B$6,LAMBDA(value,column,column&amp;&quot;&quot;='&quot;&quot;&amp;value&amp;&quot;&quot;'&quot;&quot;)),LAMBDA(acc,val,acc&amp;&quot;&quot; AND &quot;&quot;&amp;val))&amp;&quot;&quot;)&quot;&quot;)&quot;);28057092000)" office:value-type="float" office:value="28057092000" calcext:value-type="float">
            <text:p>2.8057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M$2:M$6,$B$2:$B$6,LAMBDA(value,column,column&amp;&quot;&quot;='&quot;&quot;&amp;value&amp;&quot;&quot;'&quot;&quot;)),LAMBDA(acc,val,acc&amp;&quot;&quot; AND &quot;&quot;&amp;val))&amp;&quot;&quot;)&quot;&quot;)&quot;);28460821000)" office:value-type="float" office:value="28460821000" calcext:value-type="float">
            <text:p>2.8461E+10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0&amp;&quot;&quot;'&quot;&quot;,MAP(N$2:N$6,$B$2:$B$6,LAMBDA(value,column,column&amp;&quot;&quot;='&quot;&quot;&amp;value&amp;&quot;&quot;'&quot;&quot;)),LAMBDA(acc,val,acc&amp;&quot;&quot; AND &quot;&quot;&amp;val))&amp;&quot;&quot;)&quot;&quot;)&quot;);28461635000)" office:value-type="float" office:value="28461635000" calcext:value-type="float">
            <text:p>2.8462E+10</text:p>
          </table:table-cell>
          <table:table-cell table:style-name="ce22" table:formula="of:=IFERROR(__xludf.dummyfunction(&quot;QUERY(INDIRECT($D$20),&quot;&quot;SELECT &quot;&quot;&amp;$D$23&amp;&quot;&quot; WHERE (&quot;&quot;&amp;REDUCE($B$7&amp;&quot;&quot;='&quot;&quot;&amp;$A10&amp;&quot;&quot;'&quot;&quot;,MAP(O$2:O$6,$B$2:$B$6,LAMBDA(value,column,column&amp;&quot;&quot;='&quot;&quot;&amp;value&amp;&quot;&quot;'&quot;&quot;)),LAMBDA(acc,val,acc&amp;&quot;&quot; AND &quot;&quot;&amp;val))&amp;&quot;&quot;)&quot;&quot;)&quot;);898)" office:value-type="float" office:value="898" calcext:value-type="float">
            <text:p>898</text:p>
          </table:table-cell>
          <table:table-cell table:style-name="ce24" office:value-type="float" office:value="0.0348671663853803" calcext:value-type="float">
            <text:p>0.0349</text:p>
          </table:table-cell>
          <table:table-cell table:style-name="ce29" table:formula="of:=([.D10]-[.C10])/[.C10]" office:value-type="percentage" office:value="0.0387910686988185" calcext:value-type="percentage">
            <text:p>3.88%</text:p>
          </table:table-cell>
          <table:table-cell table:style-name="ce29" table:formula="of:=([.E10]-[.D10])/[.D10]" office:value-type="percentage" office:value="0.0333754285920525" calcext:value-type="percentage">
            <text:p>3.34%</text:p>
          </table:table-cell>
          <table:table-cell table:style-name="ce34" table:formula="of:=([.F10]-[.E10])/[.E10]" office:value-type="percentage" office:value="-0.0396017942749047" calcext:value-type="percentage">
            <text:p>-3.96%</text:p>
          </table:table-cell>
          <table:table-cell table:style-name="ce5" table:formula="of:=([.G10]-[.D10])/[.D10]" office:value-type="percentage" office:value="0.0322250333850651" calcext:value-type="percentage">
            <text:p>3.22%</text:p>
          </table:table-cell>
          <table:table-cell table:style-name="ce5" table:formula="of:=([.H10]-[.G10])/[.G10]" office:value-type="percentage" office:value="-0.0217058412770497" calcext:value-type="percentage">
            <text:p>-2.17%</text:p>
          </table:table-cell>
          <table:table-cell table:style-name="ce29" table:formula="of:=([.I10]-[.D10])/[.D10]" office:value-type="percentage" office:value="-0.00282221099361172" calcext:value-type="percentage">
            <text:p>-0.28%</text:p>
          </table:table-cell>
          <table:table-cell table:style-name="ce40" table:formula="of:=([.J10]-[.I10])/[.I10]" office:value-type="percentage" office:value="0.036127983095903" calcext:value-type="percentage">
            <text:p>3.61%</text:p>
          </table:table-cell>
          <table:table-cell table:style-name="ce34" table:formula="of:=([.K10]-[.J10])/[.J10]" office:value-type="percentage" office:value="-0.0315973799260264" calcext:value-type="percentage">
            <text:p>-3.16%</text:p>
          </table:table-cell>
          <table:table-cell table:style-name="ce5" table:formula="of:=([.L10]-[.I10])/[.I10]" office:value-type="percentage" office:value="0.0155014666758117" calcext:value-type="percentage">
            <text:p>1.55%</text:p>
          </table:table-cell>
          <table:table-cell table:style-name="ce5" table:formula="of:=([.M10]-[.L10])/[.L10]" office:value-type="percentage" office:value="0.0143895525594741" calcext:value-type="percentage">
            <text:p>1.44%</text:p>
          </table:table-cell>
          <table:table-cell table:style-name="ce45" table:formula="of:=([.N10]-[.M10])/[.M10]" office:value-type="percentage" office:value="0.0000286007209700662" calcext:value-type="percentage">
            <text:p>0.00%</text:p>
          </table:table-cell>
          <table:table-cell table:style-name="ce5"/>
          <table:table-cell table:style-name="ce5" table:formula="of:=([.$M10]-[.$K10])/[.$I10]" office:value-type="percentage" office:value="0.0267250248427321" calcext:value-type="percentage">
            <text:p>2.67%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 table:style-name="ce4" table:formula="of:=IFERROR(__xludf.dummyfunction(&quot;&quot;&quot;COMPUTED_VALUE&quot;&quot;&quot;);&quot;libc-bench_regex&quot;)" office:value-type="string" office:string-value="libc-bench_regex" calcext:value-type="string">
            <text:p>libc-bench_regex</text:p>
          </table:table-cell>
          <table:table-cell table:style-name="ce10"/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C$2:C$6,$B$2:$B$6,LAMBDA(value,column,column&amp;&quot;&quot;='&quot;&quot;&amp;value&amp;&quot;&quot;'&quot;&quot;)),LAMBDA(acc,val,acc&amp;&quot;&quot; AND &quot;&quot;&amp;val))&amp;&quot;&quot;)&quot;&quot;)&quot;);574038000)" office:value-type="float" office:value="574038000" calcext:value-type="float">
            <text:p>5.7404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D$2:D$6,$B$2:$B$6,LAMBDA(value,column,column&amp;&quot;&quot;='&quot;&quot;&amp;value&amp;&quot;&quot;'&quot;&quot;)),LAMBDA(acc,val,acc&amp;&quot;&quot; AND &quot;&quot;&amp;val))&amp;&quot;&quot;)&quot;&quot;)&quot;);655017000)" office:value-type="float" office:value="655017000" calcext:value-type="float">
            <text:p>6.5502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E$2:E$6,$B$2:$B$6,LAMBDA(value,column,column&amp;&quot;&quot;='&quot;&quot;&amp;value&amp;&quot;&quot;'&quot;&quot;)),LAMBDA(acc,val,acc&amp;&quot;&quot; AND &quot;&quot;&amp;val))&amp;&quot;&quot;)&quot;&quot;)&quot;);662811000)" office:value-type="float" office:value="662811000" calcext:value-type="float">
            <text:p>6.6281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F$2:F$6,$B$2:$B$6,LAMBDA(value,column,column&amp;&quot;&quot;='&quot;&quot;&amp;value&amp;&quot;&quot;'&quot;&quot;)),LAMBDA(acc,val,acc&amp;&quot;&quot; AND &quot;&quot;&amp;val))&amp;&quot;&quot;)&quot;&quot;)&quot;);663020000)" office:value-type="float" office:value="663020000" calcext:value-type="float">
            <text:p>6.6302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G$2:G$6,$B$2:$B$6,LAMBDA(value,column,column&amp;&quot;&quot;='&quot;&quot;&amp;value&amp;&quot;&quot;'&quot;&quot;)),LAMBDA(acc,val,acc&amp;&quot;&quot; AND &quot;&quot;&amp;val))&amp;&quot;&quot;)&quot;&quot;)&quot;);661810000)" office:value-type="float" office:value="661810000" calcext:value-type="float">
            <text:p>6.6181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H$2:H$6,$B$2:$B$6,LAMBDA(value,column,column&amp;&quot;&quot;='&quot;&quot;&amp;value&amp;&quot;&quot;'&quot;&quot;)),LAMBDA(acc,val,acc&amp;&quot;&quot; AND &quot;&quot;&amp;val))&amp;&quot;&quot;)&quot;&quot;)&quot;);663775000)" office:value-type="float" office:value="663775000" calcext:value-type="float">
            <text:p>6.6378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I$2:I$6,$B$2:$B$6,LAMBDA(value,column,column&amp;&quot;&quot;='&quot;&quot;&amp;value&amp;&quot;&quot;'&quot;&quot;)),LAMBDA(acc,val,acc&amp;&quot;&quot; AND &quot;&quot;&amp;val))&amp;&quot;&quot;)&quot;&quot;)&quot;);691917000)" office:value-type="float" office:value="691917000" calcext:value-type="float">
            <text:p>6.9192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J$2:J$6,$B$2:$B$6,LAMBDA(value,column,column&amp;&quot;&quot;='&quot;&quot;&amp;value&amp;&quot;&quot;'&quot;&quot;)),LAMBDA(acc,val,acc&amp;&quot;&quot; AND &quot;&quot;&amp;val))&amp;&quot;&quot;)&quot;&quot;)&quot;);702459000)" office:value-type="float" office:value="702459000" calcext:value-type="float">
            <text:p>7.0246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K$2:K$6,$B$2:$B$6,LAMBDA(value,column,column&amp;&quot;&quot;='&quot;&quot;&amp;value&amp;&quot;&quot;'&quot;&quot;)),LAMBDA(acc,val,acc&amp;&quot;&quot; AND &quot;&quot;&amp;val))&amp;&quot;&quot;)&quot;&quot;)&quot;);699931500)" office:value-type="float" office:value="699931500" calcext:value-type="float">
            <text:p>6.9993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L$2:L$6,$B$2:$B$6,LAMBDA(value,column,column&amp;&quot;&quot;='&quot;&quot;&amp;value&amp;&quot;&quot;'&quot;&quot;)),LAMBDA(acc,val,acc&amp;&quot;&quot; AND &quot;&quot;&amp;val))&amp;&quot;&quot;)&quot;&quot;)&quot;);700534000)" office:value-type="float" office:value="700534000" calcext:value-type="float">
            <text:p>7.0053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M$2:M$6,$B$2:$B$6,LAMBDA(value,column,column&amp;&quot;&quot;='&quot;&quot;&amp;value&amp;&quot;&quot;'&quot;&quot;)),LAMBDA(acc,val,acc&amp;&quot;&quot; AND &quot;&quot;&amp;val))&amp;&quot;&quot;)&quot;&quot;)&quot;);695064000)" office:value-type="float" office:value="695064000" calcext:value-type="float">
            <text:p>6.9506E+08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1&amp;&quot;&quot;'&quot;&quot;,MAP(N$2:N$6,$B$2:$B$6,LAMBDA(value,column,column&amp;&quot;&quot;='&quot;&quot;&amp;value&amp;&quot;&quot;'&quot;&quot;)),LAMBDA(acc,val,acc&amp;&quot;&quot; AND &quot;&quot;&amp;val))&amp;&quot;&quot;)&quot;&quot;)&quot;);697056000)" office:value-type="float" office:value="697056000" calcext:value-type="float">
            <text:p>6.9706E+08</text:p>
          </table:table-cell>
          <table:table-cell table:style-name="ce22" table:formula="of:=IFERROR(__xludf.dummyfunction(&quot;QUERY(INDIRECT($D$20),&quot;&quot;SELECT &quot;&quot;&amp;$D$23&amp;&quot;&quot; WHERE (&quot;&quot;&amp;REDUCE($B$7&amp;&quot;&quot;='&quot;&quot;&amp;$A11&amp;&quot;&quot;'&quot;&quot;,MAP(O$2:O$6,$B$2:$B$6,LAMBDA(value,column,column&amp;&quot;&quot;='&quot;&quot;&amp;value&amp;&quot;&quot;'&quot;&quot;)),LAMBDA(acc,val,acc&amp;&quot;&quot; AND &quot;&quot;&amp;val))&amp;&quot;&quot;)&quot;&quot;)&quot;);33)" office:value-type="float" office:value="33" calcext:value-type="float">
            <text:p>33</text:p>
          </table:table-cell>
          <table:table-cell table:style-name="ce24" office:value-type="float" office:value="0.0650198901754946" calcext:value-type="float">
            <text:p>0.0650</text:p>
          </table:table-cell>
          <table:table-cell table:style-name="ce29" table:formula="of:=([.D11]-[.C11])/[.C11]" office:value-type="percentage" office:value="0.141069058145976" calcext:value-type="percentage">
            <text:p>14.11%</text:p>
          </table:table-cell>
          <table:table-cell table:style-name="ce29" table:formula="of:=([.E11]-[.D11])/[.D11]" office:value-type="percentage" office:value="0.0118989278140873" calcext:value-type="percentage">
            <text:p>1.19%</text:p>
          </table:table-cell>
          <table:table-cell table:style-name="ce34" table:formula="of:=([.F11]-[.E11])/[.E11]" office:value-type="percentage" office:value="0.000315323674471305" calcext:value-type="percentage">
            <text:p>0.03%</text:p>
          </table:table-cell>
          <table:table-cell table:style-name="ce5" table:formula="of:=([.G11]-[.D11])/[.D11]" office:value-type="percentage" office:value="0.0103707232026039" calcext:value-type="percentage">
            <text:p>1.04%</text:p>
          </table:table-cell>
          <table:table-cell table:style-name="ce5" table:formula="of:=([.H11]-[.G11])/[.G11]" office:value-type="percentage" office:value="0.00296913011287227" calcext:value-type="percentage">
            <text:p>0.30%</text:p>
          </table:table-cell>
          <table:table-cell table:style-name="ce29" table:formula="of:=([.I11]-[.D11])/[.D11]" office:value-type="percentage" office:value="0.0563344157479882" calcext:value-type="percentage">
            <text:p>5.63%</text:p>
          </table:table-cell>
          <table:table-cell table:style-name="ce40" table:formula="of:=([.J11]-[.I11])/[.I11]" office:value-type="percentage" office:value="0.0152359314773304" calcext:value-type="percentage">
            <text:p>1.52%</text:p>
          </table:table-cell>
          <table:table-cell table:style-name="ce34" table:formula="of:=([.K11]-[.J11])/[.J11]" office:value-type="percentage" office:value="-0.00359807476308226" calcext:value-type="percentage">
            <text:p>-0.36%</text:p>
          </table:table-cell>
          <table:table-cell table:style-name="ce5" table:formula="of:=([.L11]-[.I11])/[.I11]" office:value-type="percentage" office:value="0.0124538058755602" calcext:value-type="percentage">
            <text:p>1.25%</text:p>
          </table:table-cell>
          <table:table-cell table:style-name="ce5" table:formula="of:=([.M11]-[.L11])/[.L11]" office:value-type="percentage" office:value="-0.00780832907467732" calcext:value-type="percentage">
            <text:p>-0.78%</text:p>
          </table:table-cell>
          <table:table-cell table:style-name="ce45" table:formula="of:=([.N11]-[.M11])/[.M11]" office:value-type="percentage" office:value="0.00286592313801319" calcext:value-type="percentage">
            <text:p>0.29%</text:p>
          </table:table-cell>
          <table:table-cell table:style-name="ce5"/>
          <table:table-cell table:style-name="ce5" table:formula="of:=([.$M11]-[.$K11])/[.$I11]" office:value-type="percentage" office:value="-0.00703480330733311" calcext:value-type="percentage">
            <text:p>-0.70%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-0.1&quot;)" office:value-type="string" office:string-value="random-callstack-ubench-0.1" calcext:value-type="string">
            <text:p>random-callstack-ubench-0.1</text:p>
          </table:table-cell>
          <table:table-cell table:style-name="ce10"/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C$2:C$6,$B$2:$B$6,LAMBDA(value,column,column&amp;&quot;&quot;='&quot;&quot;&amp;value&amp;&quot;&quot;'&quot;&quot;)),LAMBDA(acc,val,acc&amp;&quot;&quot; AND &quot;&quot;&amp;val))&amp;&quot;&quot;)&quot;&quot;)&quot;);1785561500)" office:value-type="float" office:value="1785561500" calcext:value-type="float">
            <text:p>1.7856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D$2:D$6,$B$2:$B$6,LAMBDA(value,column,column&amp;&quot;&quot;='&quot;&quot;&amp;value&amp;&quot;&quot;'&quot;&quot;)),LAMBDA(acc,val,acc&amp;&quot;&quot; AND &quot;&quot;&amp;val))&amp;&quot;&quot;)&quot;&quot;)&quot;);2193936000)" office:value-type="float" office:value="2193936000" calcext:value-type="float">
            <text:p>2.1939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E$2:E$6,$B$2:$B$6,LAMBDA(value,column,column&amp;&quot;&quot;='&quot;&quot;&amp;value&amp;&quot;&quot;'&quot;&quot;)),LAMBDA(acc,val,acc&amp;&quot;&quot; AND &quot;&quot;&amp;val))&amp;&quot;&quot;)&quot;&quot;)&quot;);2303865500)" office:value-type="float" office:value="2303865500" calcext:value-type="float">
            <text:p>2.3039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F$2:F$6,$B$2:$B$6,LAMBDA(value,column,column&amp;&quot;&quot;='&quot;&quot;&amp;value&amp;&quot;&quot;'&quot;&quot;)),LAMBDA(acc,val,acc&amp;&quot;&quot; AND &quot;&quot;&amp;val))&amp;&quot;&quot;)&quot;&quot;)&quot;);2283550000)" office:value-type="float" office:value="2283550000" calcext:value-type="float">
            <text:p>2.2836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G$2:G$6,$B$2:$B$6,LAMBDA(value,column,column&amp;&quot;&quot;='&quot;&quot;&amp;value&amp;&quot;&quot;'&quot;&quot;)),LAMBDA(acc,val,acc&amp;&quot;&quot; AND &quot;&quot;&amp;val))&amp;&quot;&quot;)&quot;&quot;)&quot;);2276311500)" office:value-type="float" office:value="2276311500" calcext:value-type="float">
            <text:p>2.2763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H$2:H$6,$B$2:$B$6,LAMBDA(value,column,column&amp;&quot;&quot;='&quot;&quot;&amp;value&amp;&quot;&quot;'&quot;&quot;)),LAMBDA(acc,val,acc&amp;&quot;&quot; AND &quot;&quot;&amp;val))&amp;&quot;&quot;)&quot;&quot;)&quot;);2270213000)" office:value-type="float" office:value="2270213000" calcext:value-type="float">
            <text:p>2.270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I$2:I$6,$B$2:$B$6,LAMBDA(value,column,column&amp;&quot;&quot;='&quot;&quot;&amp;value&amp;&quot;&quot;'&quot;&quot;)),LAMBDA(acc,val,acc&amp;&quot;&quot; AND &quot;&quot;&amp;val))&amp;&quot;&quot;)&quot;&quot;)&quot;);2409378000)" office:value-type="float" office:value="2409378000" calcext:value-type="float">
            <text:p>2.4094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J$2:J$6,$B$2:$B$6,LAMBDA(value,column,column&amp;&quot;&quot;='&quot;&quot;&amp;value&amp;&quot;&quot;'&quot;&quot;)),LAMBDA(acc,val,acc&amp;&quot;&quot; AND &quot;&quot;&amp;val))&amp;&quot;&quot;)&quot;&quot;)&quot;);2436303500)" office:value-type="float" office:value="2436303500" calcext:value-type="float">
            <text:p>2.4363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K$2:K$6,$B$2:$B$6,LAMBDA(value,column,column&amp;&quot;&quot;='&quot;&quot;&amp;value&amp;&quot;&quot;'&quot;&quot;)),LAMBDA(acc,val,acc&amp;&quot;&quot; AND &quot;&quot;&amp;val))&amp;&quot;&quot;)&quot;&quot;)&quot;);2432380000)" office:value-type="float" office:value="2432380000" calcext:value-type="float">
            <text:p>2.4324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L$2:L$6,$B$2:$B$6,LAMBDA(value,column,column&amp;&quot;&quot;='&quot;&quot;&amp;value&amp;&quot;&quot;'&quot;&quot;)),LAMBDA(acc,val,acc&amp;&quot;&quot; AND &quot;&quot;&amp;val))&amp;&quot;&quot;)&quot;&quot;)&quot;);2411395500)" office:value-type="float" office:value="2411395500" calcext:value-type="float">
            <text:p>2.4114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M$2:M$6,$B$2:$B$6,LAMBDA(value,column,column&amp;&quot;&quot;='&quot;&quot;&amp;value&amp;&quot;&quot;'&quot;&quot;)),LAMBDA(acc,val,acc&amp;&quot;&quot; AND &quot;&quot;&amp;val))&amp;&quot;&quot;)&quot;&quot;)&quot;);2421870000)" office:value-type="float" office:value="2421870000" calcext:value-type="float">
            <text:p>2.4219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2&amp;&quot;&quot;'&quot;&quot;,MAP(N$2:N$6,$B$2:$B$6,LAMBDA(value,column,column&amp;&quot;&quot;='&quot;&quot;&amp;value&amp;&quot;&quot;'&quot;&quot;)),LAMBDA(acc,val,acc&amp;&quot;&quot; AND &quot;&quot;&amp;val))&amp;&quot;&quot;)&quot;&quot;)&quot;);2450009000)" office:value-type="float" office:value="2450009000" calcext:value-type="float">
            <text:p>2.4500E+09</text:p>
          </table:table-cell>
          <table:table-cell table:style-name="ce22" table:formula="of:=IFERROR(__xludf.dummyfunction(&quot;QUERY(INDIRECT($D$20),&quot;&quot;SELECT &quot;&quot;&amp;$D$23&amp;&quot;&quot; WHERE (&quot;&quot;&amp;REDUCE($B$7&amp;&quot;&quot;='&quot;&quot;&amp;$A12&amp;&quot;&quot;'&quot;&quot;,MAP(O$2:O$6,$B$2:$B$6,LAMBDA(value,column,column&amp;&quot;&quot;='&quot;&quot;&amp;value&amp;&quot;&quot;'&quot;&quot;)),LAMBDA(acc,val,acc&amp;&quot;&quot; AND &quot;&quot;&amp;val))&amp;&quot;&quot;)&quot;&quot;)&quot;);529)" office:value-type="float" office:value="529" calcext:value-type="float">
            <text:p>529</text:p>
          </table:table-cell>
          <table:table-cell table:style-name="ce24" office:value-type="float" office:value="0.251754069111965" calcext:value-type="float">
            <text:p>0.2518</text:p>
          </table:table-cell>
          <table:table-cell table:style-name="ce29" table:formula="of:=([.D12]-[.C12])/[.C12]" office:value-type="percentage" office:value="0.228709288366713" calcext:value-type="percentage">
            <text:p>22.87%</text:p>
          </table:table-cell>
          <table:table-cell table:style-name="ce29" table:formula="of:=([.E12]-[.D12])/[.D12]" office:value-type="percentage" office:value="0.0501060650812057" calcext:value-type="percentage">
            <text:p>5.01%</text:p>
          </table:table-cell>
          <table:table-cell table:style-name="ce34" table:formula="of:=([.F12]-[.E12])/[.E12]" office:value-type="percentage" office:value="-0.00881800608585874" calcext:value-type="percentage">
            <text:p>-0.88%</text:p>
          </table:table-cell>
          <table:table-cell table:style-name="ce5" table:formula="of:=([.G12]-[.D12])/[.D12]" office:value-type="percentage" office:value="0.0375469020062572" calcext:value-type="percentage">
            <text:p>3.75%</text:p>
          </table:table-cell>
          <table:table-cell table:style-name="ce5" table:formula="of:=([.H12]-[.G12])/[.G12]" office:value-type="percentage" office:value="-0.00267911487509508" calcext:value-type="percentage">
            <text:p>-0.27%</text:p>
          </table:table-cell>
          <table:table-cell table:style-name="ce29" table:formula="of:=([.I12]-[.D12])/[.D12]" office:value-type="percentage" office:value="0.0981988535672873" calcext:value-type="percentage">
            <text:p>9.82%</text:p>
          </table:table-cell>
          <table:table-cell table:style-name="ce40" table:formula="of:=([.J12]-[.I12])/[.I12]" office:value-type="percentage" office:value="0.0111752908842033" calcext:value-type="percentage">
            <text:p>1.12%</text:p>
          </table:table-cell>
          <table:table-cell table:style-name="ce34" table:formula="of:=([.K12]-[.J12])/[.J12]" office:value-type="percentage" office:value="-0.0016104315410621" calcext:value-type="percentage">
            <text:p>-0.16%</text:p>
          </table:table-cell>
          <table:table-cell table:style-name="ce5" table:formula="of:=([.L12]-[.I12])/[.I12]" office:value-type="percentage" office:value="0.000837353042984538" calcext:value-type="percentage">
            <text:p>0.08%</text:p>
          </table:table-cell>
          <table:table-cell table:style-name="ce5" table:formula="of:=([.M12]-[.L12])/[.L12]" office:value-type="percentage" office:value="0.00434375033046217" calcext:value-type="percentage">
            <text:p>0.43%</text:p>
          </table:table-cell>
          <table:table-cell table:style-name="ce45" table:formula="of:=([.N12]-[.M12])/[.M12]" office:value-type="percentage" office:value="0.0116187078579775" calcext:value-type="percentage">
            <text:p>1.16%</text:p>
          </table:table-cell>
          <table:table-cell table:style-name="ce5"/>
          <table:table-cell table:style-name="ce5" table:formula="of:=([.$M12]-[.$K12])/[.$I12]" office:value-type="percentage" office:value="-0.00436212167621685" calcext:value-type="percentage">
            <text:p>-0.44%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-0.5&quot;)" office:value-type="string" office:string-value="random-callstack-ubench-0.5" calcext:value-type="string">
            <text:p>random-callstack-ubench-0.5</text:p>
          </table:table-cell>
          <table:table-cell table:style-name="ce10"/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C$2:C$6,$B$2:$B$6,LAMBDA(value,column,column&amp;&quot;&quot;='&quot;&quot;&amp;value&amp;&quot;&quot;'&quot;&quot;)),LAMBDA(acc,val,acc&amp;&quot;&quot; AND &quot;&quot;&amp;val))&amp;&quot;&quot;)&quot;&quot;)&quot;);1785895500)" office:value-type="float" office:value="1785895500" calcext:value-type="float">
            <text:p>1.7859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D$2:D$6,$B$2:$B$6,LAMBDA(value,column,column&amp;&quot;&quot;='&quot;&quot;&amp;value&amp;&quot;&quot;'&quot;&quot;)),LAMBDA(acc,val,acc&amp;&quot;&quot; AND &quot;&quot;&amp;val))&amp;&quot;&quot;)&quot;&quot;)&quot;);2199525000)" office:value-type="float" office:value="2199525000" calcext:value-type="float">
            <text:p>2.1995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E$2:E$6,$B$2:$B$6,LAMBDA(value,column,column&amp;&quot;&quot;='&quot;&quot;&amp;value&amp;&quot;&quot;'&quot;&quot;)),LAMBDA(acc,val,acc&amp;&quot;&quot; AND &quot;&quot;&amp;val))&amp;&quot;&quot;)&quot;&quot;)&quot;);2531220500)" office:value-type="float" office:value="2531220500" calcext:value-type="float">
            <text:p>2.531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F$2:F$6,$B$2:$B$6,LAMBDA(value,column,column&amp;&quot;&quot;='&quot;&quot;&amp;value&amp;&quot;&quot;'&quot;&quot;)),LAMBDA(acc,val,acc&amp;&quot;&quot; AND &quot;&quot;&amp;val))&amp;&quot;&quot;)&quot;&quot;)&quot;);2523274000)" office:value-type="float" office:value="2523274000" calcext:value-type="float">
            <text:p>2.5233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G$2:G$6,$B$2:$B$6,LAMBDA(value,column,column&amp;&quot;&quot;='&quot;&quot;&amp;value&amp;&quot;&quot;'&quot;&quot;)),LAMBDA(acc,val,acc&amp;&quot;&quot; AND &quot;&quot;&amp;val))&amp;&quot;&quot;)&quot;&quot;)&quot;);2436598500)" office:value-type="float" office:value="2436598500" calcext:value-type="float">
            <text:p>2.4366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H$2:H$6,$B$2:$B$6,LAMBDA(value,column,column&amp;&quot;&quot;='&quot;&quot;&amp;value&amp;&quot;&quot;'&quot;&quot;)),LAMBDA(acc,val,acc&amp;&quot;&quot; AND &quot;&quot;&amp;val))&amp;&quot;&quot;)&quot;&quot;)&quot;);2441231000)" office:value-type="float" office:value="2441231000" calcext:value-type="float">
            <text:p>2.441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I$2:I$6,$B$2:$B$6,LAMBDA(value,column,column&amp;&quot;&quot;='&quot;&quot;&amp;value&amp;&quot;&quot;'&quot;&quot;)),LAMBDA(acc,val,acc&amp;&quot;&quot; AND &quot;&quot;&amp;val))&amp;&quot;&quot;)&quot;&quot;)&quot;);2411956000)" office:value-type="float" office:value="2411956000" calcext:value-type="float">
            <text:p>2.4120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J$2:J$6,$B$2:$B$6,LAMBDA(value,column,column&amp;&quot;&quot;='&quot;&quot;&amp;value&amp;&quot;&quot;'&quot;&quot;)),LAMBDA(acc,val,acc&amp;&quot;&quot; AND &quot;&quot;&amp;val))&amp;&quot;&quot;)&quot;&quot;)&quot;);2584241500)" office:value-type="float" office:value="2584241500" calcext:value-type="float">
            <text:p>2.584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K$2:K$6,$B$2:$B$6,LAMBDA(value,column,column&amp;&quot;&quot;='&quot;&quot;&amp;value&amp;&quot;&quot;'&quot;&quot;)),LAMBDA(acc,val,acc&amp;&quot;&quot; AND &quot;&quot;&amp;val))&amp;&quot;&quot;)&quot;&quot;)&quot;);2597936000)" office:value-type="float" office:value="2597936000" calcext:value-type="float">
            <text:p>2.5979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L$2:L$6,$B$2:$B$6,LAMBDA(value,column,column&amp;&quot;&quot;='&quot;&quot;&amp;value&amp;&quot;&quot;'&quot;&quot;)),LAMBDA(acc,val,acc&amp;&quot;&quot; AND &quot;&quot;&amp;val))&amp;&quot;&quot;)&quot;&quot;)&quot;);2482813500)" office:value-type="float" office:value="2482813500" calcext:value-type="float">
            <text:p>2.4828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M$2:M$6,$B$2:$B$6,LAMBDA(value,column,column&amp;&quot;&quot;='&quot;&quot;&amp;value&amp;&quot;&quot;'&quot;&quot;)),LAMBDA(acc,val,acc&amp;&quot;&quot; AND &quot;&quot;&amp;val))&amp;&quot;&quot;)&quot;&quot;)&quot;);2505450000)" office:value-type="float" office:value="2505450000" calcext:value-type="float">
            <text:p>2.5055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3&amp;&quot;&quot;'&quot;&quot;,MAP(N$2:N$6,$B$2:$B$6,LAMBDA(value,column,column&amp;&quot;&quot;='&quot;&quot;&amp;value&amp;&quot;&quot;'&quot;&quot;)),LAMBDA(acc,val,acc&amp;&quot;&quot; AND &quot;&quot;&amp;val))&amp;&quot;&quot;)&quot;&quot;)&quot;);2657102000)" office:value-type="float" office:value="2657102000" calcext:value-type="float">
            <text:p>2.6571E+09</text:p>
          </table:table-cell>
          <table:table-cell table:style-name="ce22" table:formula="of:=IFERROR(__xludf.dummyfunction(&quot;QUERY(INDIRECT($D$20),&quot;&quot;SELECT &quot;&quot;&amp;$D$23&amp;&quot;&quot; WHERE (&quot;&quot;&amp;REDUCE($B$7&amp;&quot;&quot;='&quot;&quot;&amp;$A13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office:value-type="float" office:value="1.15064243820628" calcext:value-type="float">
            <text:p>1.1506</text:p>
          </table:table-cell>
          <table:table-cell table:style-name="ce29" table:formula="of:=([.D13]-[.C13])/[.C13]" office:value-type="percentage" office:value="0.231609016317024" calcext:value-type="percentage">
            <text:p>23.16%</text:p>
          </table:table-cell>
          <table:table-cell table:style-name="ce29" table:formula="of:=([.E13]-[.D13])/[.D13]" office:value-type="percentage" office:value="0.150803241608984" calcext:value-type="percentage">
            <text:p>15.08%</text:p>
          </table:table-cell>
          <table:table-cell table:style-name="ce34" table:formula="of:=([.F13]-[.E13])/[.E13]" office:value-type="percentage" office:value="-0.00313939461220388" calcext:value-type="percentage">
            <text:p>-0.31%</text:p>
          </table:table-cell>
          <table:table-cell table:style-name="ce5" table:formula="of:=([.G13]-[.D13])/[.D13]" office:value-type="percentage" office:value="0.107783953353565" calcext:value-type="percentage">
            <text:p>10.78%</text:p>
          </table:table-cell>
          <table:table-cell table:style-name="ce5" table:formula="of:=([.H13]-[.G13])/[.G13]" office:value-type="percentage" office:value="0.00190121597792989" calcext:value-type="percentage">
            <text:p>0.19%</text:p>
          </table:table-cell>
          <table:table-cell table:style-name="ce29" table:formula="of:=([.I13]-[.D13])/[.D13]" office:value-type="percentage" office:value="0.096580398040486" calcext:value-type="percentage">
            <text:p>9.66%</text:p>
          </table:table-cell>
          <table:table-cell table:style-name="ce40" table:formula="of:=([.J13]-[.I13])/[.I13]" office:value-type="percentage" office:value="0.0714297856179798" calcext:value-type="percentage">
            <text:p>7.14%</text:p>
          </table:table-cell>
          <table:table-cell table:style-name="ce34" table:formula="of:=([.K13]-[.J13])/[.J13]" office:value-type="percentage" office:value="0.00529923383708527" calcext:value-type="percentage">
            <text:p>0.53%</text:p>
          </table:table-cell>
          <table:table-cell table:style-name="ce5" table:formula="of:=([.L13]-[.I13])/[.I13]" office:value-type="percentage" office:value="0.0293776088784373" calcext:value-type="percentage">
            <text:p>2.94%</text:p>
          </table:table-cell>
          <table:table-cell table:style-name="ce5" table:formula="of:=([.M13]-[.L13])/[.L13]" office:value-type="percentage" office:value="0.00911727763684224" calcext:value-type="percentage">
            <text:p>0.91%</text:p>
          </table:table-cell>
          <table:table-cell table:style-name="ce45" table:formula="of:=([.N13]-[.M13])/[.M13]" office:value-type="percentage" office:value="0.060528847113293" calcext:value-type="percentage">
            <text:p>6.05%</text:p>
          </table:table-cell>
          <table:table-cell table:style-name="ce5"/>
          <table:table-cell table:style-name="ce5" table:formula="of:=([.$M13]-[.$K13])/[.$I13]" office:value-type="percentage" office:value="-0.0383448122602568" calcext:value-type="percentage">
            <text:p>-3.83%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-0.9&quot;)" office:value-type="string" office:string-value="random-callstack-ubench-0.9" calcext:value-type="string">
            <text:p>random-callstack-ubench-0.9</text:p>
          </table:table-cell>
          <table:table-cell table:style-name="ce10"/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C$2:C$6,$B$2:$B$6,LAMBDA(value,column,column&amp;&quot;&quot;='&quot;&quot;&amp;value&amp;&quot;&quot;'&quot;&quot;)),LAMBDA(acc,val,acc&amp;&quot;&quot; AND &quot;&quot;&amp;val))&amp;&quot;&quot;)&quot;&quot;)&quot;);1785895500)" office:value-type="float" office:value="1785895500" calcext:value-type="float">
            <text:p>1.7859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D$2:D$6,$B$2:$B$6,LAMBDA(value,column,column&amp;&quot;&quot;='&quot;&quot;&amp;value&amp;&quot;&quot;'&quot;&quot;)),LAMBDA(acc,val,acc&amp;&quot;&quot; AND &quot;&quot;&amp;val))&amp;&quot;&quot;)&quot;&quot;)&quot;);2205223000)" office:value-type="float" office:value="2205223000" calcext:value-type="float">
            <text:p>2.205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E$2:E$6,$B$2:$B$6,LAMBDA(value,column,column&amp;&quot;&quot;='&quot;&quot;&amp;value&amp;&quot;&quot;'&quot;&quot;)),LAMBDA(acc,val,acc&amp;&quot;&quot; AND &quot;&quot;&amp;val))&amp;&quot;&quot;)&quot;&quot;)&quot;);2718326500)" office:value-type="float" office:value="2718326500" calcext:value-type="float">
            <text:p>2.7183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F$2:F$6,$B$2:$B$6,LAMBDA(value,column,column&amp;&quot;&quot;='&quot;&quot;&amp;value&amp;&quot;&quot;'&quot;&quot;)),LAMBDA(acc,val,acc&amp;&quot;&quot; AND &quot;&quot;&amp;val))&amp;&quot;&quot;)&quot;&quot;)&quot;);2724162000)" office:value-type="float" office:value="2724162000" calcext:value-type="float">
            <text:p>2.724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G$2:G$6,$B$2:$B$6,LAMBDA(value,column,column&amp;&quot;&quot;='&quot;&quot;&amp;value&amp;&quot;&quot;'&quot;&quot;)),LAMBDA(acc,val,acc&amp;&quot;&quot; AND &quot;&quot;&amp;val))&amp;&quot;&quot;)&quot;&quot;)&quot;);2554240500)" office:value-type="float" office:value="2554240500" calcext:value-type="float">
            <text:p>2.554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H$2:H$6,$B$2:$B$6,LAMBDA(value,column,column&amp;&quot;&quot;='&quot;&quot;&amp;value&amp;&quot;&quot;'&quot;&quot;)),LAMBDA(acc,val,acc&amp;&quot;&quot; AND &quot;&quot;&amp;val))&amp;&quot;&quot;)&quot;&quot;)&quot;);2574316000)" office:value-type="float" office:value="2574316000" calcext:value-type="float">
            <text:p>2.5743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I$2:I$6,$B$2:$B$6,LAMBDA(value,column,column&amp;&quot;&quot;='&quot;&quot;&amp;value&amp;&quot;&quot;'&quot;&quot;)),LAMBDA(acc,val,acc&amp;&quot;&quot; AND &quot;&quot;&amp;val))&amp;&quot;&quot;)&quot;&quot;)&quot;);2414982000)" office:value-type="float" office:value="2414982000" calcext:value-type="float">
            <text:p>2.4150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J$2:J$6,$B$2:$B$6,LAMBDA(value,column,column&amp;&quot;&quot;='&quot;&quot;&amp;value&amp;&quot;&quot;'&quot;&quot;)),LAMBDA(acc,val,acc&amp;&quot;&quot; AND &quot;&quot;&amp;val))&amp;&quot;&quot;)&quot;&quot;)&quot;);2726879500)" office:value-type="float" office:value="2726879500" calcext:value-type="float">
            <text:p>2.7269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K$2:K$6,$B$2:$B$6,LAMBDA(value,column,column&amp;&quot;&quot;='&quot;&quot;&amp;value&amp;&quot;&quot;'&quot;&quot;)),LAMBDA(acc,val,acc&amp;&quot;&quot; AND &quot;&quot;&amp;val))&amp;&quot;&quot;)&quot;&quot;)&quot;);2767324000)" office:value-type="float" office:value="2767324000" calcext:value-type="float">
            <text:p>2.7673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L$2:L$6,$B$2:$B$6,LAMBDA(value,column,column&amp;&quot;&quot;='&quot;&quot;&amp;value&amp;&quot;&quot;'&quot;&quot;)),LAMBDA(acc,val,acc&amp;&quot;&quot; AND &quot;&quot;&amp;val))&amp;&quot;&quot;)&quot;&quot;)&quot;);2554376500)" office:value-type="float" office:value="2554376500" calcext:value-type="float">
            <text:p>2.5544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M$2:M$6,$B$2:$B$6,LAMBDA(value,column,column&amp;&quot;&quot;='&quot;&quot;&amp;value&amp;&quot;&quot;'&quot;&quot;)),LAMBDA(acc,val,acc&amp;&quot;&quot; AND &quot;&quot;&amp;val))&amp;&quot;&quot;)&quot;&quot;)&quot;);2588661000)" office:value-type="float" office:value="2588661000" calcext:value-type="float">
            <text:p>2.5887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4&amp;&quot;&quot;'&quot;&quot;,MAP(N$2:N$6,$B$2:$B$6,LAMBDA(value,column,column&amp;&quot;&quot;='&quot;&quot;&amp;value&amp;&quot;&quot;'&quot;&quot;)),LAMBDA(acc,val,acc&amp;&quot;&quot; AND &quot;&quot;&amp;val))&amp;&quot;&quot;)&quot;&quot;)&quot;);2872037000)" office:value-type="float" office:value="2872037000" calcext:value-type="float">
            <text:p>2.8720E+09</text:p>
          </table:table-cell>
          <table:table-cell table:style-name="ce22" table:formula="of:=IFERROR(__xludf.dummyfunction(&quot;QUERY(INDIRECT($D$20),&quot;&quot;SELECT &quot;&quot;&amp;$D$23&amp;&quot;&quot; WHERE (&quot;&quot;&amp;REDUCE($B$7&amp;&quot;&quot;='&quot;&quot;&amp;$A14&amp;&quot;&quot;'&quot;&quot;,MAP(O$2:O$6,$B$2:$B$6,LAMBDA(value,column,column&amp;&quot;&quot;='&quot;&quot;&amp;value&amp;&quot;&quot;'&quot;&quot;)),LAMBDA(acc,val,acc&amp;&quot;&quot; AND &quot;&quot;&amp;val))&amp;&quot;&quot;)&quot;&quot;)&quot;);4499)" office:value-type="float" office:value="4499" calcext:value-type="float">
            <text:p>4,499</text:p>
          </table:table-cell>
          <table:table-cell table:style-name="ce24" office:value-type="float" office:value="1.99131152583858" calcext:value-type="float">
            <text:p>1.9913</text:p>
          </table:table-cell>
          <table:table-cell table:style-name="ce29" table:formula="of:=([.D14]-[.C14])/[.C14]" office:value-type="percentage" office:value="0.234799572539379" calcext:value-type="percentage">
            <text:p>23.48%</text:p>
          </table:table-cell>
          <table:table-cell table:style-name="ce29" table:formula="of:=([.E14]-[.D14])/[.D14]" office:value-type="percentage" office:value="0.232676468547625" calcext:value-type="percentage">
            <text:p>23.27%</text:p>
          </table:table-cell>
          <table:table-cell table:style-name="ce34" table:formula="of:=([.F14]-[.E14])/[.E14]" office:value-type="percentage" office:value="0.00214672520022889" calcext:value-type="percentage">
            <text:p>0.21%</text:p>
          </table:table-cell>
          <table:table-cell table:style-name="ce5" table:formula="of:=([.G14]-[.D14])/[.D14]" office:value-type="percentage" office:value="0.158268574198618" calcext:value-type="percentage">
            <text:p>15.83%</text:p>
          </table:table-cell>
          <table:table-cell table:style-name="ce5" table:formula="of:=([.H14]-[.G14])/[.G14]" office:value-type="percentage" office:value="0.00785967492097945" calcext:value-type="percentage">
            <text:p>0.79%</text:p>
          </table:table-cell>
          <table:table-cell table:style-name="ce29" table:formula="of:=([.I14]-[.D14])/[.D14]" office:value-type="percentage" office:value="0.0951191784232252" calcext:value-type="percentage">
            <text:p>9.51%</text:p>
          </table:table-cell>
          <table:table-cell table:style-name="ce40" table:formula="of:=([.J14]-[.I14])/[.I14]" office:value-type="percentage" office:value="0.129151066136311" calcext:value-type="percentage">
            <text:p>12.92%</text:p>
          </table:table-cell>
          <table:table-cell table:style-name="ce34" table:formula="of:=([.K14]-[.J14])/[.J14]" office:value-type="percentage" office:value="0.0148317884967048" calcext:value-type="percentage">
            <text:p>1.48%</text:p>
          </table:table-cell>
          <table:table-cell table:style-name="ce5" table:formula="of:=([.L14]-[.I14])/[.I14]" office:value-type="percentage" office:value="0.0577207200716196" calcext:value-type="percentage">
            <text:p>5.77%</text:p>
          </table:table-cell>
          <table:table-cell table:style-name="ce5" table:formula="of:=([.M14]-[.L14])/[.L14]" office:value-type="percentage" office:value="0.0134218663536875" calcext:value-type="percentage">
            <text:p>1.34%</text:p>
          </table:table-cell>
          <table:table-cell table:style-name="ce45" table:formula="of:=([.N14]-[.M14])/[.M14]" office:value-type="percentage" office:value="0.109468176791013" calcext:value-type="percentage">
            <text:p>10.95%</text:p>
          </table:table-cell>
          <table:table-cell table:style-name="ce5"/>
          <table:table-cell table:style-name="ce5" table:formula="of:=([.$M14]-[.$K14])/[.$I14]" office:value-type="percentage" office:value="-0.0739810897141262" calcext:value-type="percentage">
            <text:p>-7.40%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+large-alloc-0.5&quot;)" office:value-type="string" office:string-value="random-callstack-ubench+large-alloc-0.5" calcext:value-type="string">
            <text:p>random-callstack-ubench+large-alloc-0.5</text:p>
          </table:table-cell>
          <table:table-cell table:style-name="ce10"/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C$2:C$6,$B$2:$B$6,LAMBDA(value,column,column&amp;&quot;&quot;='&quot;&quot;&amp;value&amp;&quot;&quot;'&quot;&quot;)),LAMBDA(acc,val,acc&amp;&quot;&quot; AND &quot;&quot;&amp;val))&amp;&quot;&quot;)&quot;&quot;)&quot;);1786071500)" office:value-type="float" office:value="1786071500" calcext:value-type="float">
            <text:p>1.7861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D$2:D$6,$B$2:$B$6,LAMBDA(value,column,column&amp;&quot;&quot;='&quot;&quot;&amp;value&amp;&quot;&quot;'&quot;&quot;)),LAMBDA(acc,val,acc&amp;&quot;&quot; AND &quot;&quot;&amp;val))&amp;&quot;&quot;)&quot;&quot;)&quot;);2363778500)" office:value-type="float" office:value="2363778500" calcext:value-type="float">
            <text:p>2.3638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E$2:E$6,$B$2:$B$6,LAMBDA(value,column,column&amp;&quot;&quot;='&quot;&quot;&amp;value&amp;&quot;&quot;'&quot;&quot;)),LAMBDA(acc,val,acc&amp;&quot;&quot; AND &quot;&quot;&amp;val))&amp;&quot;&quot;)&quot;&quot;)&quot;);2722920000)" office:value-type="float" office:value="2722920000" calcext:value-type="float">
            <text:p>2.7229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F$2:F$6,$B$2:$B$6,LAMBDA(value,column,column&amp;&quot;&quot;='&quot;&quot;&amp;value&amp;&quot;&quot;'&quot;&quot;)),LAMBDA(acc,val,acc&amp;&quot;&quot; AND &quot;&quot;&amp;val))&amp;&quot;&quot;)&quot;&quot;)&quot;);2728944000)" office:value-type="float" office:value="2728944000" calcext:value-type="float">
            <text:p>2.7289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G$2:G$6,$B$2:$B$6,LAMBDA(value,column,column&amp;&quot;&quot;='&quot;&quot;&amp;value&amp;&quot;&quot;'&quot;&quot;)),LAMBDA(acc,val,acc&amp;&quot;&quot; AND &quot;&quot;&amp;val))&amp;&quot;&quot;)&quot;&quot;)&quot;);2627152000)" office:value-type="float" office:value="2627152000" calcext:value-type="float">
            <text:p>2.627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H$2:H$6,$B$2:$B$6,LAMBDA(value,column,column&amp;&quot;&quot;='&quot;&quot;&amp;value&amp;&quot;&quot;'&quot;&quot;)),LAMBDA(acc,val,acc&amp;&quot;&quot; AND &quot;&quot;&amp;val))&amp;&quot;&quot;)&quot;&quot;)&quot;);2636131000)" office:value-type="float" office:value="2636131000" calcext:value-type="float">
            <text:p>2.6361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I$2:I$6,$B$2:$B$6,LAMBDA(value,column,column&amp;&quot;&quot;='&quot;&quot;&amp;value&amp;&quot;&quot;'&quot;&quot;)),LAMBDA(acc,val,acc&amp;&quot;&quot; AND &quot;&quot;&amp;val))&amp;&quot;&quot;)&quot;&quot;)&quot;);2552735500)" office:value-type="float" office:value="2552735500" calcext:value-type="float">
            <text:p>2.5527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J$2:J$6,$B$2:$B$6,LAMBDA(value,column,column&amp;&quot;&quot;='&quot;&quot;&amp;value&amp;&quot;&quot;'&quot;&quot;)),LAMBDA(acc,val,acc&amp;&quot;&quot; AND &quot;&quot;&amp;val))&amp;&quot;&quot;)&quot;&quot;)&quot;);2725598000)" office:value-type="float" office:value="2725598000" calcext:value-type="float">
            <text:p>2.7256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K$2:K$6,$B$2:$B$6,LAMBDA(value,column,column&amp;&quot;&quot;='&quot;&quot;&amp;value&amp;&quot;&quot;'&quot;&quot;)),LAMBDA(acc,val,acc&amp;&quot;&quot; AND &quot;&quot;&amp;val))&amp;&quot;&quot;)&quot;&quot;)&quot;);2740615000)" office:value-type="float" office:value="2740615000" calcext:value-type="float">
            <text:p>2.7406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L$2:L$6,$B$2:$B$6,LAMBDA(value,column,column&amp;&quot;&quot;='&quot;&quot;&amp;value&amp;&quot;&quot;'&quot;&quot;)),LAMBDA(acc,val,acc&amp;&quot;&quot; AND &quot;&quot;&amp;val))&amp;&quot;&quot;)&quot;&quot;)&quot;);2621779000)" office:value-type="float" office:value="2621779000" calcext:value-type="float">
            <text:p>2.6218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M$2:M$6,$B$2:$B$6,LAMBDA(value,column,column&amp;&quot;&quot;='&quot;&quot;&amp;value&amp;&quot;&quot;'&quot;&quot;)),LAMBDA(acc,val,acc&amp;&quot;&quot; AND &quot;&quot;&amp;val))&amp;&quot;&quot;)&quot;&quot;)&quot;);2662830000)" office:value-type="float" office:value="2662830000" calcext:value-type="float">
            <text:p>2.6628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5&amp;&quot;&quot;'&quot;&quot;,MAP(N$2:N$6,$B$2:$B$6,LAMBDA(value,column,column&amp;&quot;&quot;='&quot;&quot;&amp;value&amp;&quot;&quot;'&quot;&quot;)),LAMBDA(acc,val,acc&amp;&quot;&quot; AND &quot;&quot;&amp;val))&amp;&quot;&quot;)&quot;&quot;)&quot;);2805429000)" office:value-type="float" office:value="2805429000" calcext:value-type="float">
            <text:p>2.8054E+09</text:p>
          </table:table-cell>
          <table:table-cell table:style-name="ce22" table:formula="of:=IFERROR(__xludf.dummyfunction(&quot;QUERY(INDIRECT($D$20),&quot;&quot;SELECT &quot;&quot;&amp;$D$23&amp;&quot;&quot; WHERE (&quot;&quot;&amp;REDUCE($B$7&amp;&quot;&quot;='&quot;&quot;&amp;$A15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office:value-type="float" office:value="1.08562693116329" calcext:value-type="float">
            <text:p>1.0856</text:p>
          </table:table-cell>
          <table:table-cell table:style-name="ce29" table:formula="of:=([.D15]-[.C15])/[.C15]" office:value-type="percentage" office:value="0.323451216818588" calcext:value-type="percentage">
            <text:p>32.35%</text:p>
          </table:table-cell>
          <table:table-cell table:style-name="ce29" table:formula="of:=([.E15]-[.D15])/[.D15]" office:value-type="percentage" office:value="0.151935344195744" calcext:value-type="percentage">
            <text:p>15.19%</text:p>
          </table:table-cell>
          <table:table-cell table:style-name="ce34" table:formula="of:=([.F15]-[.E15])/[.E15]" office:value-type="percentage" office:value="0.00221233088008461" calcext:value-type="percentage">
            <text:p>0.22%</text:p>
          </table:table-cell>
          <table:table-cell table:style-name="ce5" table:formula="of:=([.G15]-[.D15])/[.D15]" office:value-type="percentage" office:value="0.111420549768094" calcext:value-type="percentage">
            <text:p>11.14%</text:p>
          </table:table-cell>
          <table:table-cell table:style-name="ce5" table:formula="of:=([.H15]-[.G15])/[.G15]" office:value-type="percentage" office:value="0.00341776950857811" calcext:value-type="percentage">
            <text:p>0.34%</text:p>
          </table:table-cell>
          <table:table-cell table:style-name="ce29" table:formula="of:=([.I15]-[.D15])/[.D15]" office:value-type="percentage" office:value="0.0799385390805441" calcext:value-type="percentage">
            <text:p>7.99%</text:p>
          </table:table-cell>
          <table:table-cell table:style-name="ce40" table:formula="of:=([.J15]-[.I15])/[.I15]" office:value-type="percentage" office:value="0.0677165730644636" calcext:value-type="percentage">
            <text:p>6.77%</text:p>
          </table:table-cell>
          <table:table-cell table:style-name="ce34" table:formula="of:=([.K15]-[.J15])/[.J15]" office:value-type="percentage" office:value="0.00550961660523672" calcext:value-type="percentage">
            <text:p>0.55%</text:p>
          </table:table-cell>
          <table:table-cell table:style-name="ce5" table:formula="of:=([.L15]-[.I15])/[.I15]" office:value-type="percentage" office:value="0.027046867957922" calcext:value-type="percentage">
            <text:p>2.70%</text:p>
          </table:table-cell>
          <table:table-cell table:style-name="ce5" table:formula="of:=([.M15]-[.L15])/[.L15]" office:value-type="percentage" office:value="0.0156576889203857" calcext:value-type="percentage">
            <text:p>1.57%</text:p>
          </table:table-cell>
          <table:table-cell table:style-name="ce45" table:formula="of:=([.N15]-[.M15])/[.M15]" office:value-type="percentage" office:value="0.0535516724687644" calcext:value-type="percentage">
            <text:p>5.36%</text:p>
          </table:table-cell>
          <table:table-cell table:style-name="ce5"/>
          <table:table-cell table:style-name="ce5" table:formula="of:=([.$M15]-[.$K15])/[.$I15]" office:value-type="percentage" office:value="-0.0304712337020424" calcext:value-type="percentage">
            <text:p>-3.05%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+small-alloc-0.5&quot;)" office:value-type="string" office:string-value="random-callstack-ubench+small-alloc-0.5" calcext:value-type="string">
            <text:p>random-callstack-ubench+small-alloc-0.5</text:p>
          </table:table-cell>
          <table:table-cell table:style-name="ce10"/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C$2:C$6,$B$2:$B$6,LAMBDA(value,column,column&amp;&quot;&quot;='&quot;&quot;&amp;value&amp;&quot;&quot;'&quot;&quot;)),LAMBDA(acc,val,acc&amp;&quot;&quot; AND &quot;&quot;&amp;val))&amp;&quot;&quot;)&quot;&quot;)&quot;);1784442500)" office:value-type="float" office:value="1784442500" calcext:value-type="float">
            <text:p>1.7844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D$2:D$6,$B$2:$B$6,LAMBDA(value,column,column&amp;&quot;&quot;='&quot;&quot;&amp;value&amp;&quot;&quot;'&quot;&quot;)),LAMBDA(acc,val,acc&amp;&quot;&quot; AND &quot;&quot;&amp;val))&amp;&quot;&quot;)&quot;&quot;)&quot;);2164421000)" office:value-type="float" office:value="2164421000" calcext:value-type="float">
            <text:p>2.1644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E$2:E$6,$B$2:$B$6,LAMBDA(value,column,column&amp;&quot;&quot;='&quot;&quot;&amp;value&amp;&quot;&quot;'&quot;&quot;)),LAMBDA(acc,val,acc&amp;&quot;&quot; AND &quot;&quot;&amp;val))&amp;&quot;&quot;)&quot;&quot;)&quot;);2419158000)" office:value-type="float" office:value="2419158000" calcext:value-type="float">
            <text:p>2.419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F$2:F$6,$B$2:$B$6,LAMBDA(value,column,column&amp;&quot;&quot;='&quot;&quot;&amp;value&amp;&quot;&quot;'&quot;&quot;)),LAMBDA(acc,val,acc&amp;&quot;&quot; AND &quot;&quot;&amp;val))&amp;&quot;&quot;)&quot;&quot;)&quot;);2462990500)" office:value-type="float" office:value="2462990500" calcext:value-type="float">
            <text:p>2.4630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G$2:G$6,$B$2:$B$6,LAMBDA(value,column,column&amp;&quot;&quot;='&quot;&quot;&amp;value&amp;&quot;&quot;'&quot;&quot;)),LAMBDA(acc,val,acc&amp;&quot;&quot; AND &quot;&quot;&amp;val))&amp;&quot;&quot;)&quot;&quot;)&quot;);2337813000)" office:value-type="float" office:value="2337813000" calcext:value-type="float">
            <text:p>2.3378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H$2:H$6,$B$2:$B$6,LAMBDA(value,column,column&amp;&quot;&quot;='&quot;&quot;&amp;value&amp;&quot;&quot;'&quot;&quot;)),LAMBDA(acc,val,acc&amp;&quot;&quot; AND &quot;&quot;&amp;val))&amp;&quot;&quot;)&quot;&quot;)&quot;);2363126500)" office:value-type="float" office:value="2363126500" calcext:value-type="float">
            <text:p>2.3631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I$2:I$6,$B$2:$B$6,LAMBDA(value,column,column&amp;&quot;&quot;='&quot;&quot;&amp;value&amp;&quot;&quot;'&quot;&quot;)),LAMBDA(acc,val,acc&amp;&quot;&quot; AND &quot;&quot;&amp;val))&amp;&quot;&quot;)&quot;&quot;)&quot;);2344408000)" office:value-type="float" office:value="2344408000" calcext:value-type="float">
            <text:p>2.3444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J$2:J$6,$B$2:$B$6,LAMBDA(value,column,column&amp;&quot;&quot;='&quot;&quot;&amp;value&amp;&quot;&quot;'&quot;&quot;)),LAMBDA(acc,val,acc&amp;&quot;&quot; AND &quot;&quot;&amp;val))&amp;&quot;&quot;)&quot;&quot;)&quot;);2537044000)" office:value-type="float" office:value="2537044000" calcext:value-type="float">
            <text:p>2.5370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K$2:K$6,$B$2:$B$6,LAMBDA(value,column,column&amp;&quot;&quot;='&quot;&quot;&amp;value&amp;&quot;&quot;'&quot;&quot;)),LAMBDA(acc,val,acc&amp;&quot;&quot; AND &quot;&quot;&amp;val))&amp;&quot;&quot;)&quot;&quot;)&quot;);2558758500)" office:value-type="float" office:value="2558758500" calcext:value-type="float">
            <text:p>2.5588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L$2:L$6,$B$2:$B$6,LAMBDA(value,column,column&amp;&quot;&quot;='&quot;&quot;&amp;value&amp;&quot;&quot;'&quot;&quot;)),LAMBDA(acc,val,acc&amp;&quot;&quot; AND &quot;&quot;&amp;val))&amp;&quot;&quot;)&quot;&quot;)&quot;);2422972000)" office:value-type="float" office:value="2422972000" calcext:value-type="float">
            <text:p>2.4230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M$2:M$6,$B$2:$B$6,LAMBDA(value,column,column&amp;&quot;&quot;='&quot;&quot;&amp;value&amp;&quot;&quot;'&quot;&quot;)),LAMBDA(acc,val,acc&amp;&quot;&quot; AND &quot;&quot;&amp;val))&amp;&quot;&quot;)&quot;&quot;)&quot;);2429191500)" office:value-type="float" office:value="2429191500" calcext:value-type="float">
            <text:p>2.4292E+09</text:p>
          </table:table-cell>
          <table:table-cell table:style-name="ce11" table:formula="of:=IFERROR(__xludf.dummyfunction(&quot;QUERY(INDIRECT($D$20),&quot;&quot;SELECT &quot;&quot;&amp;$D$22&amp;&quot;&quot; WHERE (&quot;&quot;&amp;REDUCE($B$7&amp;&quot;&quot;='&quot;&quot;&amp;$A16&amp;&quot;&quot;'&quot;&quot;,MAP(N$2:N$6,$B$2:$B$6,LAMBDA(value,column,column&amp;&quot;&quot;='&quot;&quot;&amp;value&amp;&quot;&quot;'&quot;&quot;)),LAMBDA(acc,val,acc&amp;&quot;&quot; AND &quot;&quot;&amp;val))&amp;&quot;&quot;)&quot;&quot;)&quot;);2575630500)" office:value-type="float" office:value="2575630500" calcext:value-type="float">
            <text:p>2.5756E+09</text:p>
          </table:table-cell>
          <table:table-cell table:style-name="ce22" table:formula="of:=IFERROR(__xludf.dummyfunction(&quot;QUERY(INDIRECT($D$20),&quot;&quot;SELECT &quot;&quot;&amp;$D$23&amp;&quot;&quot; WHERE (&quot;&quot;&amp;REDUCE($B$7&amp;&quot;&quot;='&quot;&quot;&amp;$A16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office:value-type="float" office:value="1.17564865676635" calcext:value-type="float">
            <text:p>1.1756</text:p>
          </table:table-cell>
          <table:table-cell table:style-name="ce29" table:formula="of:=([.D16]-[.C16])/[.C16]" office:value-type="percentage" office:value="0.212939615594226" calcext:value-type="percentage">
            <text:p>21.29%</text:p>
          </table:table-cell>
          <table:table-cell table:style-name="ce29" table:formula="of:=([.E16]-[.D16])/[.D16]" office:value-type="percentage" office:value="0.117692907248636" calcext:value-type="percentage">
            <text:p>11.77%</text:p>
          </table:table-cell>
          <table:table-cell table:style-name="ce34" table:formula="of:=([.F16]-[.E16])/[.E16]" office:value-type="percentage" office:value="0.0181189074876465" calcext:value-type="percentage">
            <text:p>1.81%</text:p>
          </table:table-cell>
          <table:table-cell table:style-name="ce5" table:formula="of:=([.G16]-[.D16])/[.D16]" office:value-type="percentage" office:value="0.0801101079688286" calcext:value-type="percentage">
            <text:p>8.01%</text:p>
          </table:table-cell>
          <table:table-cell table:style-name="ce5" table:formula="of:=([.H16]-[.G16])/[.G16]" office:value-type="percentage" office:value="0.010827854922528" calcext:value-type="percentage">
            <text:p>1.08%</text:p>
          </table:table-cell>
          <table:table-cell table:style-name="ce29" table:formula="of:=([.I16]-[.D16])/[.D16]" office:value-type="percentage" office:value="0.0831571122253942" calcext:value-type="percentage">
            <text:p>8.32%</text:p>
          </table:table-cell>
          <table:table-cell table:style-name="ce40" table:formula="of:=([.J16]-[.I16])/[.I16]" office:value-type="percentage" office:value="0.0821682915260484" calcext:value-type="percentage">
            <text:p>8.22%</text:p>
          </table:table-cell>
          <table:table-cell table:style-name="ce34" table:formula="of:=([.K16]-[.J16])/[.J16]" office:value-type="percentage" office:value="0.00855897650967031" calcext:value-type="percentage">
            <text:p>0.86%</text:p>
          </table:table-cell>
          <table:table-cell table:style-name="ce5" table:formula="of:=([.L16]-[.I16])/[.I16]" office:value-type="percentage" office:value="0.0335112318333669" calcext:value-type="percentage">
            <text:p>3.35%</text:p>
          </table:table-cell>
          <table:table-cell table:style-name="ce5" table:formula="of:=([.M16]-[.L16])/[.L16]" office:value-type="percentage" office:value="0.00256688892814279" calcext:value-type="percentage">
            <text:p>0.26%</text:p>
          </table:table-cell>
          <table:table-cell table:style-name="ce45" table:formula="of:=([.N16]-[.M16])/[.M16]" office:value-type="percentage" office:value="0.0602830200912526" calcext:value-type="percentage">
            <text:p>6.03%</text:p>
          </table:table-cell>
          <table:table-cell table:style-name="ce5"/>
          <table:table-cell table:style-name="ce5" table:formula="of:=([.$M16]-[.$K16])/[.$I16]" office:value-type="percentage" office:value="-0.0552664041412587" calcext:value-type="percentage">
            <text:p>-5.53%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/>
          <table:table-cell table:style-name="ce8" table:number-columns-repeated="14"/>
          <table:table-cell table:style-name="ce2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Config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Data range</text:p>
          </table:table-cell>
          <table:table-cell table:style-name="ce17" office:value-type="string" calcext:value-type="string">
            <text:p>Data!A2:O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14" office:value-type="string" calcext:value-type="string">
            <text:p>Benchmarks column</text:p>
          </table:table-cell>
          <table:table-cell table:style-name="ce18" office:value-type="string" calcext:value-type="string">
            <text:p>Data!D2:D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Data column</text:p>
          </table:table-cell>
          <table:table-cell table:style-name="ce19" office:value-type="string" calcext:value-type="string">
            <text:p>F</text:p>
          </table:table-cell>
          <table:table-cell table:number-columns-repeated="4"/>
          <table:table-cell table:style-name="ce20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Secure call column</text:p>
          </table:table-cell>
          <table:table-cell table:style-name="ce1" office:value-type="string" calcext:value-type="string">
            <text:p>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ructions" table:style-name="ta6">
        <table:table-column table:style-name="co19" table:default-cell-style-name="Default"/>
        <table:table-column table:style-name="co20" table:default-cell-style-name="Default"/>
        <table:table-column table:style-name="co22" table:number-columns-repeated="13" table:default-cell-style-name="Default"/>
        <table:table-column table:style-name="co23" table:default-cell-style-name="Default"/>
        <table:table-column table:style-name="co27" table:number-columns-repeated="5" table:default-cell-style-name="Default"/>
        <table:table-column table:style-name="co28" table:number-columns-repeated="8" table:default-cell-style-name="Default"/>
        <table:table-column table:style-name="co15" table:number-columns-repeated="995" table:default-cell-style-name="Default"/>
        <table:table-row table:style-name="ro1">
          <table:table-cell/>
          <table:table-cell table:style-name="ce8" table:number-columns-repeated="14"/>
          <table:table-cell/>
          <table:table-cell table:style-name="ce26" office:value-type="string" calcext:value-type="string" table:number-columns-spanned="11" table:number-rows-spanned="1">
            <text:p>Overheads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Stack Revocatio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one</text:p>
          </table:table-cell>
          <table:table-cell table:number-columns-repeated="11" table:style-name="ce9" office:value-type="string" calcext:value-type="string">
            <text:p>uninit</text:p>
          </table:table-cell>
          <table:table-cell table:style-name="ce8" office:value-type="string" calcext:value-type="string">
            <text:p>uninit</text:p>
          </table:table-cell>
          <table:table-cell table:style-name="ce23" office:value-type="string" calcext:value-type="string" table:number-columns-spanned="1" table:number-rows-spanned="6">
            <text:p>Secure calls per 1000 insts</text:p>
          </table:table-cell>
          <table:table-cell table:style-name="ce26" office:value-type="string" calcext:value-type="string" table:number-columns-spanned="11" table:number-rows-spanned="1">
            <text:p>Uninit</text:p>
          </table:table-cell>
          <table:covered-table-cell table:number-columns-repeated="10"/>
          <table:table-cell table:number-columns-repeated="3"/>
          <table:table-cell table:style-name="ce23" table:number-columns-spanned="1" table:number-rows-spanned="3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 stack</text:p>
          </table:table-cell>
          <table:table-cell table:style-name="ce9" office:value-type="string" calcext:value-type="string">
            <text:p>N</text:p>
          </table:table-cell>
          <table:table-cell table:number-columns-repeated="6" table:style-name="ce9" office:value-type="string" calcext:value-type="string">
            <text:p>none</text:p>
          </table:table-cell>
          <table:table-cell table:number-columns-repeated="6" table:style-name="ce9" office:value-type="string" calcext:value-type="string">
            <text:p>reserve</text:p>
          </table:table-cell>
          <table:table-cell table:style-name="ce8" office:value-type="string" calcext:value-type="string">
            <text:p>reserve</text:p>
          </table:table-cell>
          <table:covered-table-cell/>
          <table:table-cell table:style-name="ce8"/>
          <table:table-cell table:style-name="ce27"/>
          <table:table-cell table:style-name="ce8" table:number-columns-repeated="3"/>
          <table:table-cell table:style-name="ce36" office:value-type="string" calcext:value-type="string" table:number-columns-spanned="6" table:number-rows-spanned="1">
            <text:p>Reserve</text:p>
          </table:table-cell>
          <table:covered-table-cell table:number-columns-repeated="4"/>
          <table:covered-table-cell table:style-name="ce42"/>
          <table:table-cell table:number-columns-repeated="3"/>
          <table:covered-table-cell/>
          <table:table-cell table:number-columns-repeated="993"/>
        </table:table-row>
        <table:table-row table:style-name="ro1">
          <table:table-cell table:style-name="ce2" office:value-type="string" calcext:value-type="string">
            <text:p>Return Encapsulation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9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trampoline</text:p>
          </table:table-cell>
          <table:table-cell table:number-columns-repeated="2" table:style-name="ce9" office:value-type="string" calcext:value-type="string">
            <text:p>isentry</text:p>
          </table:table-cell>
          <table:table-cell table:style-name="ce9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trampoline</text:p>
          </table:table-cell>
          <table:table-cell table:number-columns-repeated="3" table:style-name="ce9" office:value-type="string" calcext:value-type="string">
            <text:p>isentry</text:p>
          </table:table-cell>
          <table:table-cell table:style-name="ce8" office:value-type="string" calcext:value-type="string">
            <text:p>isentry</text:p>
          </table:table-cell>
          <table:covered-table-cell/>
          <table:table-cell table:style-name="ce8"/>
          <table:table-cell table:style-name="ce30" office:value-type="string" calcext:value-type="string" table:number-columns-spanned="2" table:number-rows-spanned="1">
            <text:p>Trampoline</text:p>
          </table:table-cell>
          <table:covered-table-cell table:style-name="ce31"/>
          <table:table-cell table:style-name="ce35" office:value-type="string" calcext:value-type="string" table:number-columns-spanned="2" table:number-rows-spanned="1">
            <text:p>Isentry</text:p>
          </table:table-cell>
          <table:covered-table-cell table:style-name="ce31"/>
          <table:table-cell table:style-name="ce27"/>
          <table:table-cell table:style-name="ce37" office:value-type="string" calcext:value-type="string" table:number-columns-spanned="2" table:number-rows-spanned="1">
            <text:p>Trampoline</text:p>
          </table:table-cell>
          <table:covered-table-cell table:style-name="ce31"/>
          <table:table-cell table:style-name="ce41" office:value-type="string" calcext:value-type="string" table:number-columns-spanned="3" table:number-rows-spanned="1">
            <text:p>Isentry</text:p>
          </table:table-cell>
          <table:covered-table-cell/>
          <table:covered-table-cell table:style-name="ce42"/>
          <table:table-cell table:number-columns-repeated="3"/>
          <table:covered-table-cell/>
          <table:table-cell table:number-columns-repeated="993"/>
        </table:table-row>
        <table:table-row table:style-name="ro1">
          <table:table-cell table:style-name="ce2" office:value-type="string" calcext:value-type="string">
            <text:p>Clear Registers</text:p>
          </table:table-cell>
          <table:table-cell table:style-name="ce9" office:value-type="string" calcext:value-type="string">
            <text:p>C</text:p>
          </table:table-cell>
          <table:table-cell table:number-columns-repeated="3"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number-columns-repeated="2"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noclear</text:p>
          </table:table-cell>
          <table:table-cell table:number-columns-repeated="2" table:style-name="ce9" office:value-type="string" calcext:value-type="string">
            <text:p>clear</text:p>
          </table:table-cell>
          <table:table-cell table:style-name="ce8" office:value-type="string" calcext:value-type="string">
            <text:p>clear</text:p>
          </table:table-cell>
          <table:covered-table-cell/>
          <table:table-cell table:style-name="ce8"/>
          <table:table-cell table:style-name="ce27"/>
          <table:table-cell table:style-name="ce32" office:value-type="string" calcext:value-type="string">
            <text:p>Clear</text:p>
          </table:table-cell>
          <table:table-cell table:style-name="ce8"/>
          <table:table-cell table:style-name="ce8" office:value-type="string" calcext:value-type="string">
            <text:p>Clear</text:p>
          </table:table-cell>
          <table:table-cell table:style-name="ce27"/>
          <table:table-cell table:style-name="ce38"/>
          <table:table-cell table:style-name="ce32" office:value-type="string" calcext:value-type="string">
            <text:p>Clear</text:p>
          </table:table-cell>
          <table:table-cell table:style-name="ce8"/>
          <table:table-cell table:style-name="ce8" office:value-type="string" calcext:value-type="string">
            <text:p>Clear</text:p>
          </table:table-cell>
          <table:table-cell table:style-name="ce43"/>
          <table:table-cell table:number-columns-repeated="997"/>
        </table:table-row>
        <table:table-row table:style-name="ro1">
          <table:table-cell table:style-name="ce2" office:value-type="string" calcext:value-type="string">
            <text:p>Reduce callee-saved registers</text:p>
          </table:table-cell>
          <table:table-cell table:style-name="ce9" office:value-type="string" calcext:value-type="string">
            <text:p>O</text:p>
          </table:table-cell>
          <table:table-cell table:number-columns-repeated="11" table:style-name="ce9" office:value-type="string" calcext:value-type="string">
            <text:p>reduce</text:p>
          </table:table-cell>
          <table:table-cell table:style-name="ce9" office:value-type="string" calcext:value-type="string">
            <text:p>noreduce</text:p>
          </table:table-cell>
          <table:table-cell table:style-name="ce8" office:value-type="string" calcext:value-type="string">
            <text:p>reduce</text:p>
          </table:table-cell>
          <table:covered-table-cell/>
          <table:table-cell table:style-name="ce8"/>
          <table:table-cell table:style-name="ce27"/>
          <table:table-cell table:style-name="ce32"/>
          <table:table-cell table:style-name="ce8" table:number-columns-repeated="2"/>
          <table:table-cell table:style-name="ce27"/>
          <table:table-cell table:style-name="ce38"/>
          <table:table-cell table:style-name="ce32"/>
          <table:table-cell table:style-name="ce8" table:number-columns-repeated="2"/>
          <table:table-cell table:style-name="ce43" office:value-type="string" calcext:value-type="string">
            <text:p>Reduc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8" office:value-type="string" calcext:value-type="string">
            <text:p>D</text:p>
          </table:table-cell>
          <table:table-cell table:number-columns-repeated="11"/>
          <table:table-cell table:style-name="ce1"/>
          <table:table-cell table:style-name="ce1" office:value-type="string" calcext:value-type="string">
            <text:p>Secure calls</text:p>
          </table:table-cell>
          <table:covered-table-cell/>
          <table:table-cell/>
          <table:table-cell table:style-name="ce28"/>
          <table:table-cell table:style-name="ce33"/>
          <table:table-cell table:number-columns-repeated="2"/>
          <table:table-cell table:style-name="ce28"/>
          <table:table-cell table:style-name="ce39"/>
          <table:table-cell table:style-name="ce33"/>
          <table:table-cell table:number-columns-repeated="2"/>
          <table:table-cell table:style-name="ce44"/>
          <table:table-cell table:number-columns-repeated="997"/>
        </table:table-row>
        <table:table-row table:style-name="ro1">
          <table:table-cell table:style-name="ce4" table:formula="of:=IFERROR(__xludf.dummyfunction(&quot;UNIQUE(FILTER(INDIRECT($D$23),INDIRECT($D$23)&lt;&gt;&quot;&quot;&quot;&quot;))&quot;);&quot;coremark&quot;)" office:value-type="string" office:string-value="coremark" calcext:value-type="string">
            <text:p>coremark</text:p>
          </table:table-cell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C$2:C$6,$B$2:$B$6,LAMBDA(value,column,column&amp;&quot;&quot;='&quot;&quot;&amp;value&amp;&quot;&quot;'&quot;&quot;)),LAMBDA(acc,val,acc&amp;&quot;&quot; AND &quot;&quot;&amp;val))&amp;&quot;&quot;)&quot;&quot;)&quot;);22954438)" office:value-type="float" office:value="22954438" calcext:value-type="float">
            <text:p>2.295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D$2:D$6,$B$2:$B$6,LAMBDA(value,column,column&amp;&quot;&quot;='&quot;&quot;&amp;value&amp;&quot;&quot;'&quot;&quot;)),LAMBDA(acc,val,acc&amp;&quot;&quot; AND &quot;&quot;&amp;val))&amp;&quot;&quot;)&quot;&quot;)&quot;);23104178)" office:value-type="float" office:value="23104178" calcext:value-type="float">
            <text:p>2.310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E$2:E$6,$B$2:$B$6,LAMBDA(value,column,column&amp;&quot;&quot;='&quot;&quot;&amp;value&amp;&quot;&quot;'&quot;&quot;)),LAMBDA(acc,val,acc&amp;&quot;&quot; AND &quot;&quot;&amp;val))&amp;&quot;&quot;)&quot;&quot;)&quot;);23232868)" office:value-type="float" office:value="23232868" calcext:value-type="float">
            <text:p>2.323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F$2:F$6,$B$2:$B$6,LAMBDA(value,column,column&amp;&quot;&quot;='&quot;&quot;&amp;value&amp;&quot;&quot;'&quot;&quot;)),LAMBDA(acc,val,acc&amp;&quot;&quot; AND &quot;&quot;&amp;val))&amp;&quot;&quot;)&quot;&quot;)&quot;);23262271)" office:value-type="float" office:value="23262271" calcext:value-type="float">
            <text:p>2.326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G$2:G$6,$B$2:$B$6,LAMBDA(value,column,column&amp;&quot;&quot;='&quot;&quot;&amp;value&amp;&quot;&quot;'&quot;&quot;)),LAMBDA(acc,val,acc&amp;&quot;&quot; AND &quot;&quot;&amp;val))&amp;&quot;&quot;)&quot;&quot;)&quot;);23195105)" office:value-type="float" office:value="23195105" calcext:value-type="float">
            <text:p>2.320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H$2:H$6,$B$2:$B$6,LAMBDA(value,column,column&amp;&quot;&quot;='&quot;&quot;&amp;value&amp;&quot;&quot;'&quot;&quot;)),LAMBDA(acc,val,acc&amp;&quot;&quot; AND &quot;&quot;&amp;val))&amp;&quot;&quot;)&quot;&quot;)&quot;);23222334)" office:value-type="float" office:value="23222334" calcext:value-type="float">
            <text:p>2.322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I$2:I$6,$B$2:$B$6,LAMBDA(value,column,column&amp;&quot;&quot;='&quot;&quot;&amp;value&amp;&quot;&quot;'&quot;&quot;)),LAMBDA(acc,val,acc&amp;&quot;&quot; AND &quot;&quot;&amp;val))&amp;&quot;&quot;)&quot;&quot;)&quot;);23287408)" office:value-type="float" office:value="23287408" calcext:value-type="float">
            <text:p>2.329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J$2:J$6,$B$2:$B$6,LAMBDA(value,column,column&amp;&quot;&quot;='&quot;&quot;&amp;value&amp;&quot;&quot;'&quot;&quot;)),LAMBDA(acc,val,acc&amp;&quot;&quot; AND &quot;&quot;&amp;val))&amp;&quot;&quot;)&quot;&quot;)&quot;);23454013)" office:value-type="float" office:value="23454013" calcext:value-type="float">
            <text:p>2.345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K$2:K$6,$B$2:$B$6,LAMBDA(value,column,column&amp;&quot;&quot;='&quot;&quot;&amp;value&amp;&quot;&quot;'&quot;&quot;)),LAMBDA(acc,val,acc&amp;&quot;&quot; AND &quot;&quot;&amp;val))&amp;&quot;&quot;)&quot;&quot;)&quot;);23482129)" office:value-type="float" office:value="23482129" calcext:value-type="float">
            <text:p>2.348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L$2:L$6,$B$2:$B$6,LAMBDA(value,column,column&amp;&quot;&quot;='&quot;&quot;&amp;value&amp;&quot;&quot;'&quot;&quot;)),LAMBDA(acc,val,acc&amp;&quot;&quot; AND &quot;&quot;&amp;val))&amp;&quot;&quot;)&quot;&quot;)&quot;);23414511)" office:value-type="float" office:value="23414511" calcext:value-type="float">
            <text:p>2.341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M$2:M$6,$B$2:$B$6,LAMBDA(value,column,column&amp;&quot;&quot;='&quot;&quot;&amp;value&amp;&quot;&quot;'&quot;&quot;)),LAMBDA(acc,val,acc&amp;&quot;&quot; AND &quot;&quot;&amp;val))&amp;&quot;&quot;)&quot;&quot;)&quot;);23442519)" office:value-type="float" office:value="23442519" calcext:value-type="float">
            <text:p>2.344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8&amp;&quot;&quot;'&quot;&quot;,MAP(N$2:N$6,$B$2:$B$6,LAMBDA(value,column,column&amp;&quot;&quot;='&quot;&quot;&amp;value&amp;&quot;&quot;'&quot;&quot;)),LAMBDA(acc,val,acc&amp;&quot;&quot; AND &quot;&quot;&amp;val))&amp;&quot;&quot;)&quot;&quot;)&quot;);25783255)" office:value-type="float" office:value="25783255" calcext:value-type="float">
            <text:p>2.578E+07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8&amp;&quot;&quot;'&quot;&quot;,MAP(O$2:O$6,$B$2:$B$6,LAMBDA(value,column,column&amp;&quot;&quot;='&quot;&quot;&amp;value&amp;&quot;&quot;'&quot;&quot;)),LAMBDA(acc,val,acc&amp;&quot;&quot; AND &quot;&quot;&amp;val))&amp;&quot;&quot;)&quot;&quot;)&quot;);603)" office:value-type="float" office:value="603" calcext:value-type="float">
            <text:p>603</text:p>
          </table:table-cell>
          <table:table-cell table:style-name="ce24" table:formula="of:=[.O8]*1000/[.M8]" office:value-type="float" office:value="0.0257224916827411" calcext:value-type="float">
            <text:p>0.0257</text:p>
          </table:table-cell>
          <table:table-cell table:style-name="ce5" table:formula="of:=([.D8]-[.C8])/[.C8]" office:value-type="percentage" office:value="0.00652335726973581" calcext:value-type="percentage">
            <text:p>0.65%</text:p>
          </table:table-cell>
          <table:table-cell table:style-name="ce29" table:formula="of:=([.E8]-[.D8])/[.D8]" office:value-type="percentage" office:value="0.00556998825060991" calcext:value-type="percentage">
            <text:p>0.56%</text:p>
          </table:table-cell>
          <table:table-cell table:style-name="ce34" table:formula="of:=([.F8]-[.E8])/[.E8]" office:value-type="percentage" office:value="0.00126557771515768" calcext:value-type="percentage">
            <text:p>0.13%</text:p>
          </table:table-cell>
          <table:table-cell table:style-name="ce5" table:formula="of:=([.G8]-[.D8])/[.D8]" office:value-type="percentage" office:value="0.00393552196490176" calcext:value-type="percentage">
            <text:p>0.39%</text:p>
          </table:table-cell>
          <table:table-cell table:style-name="ce5" table:formula="of:=([.H8]-[.G8])/[.G8]" office:value-type="percentage" office:value="0.00117391147830544" calcext:value-type="percentage">
            <text:p>0.12%</text:p>
          </table:table-cell>
          <table:table-cell table:style-name="ce29" table:formula="of:=([.I8]-[.D8])/[.D8]" office:value-type="percentage" office:value="0.00793060025766768" calcext:value-type="percentage">
            <text:p>0.79%</text:p>
          </table:table-cell>
          <table:table-cell table:style-name="ce40" table:formula="of:=([.J8]-[.I8])/[.I8]" office:value-type="percentage" office:value="0.0071542955746728" calcext:value-type="percentage">
            <text:p>0.72%</text:p>
          </table:table-cell>
          <table:table-cell table:style-name="ce34" table:formula="of:=([.K8]-[.J8])/[.J8]" office:value-type="percentage" office:value="0.00119877140001585" calcext:value-type="percentage">
            <text:p>0.12%</text:p>
          </table:table-cell>
          <table:table-cell table:style-name="ce5" table:formula="of:=([.L8]-[.I8])/[.I8]" office:value-type="percentage" office:value="0.0054580140477635" calcext:value-type="percentage">
            <text:p>0.55%</text:p>
          </table:table-cell>
          <table:table-cell table:style-name="ce5" table:formula="of:=([.M8]-[.I8])/[.I8]" office:value-type="percentage" office:value="0.00666072411322033" calcext:value-type="percentage">
            <text:p>0.67%</text:p>
          </table:table-cell>
          <table:table-cell table:style-name="ce45" table:formula="of:=([.N8]-[.M8])/[.M8]" office:value-type="percentage" office:value="0.0998500203839016" calcext:value-type="percentage">
            <text:p>9.99%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4" table:formula="of:=IFERROR(__xludf.dummyfunction(&quot;&quot;&quot;COMPUTED_VALUE&quot;&quot;&quot;);&quot;libc-bench_malloc&quot;)" office:value-type="string" office:string-value="libc-bench_malloc" calcext:value-type="string">
            <text:p>libc-bench_malloc</text:p>
          </table:table-cell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C$2:C$6,$B$2:$B$6,LAMBDA(value,column,column&amp;&quot;&quot;='&quot;&quot;&amp;value&amp;&quot;&quot;'&quot;&quot;)),LAMBDA(acc,val,acc&amp;&quot;&quot; AND &quot;&quot;&amp;val))&amp;&quot;&quot;)&quot;&quot;)&quot;);12128905)" office:value-type="float" office:value="12128905" calcext:value-type="float">
            <text:p>1.213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D$2:D$6,$B$2:$B$6,LAMBDA(value,column,column&amp;&quot;&quot;='&quot;&quot;&amp;value&amp;&quot;&quot;'&quot;&quot;)),LAMBDA(acc,val,acc&amp;&quot;&quot; AND &quot;&quot;&amp;val))&amp;&quot;&quot;)&quot;&quot;)&quot;);13244913)" office:value-type="float" office:value="13244913" calcext:value-type="float">
            <text:p>1.324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E$2:E$6,$B$2:$B$6,LAMBDA(value,column,column&amp;&quot;&quot;='&quot;&quot;&amp;value&amp;&quot;&quot;'&quot;&quot;)),LAMBDA(acc,val,acc&amp;&quot;&quot; AND &quot;&quot;&amp;val))&amp;&quot;&quot;)&quot;&quot;)&quot;);14121193)" office:value-type="float" office:value="14121193" calcext:value-type="float">
            <text:p>1.412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F$2:F$6,$B$2:$B$6,LAMBDA(value,column,column&amp;&quot;&quot;='&quot;&quot;&amp;value&amp;&quot;&quot;'&quot;&quot;)),LAMBDA(acc,val,acc&amp;&quot;&quot; AND &quot;&quot;&amp;val))&amp;&quot;&quot;)&quot;&quot;)&quot;);14193189)" office:value-type="float" office:value="14193189" calcext:value-type="float">
            <text:p>1.419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G$2:G$6,$B$2:$B$6,LAMBDA(value,column,column&amp;&quot;&quot;='&quot;&quot;&amp;value&amp;&quot;&quot;'&quot;&quot;)),LAMBDA(acc,val,acc&amp;&quot;&quot; AND &quot;&quot;&amp;val))&amp;&quot;&quot;)&quot;&quot;)&quot;);13841075)" office:value-type="float" office:value="13841075" calcext:value-type="float">
            <text:p>1.384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H$2:H$6,$B$2:$B$6,LAMBDA(value,column,column&amp;&quot;&quot;='&quot;&quot;&amp;value&amp;&quot;&quot;'&quot;&quot;)),LAMBDA(acc,val,acc&amp;&quot;&quot; AND &quot;&quot;&amp;val))&amp;&quot;&quot;)&quot;&quot;)&quot;);13913071)" office:value-type="float" office:value="13913071" calcext:value-type="float">
            <text:p>1.391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I$2:I$6,$B$2:$B$6,LAMBDA(value,column,column&amp;&quot;&quot;='&quot;&quot;&amp;value&amp;&quot;&quot;'&quot;&quot;)),LAMBDA(acc,val,acc&amp;&quot;&quot; AND &quot;&quot;&amp;val))&amp;&quot;&quot;)&quot;&quot;)&quot;);13482104)" office:value-type="float" office:value="13482104" calcext:value-type="float">
            <text:p>1.348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J$2:J$6,$B$2:$B$6,LAMBDA(value,column,column&amp;&quot;&quot;='&quot;&quot;&amp;value&amp;&quot;&quot;'&quot;&quot;)),LAMBDA(acc,val,acc&amp;&quot;&quot; AND &quot;&quot;&amp;val))&amp;&quot;&quot;)&quot;&quot;)&quot;);14556424)" office:value-type="float" office:value="14556424" calcext:value-type="float">
            <text:p>1.456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K$2:K$6,$B$2:$B$6,LAMBDA(value,column,column&amp;&quot;&quot;='&quot;&quot;&amp;value&amp;&quot;&quot;'&quot;&quot;)),LAMBDA(acc,val,acc&amp;&quot;&quot; AND &quot;&quot;&amp;val))&amp;&quot;&quot;)&quot;&quot;)&quot;);14628420)" office:value-type="float" office:value="14628420" calcext:value-type="float">
            <text:p>1.463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L$2:L$6,$B$2:$B$6,LAMBDA(value,column,column&amp;&quot;&quot;='&quot;&quot;&amp;value&amp;&quot;&quot;'&quot;&quot;)),LAMBDA(acc,val,acc&amp;&quot;&quot; AND &quot;&quot;&amp;val))&amp;&quot;&quot;)&quot;&quot;)&quot;);14276306)" office:value-type="float" office:value="14276306" calcext:value-type="float">
            <text:p>1.428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M$2:M$6,$B$2:$B$6,LAMBDA(value,column,column&amp;&quot;&quot;='&quot;&quot;&amp;value&amp;&quot;&quot;'&quot;&quot;)),LAMBDA(acc,val,acc&amp;&quot;&quot; AND &quot;&quot;&amp;val))&amp;&quot;&quot;)&quot;&quot;)&quot;);14348302)" office:value-type="float" office:value="14348302" calcext:value-type="float">
            <text:p>1.435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9&amp;&quot;&quot;'&quot;&quot;,MAP(N$2:N$6,$B$2:$B$6,LAMBDA(value,column,column&amp;&quot;&quot;='&quot;&quot;&amp;value&amp;&quot;&quot;'&quot;&quot;)),LAMBDA(acc,val,acc&amp;&quot;&quot; AND &quot;&quot;&amp;val))&amp;&quot;&quot;)&quot;&quot;)&quot;);14348618)" office:value-type="float" office:value="14348618" calcext:value-type="float">
            <text:p>1.435E+07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9&amp;&quot;&quot;'&quot;&quot;,MAP(O$2:O$6,$B$2:$B$6,LAMBDA(value,column,column&amp;&quot;&quot;='&quot;&quot;&amp;value&amp;&quot;&quot;'&quot;&quot;)),LAMBDA(acc,val,acc&amp;&quot;&quot; AND &quot;&quot;&amp;val))&amp;&quot;&quot;)&quot;&quot;)&quot;);18000)" office:value-type="float" office:value="18000" calcext:value-type="float">
            <text:p>18,000</text:p>
          </table:table-cell>
          <table:table-cell table:style-name="ce24" table:formula="of:=[.O9]*1000/[.M9]" office:value-type="float" office:value="1.25450384303313" calcext:value-type="float">
            <text:p>1.2545</text:p>
          </table:table-cell>
          <table:table-cell table:style-name="ce5" table:formula="of:=([.D9]-[.C9])/[.C9]" office:value-type="percentage" office:value="0.0920122632669643" calcext:value-type="percentage">
            <text:p>9.20%</text:p>
          </table:table-cell>
          <table:table-cell table:style-name="ce29" table:formula="of:=([.E9]-[.D9])/[.D9]" office:value-type="percentage" office:value="0.0661597399696019" calcext:value-type="percentage">
            <text:p>6.62%</text:p>
          </table:table-cell>
          <table:table-cell table:style-name="ce34" table:formula="of:=([.F9]-[.E9])/[.E9]" office:value-type="percentage" office:value="0.00509843608822569" calcext:value-type="percentage">
            <text:p>0.51%</text:p>
          </table:table-cell>
          <table:table-cell table:style-name="ce5" table:formula="of:=([.G9]-[.D9])/[.D9]" office:value-type="percentage" office:value="0.0450106391789814" calcext:value-type="percentage">
            <text:p>4.50%</text:p>
          </table:table-cell>
          <table:table-cell table:style-name="ce5" table:formula="of:=([.H9]-[.G9])/[.G9]" office:value-type="percentage" office:value="0.00520161909389264" calcext:value-type="percentage">
            <text:p>0.52%</text:p>
          </table:table-cell>
          <table:table-cell table:style-name="ce29" table:formula="of:=([.I9]-[.D9])/[.D9]" office:value-type="percentage" office:value="0.0179080828994498" calcext:value-type="percentage">
            <text:p>1.79%</text:p>
          </table:table-cell>
          <table:table-cell table:style-name="ce40" table:formula="of:=([.J9]-[.I9])/[.I9]" office:value-type="percentage" office:value="0.079684891913013" calcext:value-type="percentage">
            <text:p>7.97%</text:p>
          </table:table-cell>
          <table:table-cell table:style-name="ce34" table:formula="of:=([.K9]-[.J9])/[.J9]" office:value-type="percentage" office:value="0.00494599497788743" calcext:value-type="percentage">
            <text:p>0.49%</text:p>
          </table:table-cell>
          <table:table-cell table:style-name="ce5" table:formula="of:=([.L9]-[.I9])/[.I9]" office:value-type="percentage" office:value="0.0589078677927421" calcext:value-type="percentage">
            <text:p>5.89%</text:p>
          </table:table-cell>
          <table:table-cell table:style-name="ce5" table:formula="of:=([.M9]-[.I9])/[.I9]" office:value-type="percentage" office:value="0.0642479838458448" calcext:value-type="percentage">
            <text:p>6.42%</text:p>
          </table:table-cell>
          <table:table-cell table:style-name="ce45" table:formula="of:=([.N9]-[.M9])/[.M9]" office:value-type="percentage" office:value="0.0000220235119110261" calcext:value-type="percentage">
            <text:p>0.00%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4" table:formula="of:=IFERROR(__xludf.dummyfunction(&quot;&quot;&quot;COMPUTED_VALUE&quot;&quot;&quot;);&quot;libc-bench_string&quot;)" office:value-type="string" office:string-value="libc-bench_string" calcext:value-type="string">
            <text:p>libc-bench_string</text:p>
          </table:table-cell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C$2:C$6,$B$2:$B$6,LAMBDA(value,column,column&amp;&quot;&quot;='&quot;&quot;&amp;value&amp;&quot;&quot;'&quot;&quot;)),LAMBDA(acc,val,acc&amp;&quot;&quot; AND &quot;&quot;&amp;val))&amp;&quot;&quot;)&quot;&quot;)&quot;);24994514)" office:value-type="float" office:value="24994514" calcext:value-type="float">
            <text:p>2.499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D$2:D$6,$B$2:$B$6,LAMBDA(value,column,column&amp;&quot;&quot;='&quot;&quot;&amp;value&amp;&quot;&quot;'&quot;&quot;)),LAMBDA(acc,val,acc&amp;&quot;&quot; AND &quot;&quot;&amp;val))&amp;&quot;&quot;)&quot;&quot;)&quot;);25612926)" office:value-type="float" office:value="25612926" calcext:value-type="float">
            <text:p>2.561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E$2:E$6,$B$2:$B$6,LAMBDA(value,column,column&amp;&quot;&quot;='&quot;&quot;&amp;value&amp;&quot;&quot;'&quot;&quot;)),LAMBDA(acc,val,acc&amp;&quot;&quot; AND &quot;&quot;&amp;val))&amp;&quot;&quot;)&quot;&quot;)&quot;);25661630)" office:value-type="float" office:value="25661630" calcext:value-type="float">
            <text:p>2.566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F$2:F$6,$B$2:$B$6,LAMBDA(value,column,column&amp;&quot;&quot;='&quot;&quot;&amp;value&amp;&quot;&quot;'&quot;&quot;)),LAMBDA(acc,val,acc&amp;&quot;&quot; AND &quot;&quot;&amp;val))&amp;&quot;&quot;)&quot;&quot;)&quot;);25665226)" office:value-type="float" office:value="25665226" calcext:value-type="float">
            <text:p>2.567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G$2:G$6,$B$2:$B$6,LAMBDA(value,column,column&amp;&quot;&quot;='&quot;&quot;&amp;value&amp;&quot;&quot;'&quot;&quot;)),LAMBDA(acc,val,acc&amp;&quot;&quot; AND &quot;&quot;&amp;val))&amp;&quot;&quot;)&quot;&quot;)&quot;);25647070)" office:value-type="float" office:value="25647070" calcext:value-type="float">
            <text:p>2.565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H$2:H$6,$B$2:$B$6,LAMBDA(value,column,column&amp;&quot;&quot;='&quot;&quot;&amp;value&amp;&quot;&quot;'&quot;&quot;)),LAMBDA(acc,val,acc&amp;&quot;&quot; AND &quot;&quot;&amp;val))&amp;&quot;&quot;)&quot;&quot;)&quot;);25650666)" office:value-type="float" office:value="25650666" calcext:value-type="float">
            <text:p>2.565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I$2:I$6,$B$2:$B$6,LAMBDA(value,column,column&amp;&quot;&quot;='&quot;&quot;&amp;value&amp;&quot;&quot;'&quot;&quot;)),LAMBDA(acc,val,acc&amp;&quot;&quot; AND &quot;&quot;&amp;val))&amp;&quot;&quot;)&quot;&quot;)&quot;);25707189)" office:value-type="float" office:value="25707189" calcext:value-type="float">
            <text:p>2.571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J$2:J$6,$B$2:$B$6,LAMBDA(value,column,column&amp;&quot;&quot;='&quot;&quot;&amp;value&amp;&quot;&quot;'&quot;&quot;)),LAMBDA(acc,val,acc&amp;&quot;&quot; AND &quot;&quot;&amp;val))&amp;&quot;&quot;)&quot;&quot;)&quot;);25765853)" office:value-type="float" office:value="25765853" calcext:value-type="float">
            <text:p>2.577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K$2:K$6,$B$2:$B$6,LAMBDA(value,column,column&amp;&quot;&quot;='&quot;&quot;&amp;value&amp;&quot;&quot;'&quot;&quot;)),LAMBDA(acc,val,acc&amp;&quot;&quot; AND &quot;&quot;&amp;val))&amp;&quot;&quot;)&quot;&quot;)&quot;);25769449)" office:value-type="float" office:value="25769449" calcext:value-type="float">
            <text:p>2.577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L$2:L$6,$B$2:$B$6,LAMBDA(value,column,column&amp;&quot;&quot;='&quot;&quot;&amp;value&amp;&quot;&quot;'&quot;&quot;)),LAMBDA(acc,val,acc&amp;&quot;&quot; AND &quot;&quot;&amp;val))&amp;&quot;&quot;)&quot;&quot;)&quot;);25751293)" office:value-type="float" office:value="25751293" calcext:value-type="float">
            <text:p>2.575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M$2:M$6,$B$2:$B$6,LAMBDA(value,column,column&amp;&quot;&quot;='&quot;&quot;&amp;value&amp;&quot;&quot;'&quot;&quot;)),LAMBDA(acc,val,acc&amp;&quot;&quot; AND &quot;&quot;&amp;val))&amp;&quot;&quot;)&quot;&quot;)&quot;);25754889)" office:value-type="float" office:value="25754889" calcext:value-type="float">
            <text:p>2.575E+07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0&amp;&quot;&quot;'&quot;&quot;,MAP(N$2:N$6,$B$2:$B$6,LAMBDA(value,column,column&amp;&quot;&quot;='&quot;&quot;&amp;value&amp;&quot;&quot;'&quot;&quot;)),LAMBDA(acc,val,acc&amp;&quot;&quot; AND &quot;&quot;&amp;val))&amp;&quot;&quot;)&quot;&quot;)&quot;);25755301)" office:value-type="float" office:value="25755301" calcext:value-type="float">
            <text:p>2.576E+07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0&amp;&quot;&quot;'&quot;&quot;,MAP(O$2:O$6,$B$2:$B$6,LAMBDA(value,column,column&amp;&quot;&quot;='&quot;&quot;&amp;value&amp;&quot;&quot;'&quot;&quot;)),LAMBDA(acc,val,acc&amp;&quot;&quot; AND &quot;&quot;&amp;val))&amp;&quot;&quot;)&quot;&quot;)&quot;);898)" office:value-type="float" office:value="898" calcext:value-type="float">
            <text:p>898</text:p>
          </table:table-cell>
          <table:table-cell table:style-name="ce24" table:formula="of:=[.O10]*1000/[.M10]" office:value-type="float" office:value="0.0348671663853803" calcext:value-type="float">
            <text:p>0.0349</text:p>
          </table:table-cell>
          <table:table-cell table:style-name="ce5" table:formula="of:=([.D10]-[.C10])/[.C10]" office:value-type="percentage" office:value="0.024741909364591" calcext:value-type="percentage">
            <text:p>2.47%</text:p>
          </table:table-cell>
          <table:table-cell table:style-name="ce29" table:formula="of:=([.E10]-[.D10])/[.D10]" office:value-type="percentage" office:value="0.00190153987092299" calcext:value-type="percentage">
            <text:p>0.19%</text:p>
          </table:table-cell>
          <table:table-cell table:style-name="ce34" table:formula="of:=([.F10]-[.E10])/[.E10]" office:value-type="percentage" office:value="0.000140131394615229" calcext:value-type="percentage">
            <text:p>0.01%</text:p>
          </table:table-cell>
          <table:table-cell table:style-name="ce5" table:formula="of:=([.G10]-[.D10])/[.D10]" office:value-type="percentage" office:value="0.00133307690031198" calcext:value-type="percentage">
            <text:p>0.13%</text:p>
          </table:table-cell>
          <table:table-cell table:style-name="ce5" table:formula="of:=([.H10]-[.G10])/[.G10]" office:value-type="percentage" office:value="0.000140210948073211" calcext:value-type="percentage">
            <text:p>0.01%</text:p>
          </table:table-cell>
          <table:table-cell table:style-name="ce29" table:formula="of:=([.I10]-[.D10])/[.D10]" office:value-type="percentage" office:value="0.00368029017848254" calcext:value-type="percentage">
            <text:p>0.37%</text:p>
          </table:table-cell>
          <table:table-cell table:style-name="ce40" table:formula="of:=([.J10]-[.I10])/[.I10]" office:value-type="percentage" office:value="0.0022820075738347" calcext:value-type="percentage">
            <text:p>0.23%</text:p>
          </table:table-cell>
          <table:table-cell table:style-name="ce34" table:formula="of:=([.K10]-[.J10])/[.J10]" office:value-type="percentage" office:value="0.000139564562446273" calcext:value-type="percentage">
            <text:p>0.01%</text:p>
          </table:table-cell>
          <table:table-cell table:style-name="ce5" table:formula="of:=([.L10]-[.I10])/[.I10]" office:value-type="percentage" office:value="0.00171562904057694" calcext:value-type="percentage">
            <text:p>0.17%</text:p>
          </table:table-cell>
          <table:table-cell table:style-name="ce5" table:formula="of:=([.M10]-[.I10])/[.I10]" office:value-type="percentage" office:value="0.00185551209041175" calcext:value-type="percentage">
            <text:p>0.19%</text:p>
          </table:table-cell>
          <table:table-cell table:style-name="ce45" table:formula="of:=([.N10]-[.M10])/[.M10]" office:value-type="percentage" office:value="0.0000159969627514217" calcext:value-type="percentage">
            <text:p>0.00%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4" table:formula="of:=IFERROR(__xludf.dummyfunction(&quot;&quot;&quot;COMPUTED_VALUE&quot;&quot;&quot;);&quot;libc-bench_regex&quot;)" office:value-type="string" office:string-value="libc-bench_regex" calcext:value-type="string">
            <text:p>libc-bench_regex</text:p>
          </table:table-cell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C$2:C$6,$B$2:$B$6,LAMBDA(value,column,column&amp;&quot;&quot;='&quot;&quot;&amp;value&amp;&quot;&quot;'&quot;&quot;)),LAMBDA(acc,val,acc&amp;&quot;&quot; AND &quot;&quot;&amp;val))&amp;&quot;&quot;)&quot;&quot;)&quot;);427772)" office:value-type="float" office:value="427772" calcext:value-type="float">
            <text:p>4.278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D$2:D$6,$B$2:$B$6,LAMBDA(value,column,column&amp;&quot;&quot;='&quot;&quot;&amp;value&amp;&quot;&quot;'&quot;&quot;)),LAMBDA(acc,val,acc&amp;&quot;&quot; AND &quot;&quot;&amp;val))&amp;&quot;&quot;)&quot;&quot;)&quot;);492031)" office:value-type="float" office:value="492031" calcext:value-type="float">
            <text:p>4.920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E$2:E$6,$B$2:$B$6,LAMBDA(value,column,column&amp;&quot;&quot;='&quot;&quot;&amp;value&amp;&quot;&quot;'&quot;&quot;)),LAMBDA(acc,val,acc&amp;&quot;&quot; AND &quot;&quot;&amp;val))&amp;&quot;&quot;)&quot;&quot;)&quot;);493909)" office:value-type="float" office:value="493909" calcext:value-type="float">
            <text:p>4.939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F$2:F$6,$B$2:$B$6,LAMBDA(value,column,column&amp;&quot;&quot;='&quot;&quot;&amp;value&amp;&quot;&quot;'&quot;&quot;)),LAMBDA(acc,val,acc&amp;&quot;&quot; AND &quot;&quot;&amp;val))&amp;&quot;&quot;)&quot;&quot;)&quot;);494025)" office:value-type="float" office:value="494025" calcext:value-type="float">
            <text:p>4.940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G$2:G$6,$B$2:$B$6,LAMBDA(value,column,column&amp;&quot;&quot;='&quot;&quot;&amp;value&amp;&quot;&quot;'&quot;&quot;)),LAMBDA(acc,val,acc&amp;&quot;&quot; AND &quot;&quot;&amp;val))&amp;&quot;&quot;)&quot;&quot;)&quot;);493379)" office:value-type="float" office:value="493379" calcext:value-type="float">
            <text:p>4.934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H$2:H$6,$B$2:$B$6,LAMBDA(value,column,column&amp;&quot;&quot;='&quot;&quot;&amp;value&amp;&quot;&quot;'&quot;&quot;)),LAMBDA(acc,val,acc&amp;&quot;&quot; AND &quot;&quot;&amp;val))&amp;&quot;&quot;)&quot;&quot;)&quot;);493495)" office:value-type="float" office:value="493495" calcext:value-type="float">
            <text:p>4.935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I$2:I$6,$B$2:$B$6,LAMBDA(value,column,column&amp;&quot;&quot;='&quot;&quot;&amp;value&amp;&quot;&quot;'&quot;&quot;)),LAMBDA(acc,val,acc&amp;&quot;&quot; AND &quot;&quot;&amp;val))&amp;&quot;&quot;)&quot;&quot;)&quot;);505680)" office:value-type="float" office:value="505680" calcext:value-type="float">
            <text:p>5.057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J$2:J$6,$B$2:$B$6,LAMBDA(value,column,column&amp;&quot;&quot;='&quot;&quot;&amp;value&amp;&quot;&quot;'&quot;&quot;)),LAMBDA(acc,val,acc&amp;&quot;&quot; AND &quot;&quot;&amp;val))&amp;&quot;&quot;)&quot;&quot;)&quot;);507951)" office:value-type="float" office:value="507951" calcext:value-type="float">
            <text:p>5.080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K$2:K$6,$B$2:$B$6,LAMBDA(value,column,column&amp;&quot;&quot;='&quot;&quot;&amp;value&amp;&quot;&quot;'&quot;&quot;)),LAMBDA(acc,val,acc&amp;&quot;&quot; AND &quot;&quot;&amp;val))&amp;&quot;&quot;)&quot;&quot;)&quot;);508067)" office:value-type="float" office:value="508067" calcext:value-type="float">
            <text:p>5.081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L$2:L$6,$B$2:$B$6,LAMBDA(value,column,column&amp;&quot;&quot;='&quot;&quot;&amp;value&amp;&quot;&quot;'&quot;&quot;)),LAMBDA(acc,val,acc&amp;&quot;&quot; AND &quot;&quot;&amp;val))&amp;&quot;&quot;)&quot;&quot;)&quot;);507421)" office:value-type="float" office:value="507421" calcext:value-type="float">
            <text:p>5.074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M$2:M$6,$B$2:$B$6,LAMBDA(value,column,column&amp;&quot;&quot;='&quot;&quot;&amp;value&amp;&quot;&quot;'&quot;&quot;)),LAMBDA(acc,val,acc&amp;&quot;&quot; AND &quot;&quot;&amp;val))&amp;&quot;&quot;)&quot;&quot;)&quot;);507537)" office:value-type="float" office:value="507537" calcext:value-type="float">
            <text:p>5.075E+05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1&amp;&quot;&quot;'&quot;&quot;,MAP(N$2:N$6,$B$2:$B$6,LAMBDA(value,column,column&amp;&quot;&quot;='&quot;&quot;&amp;value&amp;&quot;&quot;'&quot;&quot;)),LAMBDA(acc,val,acc&amp;&quot;&quot; AND &quot;&quot;&amp;val))&amp;&quot;&quot;)&quot;&quot;)&quot;);507709)" office:value-type="float" office:value="507709" calcext:value-type="float">
            <text:p>5.077E+05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1&amp;&quot;&quot;'&quot;&quot;,MAP(O$2:O$6,$B$2:$B$6,LAMBDA(value,column,column&amp;&quot;&quot;='&quot;&quot;&amp;value&amp;&quot;&quot;'&quot;&quot;)),LAMBDA(acc,val,acc&amp;&quot;&quot; AND &quot;&quot;&amp;val))&amp;&quot;&quot;)&quot;&quot;)&quot;);33)" office:value-type="float" office:value="33" calcext:value-type="float">
            <text:p>33</text:p>
          </table:table-cell>
          <table:table-cell table:style-name="ce24" table:formula="of:=[.O11]*1000/[.M11]" office:value-type="float" office:value="0.0650198901754946" calcext:value-type="float">
            <text:p>0.0650</text:p>
          </table:table-cell>
          <table:table-cell table:style-name="ce5" table:formula="of:=([.D11]-[.C11])/[.C11]" office:value-type="percentage" office:value="0.150217873072571" calcext:value-type="percentage">
            <text:p>15.02%</text:p>
          </table:table-cell>
          <table:table-cell table:style-name="ce29" table:formula="of:=([.E11]-[.D11])/[.D11]" office:value-type="percentage" office:value="0.00381683267924175" calcext:value-type="percentage">
            <text:p>0.38%</text:p>
          </table:table-cell>
          <table:table-cell table:style-name="ce34" table:formula="of:=([.F11]-[.E11])/[.E11]" office:value-type="percentage" office:value="0.000234861077647907" calcext:value-type="percentage">
            <text:p>0.02%</text:p>
          </table:table-cell>
          <table:table-cell table:style-name="ce5" table:formula="of:=([.G11]-[.D11])/[.D11]" office:value-type="percentage" office:value="0.00273966477721932" calcext:value-type="percentage">
            <text:p>0.27%</text:p>
          </table:table-cell>
          <table:table-cell table:style-name="ce5" table:formula="of:=([.H11]-[.G11])/[.G11]" office:value-type="percentage" office:value="0.000235113371262255" calcext:value-type="percentage">
            <text:p>0.02%</text:p>
          </table:table-cell>
          <table:table-cell table:style-name="ce29" table:formula="of:=([.I11]-[.D11])/[.D11]" office:value-type="percentage" office:value="0.0277401220654796" calcext:value-type="percentage">
            <text:p>2.77%</text:p>
          </table:table-cell>
          <table:table-cell table:style-name="ce40" table:formula="of:=([.J11]-[.I11])/[.I11]" office:value-type="percentage" office:value="0.00449098243948742" calcext:value-type="percentage">
            <text:p>0.45%</text:p>
          </table:table-cell>
          <table:table-cell table:style-name="ce34" table:formula="of:=([.K11]-[.J11])/[.J11]" office:value-type="percentage" office:value="0.000228368484361681" calcext:value-type="percentage">
            <text:p>0.02%</text:p>
          </table:table-cell>
          <table:table-cell table:style-name="ce5" table:formula="of:=([.L11]-[.I11])/[.I11]" office:value-type="percentage" office:value="0.00344288878342034" calcext:value-type="percentage">
            <text:p>0.34%</text:p>
          </table:table-cell>
          <table:table-cell table:style-name="ce5" table:formula="of:=([.M11]-[.I11])/[.I11]" office:value-type="percentage" office:value="0.00367228286663503" calcext:value-type="percentage">
            <text:p>0.37%</text:p>
          </table:table-cell>
          <table:table-cell table:style-name="ce45" table:formula="of:=([.N11]-[.M11])/[.M11]" office:value-type="percentage" office:value="0.000338891548793487" calcext:value-type="percentage">
            <text:p>0.03%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-0.1&quot;)" office:value-type="string" office:string-value="random-callstack-ubench-0.1" calcext:value-type="string">
            <text:p>random-callstack-ubench-0.1</text:p>
          </table:table-cell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C$2:C$6,$B$2:$B$6,LAMBDA(value,column,column&amp;&quot;&quot;='&quot;&quot;&amp;value&amp;&quot;&quot;'&quot;&quot;)),LAMBDA(acc,val,acc&amp;&quot;&quot; AND &quot;&quot;&amp;val))&amp;&quot;&quot;)&quot;&quot;)&quot;);1565738)" office:value-type="float" office:value="1565738" calcext:value-type="float">
            <text:p>1.566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D$2:D$6,$B$2:$B$6,LAMBDA(value,column,column&amp;&quot;&quot;='&quot;&quot;&amp;value&amp;&quot;&quot;'&quot;&quot;)),LAMBDA(acc,val,acc&amp;&quot;&quot; AND &quot;&quot;&amp;val))&amp;&quot;&quot;)&quot;&quot;)&quot;);1919099)" office:value-type="float" office:value="1919099" calcext:value-type="float">
            <text:p>1.919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E$2:E$6,$B$2:$B$6,LAMBDA(value,column,column&amp;&quot;&quot;='&quot;&quot;&amp;value&amp;&quot;&quot;'&quot;&quot;)),LAMBDA(acc,val,acc&amp;&quot;&quot; AND &quot;&quot;&amp;val))&amp;&quot;&quot;)&quot;&quot;)&quot;);1939285)" office:value-type="float" office:value="1939285" calcext:value-type="float">
            <text:p>1.939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F$2:F$6,$B$2:$B$6,LAMBDA(value,column,column&amp;&quot;&quot;='&quot;&quot;&amp;value&amp;&quot;&quot;'&quot;&quot;)),LAMBDA(acc,val,acc&amp;&quot;&quot; AND &quot;&quot;&amp;val))&amp;&quot;&quot;)&quot;&quot;)&quot;);1943489)" office:value-type="float" office:value="1943489" calcext:value-type="float">
            <text:p>1.943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G$2:G$6,$B$2:$B$6,LAMBDA(value,column,column&amp;&quot;&quot;='&quot;&quot;&amp;value&amp;&quot;&quot;'&quot;&quot;)),LAMBDA(acc,val,acc&amp;&quot;&quot; AND &quot;&quot;&amp;val))&amp;&quot;&quot;)&quot;&quot;)&quot;);1929721)" office:value-type="float" office:value="1929721" calcext:value-type="float">
            <text:p>1.930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H$2:H$6,$B$2:$B$6,LAMBDA(value,column,column&amp;&quot;&quot;='&quot;&quot;&amp;value&amp;&quot;&quot;'&quot;&quot;)),LAMBDA(acc,val,acc&amp;&quot;&quot; AND &quot;&quot;&amp;val))&amp;&quot;&quot;)&quot;&quot;)&quot;);1933925)" office:value-type="float" office:value="1933925" calcext:value-type="float">
            <text:p>1.934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I$2:I$6,$B$2:$B$6,LAMBDA(value,column,column&amp;&quot;&quot;='&quot;&quot;&amp;value&amp;&quot;&quot;'&quot;&quot;)),LAMBDA(acc,val,acc&amp;&quot;&quot; AND &quot;&quot;&amp;val))&amp;&quot;&quot;)&quot;&quot;)&quot;);2100452)" office:value-type="float" office:value="2100452" calcext:value-type="float">
            <text:p>2.100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J$2:J$6,$B$2:$B$6,LAMBDA(value,column,column&amp;&quot;&quot;='&quot;&quot;&amp;value&amp;&quot;&quot;'&quot;&quot;)),LAMBDA(acc,val,acc&amp;&quot;&quot; AND &quot;&quot;&amp;val))&amp;&quot;&quot;)&quot;&quot;)&quot;);2101988)" office:value-type="float" office:value="2101988" calcext:value-type="float">
            <text:p>2.102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K$2:K$6,$B$2:$B$6,LAMBDA(value,column,column&amp;&quot;&quot;='&quot;&quot;&amp;value&amp;&quot;&quot;'&quot;&quot;)),LAMBDA(acc,val,acc&amp;&quot;&quot; AND &quot;&quot;&amp;val))&amp;&quot;&quot;)&quot;&quot;)&quot;);2106192)" office:value-type="float" office:value="2106192" calcext:value-type="float">
            <text:p>2.106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L$2:L$6,$B$2:$B$6,LAMBDA(value,column,column&amp;&quot;&quot;='&quot;&quot;&amp;value&amp;&quot;&quot;'&quot;&quot;)),LAMBDA(acc,val,acc&amp;&quot;&quot; AND &quot;&quot;&amp;val))&amp;&quot;&quot;)&quot;&quot;)&quot;);2097053)" office:value-type="float" office:value="2097053" calcext:value-type="float">
            <text:p>2.097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M$2:M$6,$B$2:$B$6,LAMBDA(value,column,column&amp;&quot;&quot;='&quot;&quot;&amp;value&amp;&quot;&quot;'&quot;&quot;)),LAMBDA(acc,val,acc&amp;&quot;&quot; AND &quot;&quot;&amp;val))&amp;&quot;&quot;)&quot;&quot;)&quot;);2101257)" office:value-type="float" office:value="2101257" calcext:value-type="float">
            <text:p>2.10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2&amp;&quot;&quot;'&quot;&quot;,MAP(N$2:N$6,$B$2:$B$6,LAMBDA(value,column,column&amp;&quot;&quot;='&quot;&quot;&amp;value&amp;&quot;&quot;'&quot;&quot;)),LAMBDA(acc,val,acc&amp;&quot;&quot; AND &quot;&quot;&amp;val))&amp;&quot;&quot;)&quot;&quot;)&quot;);2124474)" office:value-type="float" office:value="2124474" calcext:value-type="float">
            <text:p>2.124E+06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2&amp;&quot;&quot;'&quot;&quot;,MAP(O$2:O$6,$B$2:$B$6,LAMBDA(value,column,column&amp;&quot;&quot;='&quot;&quot;&amp;value&amp;&quot;&quot;'&quot;&quot;)),LAMBDA(acc,val,acc&amp;&quot;&quot; AND &quot;&quot;&amp;val))&amp;&quot;&quot;)&quot;&quot;)&quot;);529)" office:value-type="float" office:value="529" calcext:value-type="float">
            <text:p>529</text:p>
          </table:table-cell>
          <table:table-cell table:style-name="ce24" table:formula="of:=[.O12]*1000/[.M12]" office:value-type="float" office:value="0.251754069111965" calcext:value-type="float">
            <text:p>0.2518</text:p>
          </table:table-cell>
          <table:table-cell table:style-name="ce5" table:formula="of:=([.D12]-[.C12])/[.C12]" office:value-type="percentage" office:value="0.22568335187624" calcext:value-type="percentage">
            <text:p>22.57%</text:p>
          </table:table-cell>
          <table:table-cell table:style-name="ce29" table:formula="of:=([.E12]-[.D12])/[.D12]" office:value-type="percentage" office:value="0.0105184776814536" calcext:value-type="percentage">
            <text:p>1.05%</text:p>
          </table:table-cell>
          <table:table-cell table:style-name="ce34" table:formula="of:=([.F12]-[.E12])/[.E12]" office:value-type="percentage" office:value="0.00216780926991133" calcext:value-type="percentage">
            <text:p>0.22%</text:p>
          </table:table-cell>
          <table:table-cell table:style-name="ce5" table:formula="of:=([.G12]-[.D12])/[.D12]" office:value-type="percentage" office:value="0.00553488902865355" calcext:value-type="percentage">
            <text:p>0.55%</text:p>
          </table:table-cell>
          <table:table-cell table:style-name="ce5" table:formula="of:=([.H12]-[.G12])/[.G12]" office:value-type="percentage" office:value="0.00217855327272699" calcext:value-type="percentage">
            <text:p>0.22%</text:p>
          </table:table-cell>
          <table:table-cell table:style-name="ce29" table:formula="of:=([.I12]-[.D12])/[.D12]" office:value-type="percentage" office:value="0.0944990331400308" calcext:value-type="percentage">
            <text:p>9.45%</text:p>
          </table:table-cell>
          <table:table-cell table:style-name="ce40" table:formula="of:=([.J12]-[.I12])/[.I12]" office:value-type="percentage" office:value="0.000731271174013974" calcext:value-type="percentage">
            <text:p>0.07%</text:p>
          </table:table-cell>
          <table:table-cell table:style-name="ce34" table:formula="of:=([.K12]-[.J12])/[.J12]" office:value-type="percentage" office:value="0.00200001141776261" calcext:value-type="percentage">
            <text:p>0.20%</text:p>
          </table:table-cell>
          <table:table-cell table:style-name="ce5" table:formula="of:=([.L12]-[.I12])/[.I12]" office:value-type="percentage" office:value="-0.00161822312530827" calcext:value-type="percentage">
            <text:p>-0.16%</text:p>
          </table:table-cell>
          <table:table-cell table:style-name="ce5" table:formula="of:=([.M12]-[.I12])/[.I12]" office:value-type="percentage" office:value="0.000383250843151855" calcext:value-type="percentage">
            <text:p>0.04%</text:p>
          </table:table-cell>
          <table:table-cell table:style-name="ce45" table:formula="of:=([.N12]-[.M12])/[.M12]" office:value-type="percentage" office:value="0.0110491006097779" calcext:value-type="percentage">
            <text:p>1.10%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-0.5&quot;)" office:value-type="string" office:string-value="random-callstack-ubench-0.5" calcext:value-type="string">
            <text:p>random-callstack-ubench-0.5</text:p>
          </table:table-cell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C$2:C$6,$B$2:$B$6,LAMBDA(value,column,column&amp;&quot;&quot;='&quot;&quot;&amp;value&amp;&quot;&quot;'&quot;&quot;)),LAMBDA(acc,val,acc&amp;&quot;&quot; AND &quot;&quot;&amp;val))&amp;&quot;&quot;)&quot;&quot;)&quot;);1567718)" office:value-type="float" office:value="1567718" calcext:value-type="float">
            <text:p>1.568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D$2:D$6,$B$2:$B$6,LAMBDA(value,column,column&amp;&quot;&quot;='&quot;&quot;&amp;value&amp;&quot;&quot;'&quot;&quot;)),LAMBDA(acc,val,acc&amp;&quot;&quot; AND &quot;&quot;&amp;val))&amp;&quot;&quot;)&quot;&quot;)&quot;);1921079)" office:value-type="float" office:value="1921079" calcext:value-type="float">
            <text:p>1.92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E$2:E$6,$B$2:$B$6,LAMBDA(value,column,column&amp;&quot;&quot;='&quot;&quot;&amp;value&amp;&quot;&quot;'&quot;&quot;)),LAMBDA(acc,val,acc&amp;&quot;&quot; AND &quot;&quot;&amp;val))&amp;&quot;&quot;)&quot;&quot;)&quot;);2016505)" office:value-type="float" office:value="2016505" calcext:value-type="float">
            <text:p>2.017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F$2:F$6,$B$2:$B$6,LAMBDA(value,column,column&amp;&quot;&quot;='&quot;&quot;&amp;value&amp;&quot;&quot;'&quot;&quot;)),LAMBDA(acc,val,acc&amp;&quot;&quot; AND &quot;&quot;&amp;val))&amp;&quot;&quot;)&quot;&quot;)&quot;);2036549)" office:value-type="float" office:value="2036549" calcext:value-type="float">
            <text:p>2.037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G$2:G$6,$B$2:$B$6,LAMBDA(value,column,column&amp;&quot;&quot;='&quot;&quot;&amp;value&amp;&quot;&quot;'&quot;&quot;)),LAMBDA(acc,val,acc&amp;&quot;&quot; AND &quot;&quot;&amp;val))&amp;&quot;&quot;)&quot;&quot;)&quot;);1971301)" office:value-type="float" office:value="1971301" calcext:value-type="float">
            <text:p>1.97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H$2:H$6,$B$2:$B$6,LAMBDA(value,column,column&amp;&quot;&quot;='&quot;&quot;&amp;value&amp;&quot;&quot;'&quot;&quot;)),LAMBDA(acc,val,acc&amp;&quot;&quot; AND &quot;&quot;&amp;val))&amp;&quot;&quot;)&quot;&quot;)&quot;);1991345)" office:value-type="float" office:value="1991345" calcext:value-type="float">
            <text:p>1.99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I$2:I$6,$B$2:$B$6,LAMBDA(value,column,column&amp;&quot;&quot;='&quot;&quot;&amp;value&amp;&quot;&quot;'&quot;&quot;)),LAMBDA(acc,val,acc&amp;&quot;&quot; AND &quot;&quot;&amp;val))&amp;&quot;&quot;)&quot;&quot;)&quot;);2102432)" office:value-type="float" office:value="2102432" calcext:value-type="float">
            <text:p>2.102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J$2:J$6,$B$2:$B$6,LAMBDA(value,column,column&amp;&quot;&quot;='&quot;&quot;&amp;value&amp;&quot;&quot;'&quot;&quot;)),LAMBDA(acc,val,acc&amp;&quot;&quot; AND &quot;&quot;&amp;val))&amp;&quot;&quot;)&quot;&quot;)&quot;);2199820)" office:value-type="float" office:value="2199820" calcext:value-type="float">
            <text:p>2.200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K$2:K$6,$B$2:$B$6,LAMBDA(value,column,column&amp;&quot;&quot;='&quot;&quot;&amp;value&amp;&quot;&quot;'&quot;&quot;)),LAMBDA(acc,val,acc&amp;&quot;&quot; AND &quot;&quot;&amp;val))&amp;&quot;&quot;)&quot;&quot;)&quot;);2219864)" office:value-type="float" office:value="2219864" calcext:value-type="float">
            <text:p>2.220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L$2:L$6,$B$2:$B$6,LAMBDA(value,column,column&amp;&quot;&quot;='&quot;&quot;&amp;value&amp;&quot;&quot;'&quot;&quot;)),LAMBDA(acc,val,acc&amp;&quot;&quot; AND &quot;&quot;&amp;val))&amp;&quot;&quot;)&quot;&quot;)&quot;);2160465)" office:value-type="float" office:value="2160465" calcext:value-type="float">
            <text:p>2.160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M$2:M$6,$B$2:$B$6,LAMBDA(value,column,column&amp;&quot;&quot;='&quot;&quot;&amp;value&amp;&quot;&quot;'&quot;&quot;)),LAMBDA(acc,val,acc&amp;&quot;&quot; AND &quot;&quot;&amp;val))&amp;&quot;&quot;)&quot;&quot;)&quot;);2180521)" office:value-type="float" office:value="2180521" calcext:value-type="float">
            <text:p>2.18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3&amp;&quot;&quot;'&quot;&quot;,MAP(N$2:N$6,$B$2:$B$6,LAMBDA(value,column,column&amp;&quot;&quot;='&quot;&quot;&amp;value&amp;&quot;&quot;'&quot;&quot;)),LAMBDA(acc,val,acc&amp;&quot;&quot; AND &quot;&quot;&amp;val))&amp;&quot;&quot;)&quot;&quot;)&quot;);2305736)" office:value-type="float" office:value="2305736" calcext:value-type="float">
            <text:p>2.306E+06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3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table:formula="of:=[.O13]*1000/[.M13]" office:value-type="float" office:value="1.15064243820628" calcext:value-type="float">
            <text:p>1.1506</text:p>
          </table:table-cell>
          <table:table-cell table:style-name="ce5" table:formula="of:=([.D13]-[.C13])/[.C13]" office:value-type="percentage" office:value="0.225398317809708" calcext:value-type="percentage">
            <text:p>22.54%</text:p>
          </table:table-cell>
          <table:table-cell table:style-name="ce29" table:formula="of:=([.E13]-[.D13])/[.D13]" office:value-type="percentage" office:value="0.0496731264044841" calcext:value-type="percentage">
            <text:p>4.97%</text:p>
          </table:table-cell>
          <table:table-cell table:style-name="ce34" table:formula="of:=([.F13]-[.E13])/[.E13]" office:value-type="percentage" office:value="0.00993997039432087" calcext:value-type="percentage">
            <text:p>0.99%</text:p>
          </table:table-cell>
          <table:table-cell table:style-name="ce5" table:formula="of:=([.G13]-[.D13])/[.D13]" office:value-type="percentage" office:value="0.0261426000700648" calcext:value-type="percentage">
            <text:p>2.61%</text:p>
          </table:table-cell>
          <table:table-cell table:style-name="ce5" table:formula="of:=([.H13]-[.G13])/[.G13]" office:value-type="percentage" office:value="0.0101679043433753" calcext:value-type="percentage">
            <text:p>1.02%</text:p>
          </table:table-cell>
          <table:table-cell table:style-name="ce29" table:formula="of:=([.I13]-[.D13])/[.D13]" office:value-type="percentage" office:value="0.0944016357474107" calcext:value-type="percentage">
            <text:p>9.44%</text:p>
          </table:table-cell>
          <table:table-cell table:style-name="ce40" table:formula="of:=([.J13]-[.I13])/[.I13]" office:value-type="percentage" office:value="0.0463215932786411" calcext:value-type="percentage">
            <text:p>4.63%</text:p>
          </table:table-cell>
          <table:table-cell table:style-name="ce34" table:formula="of:=([.K13]-[.J13])/[.J13]" office:value-type="percentage" office:value="0.00911165458992099" calcext:value-type="percentage">
            <text:p>0.91%</text:p>
          </table:table-cell>
          <table:table-cell table:style-name="ce5" table:formula="of:=([.L13]-[.I13])/[.I13]" office:value-type="percentage" office:value="0.0276027952390375" calcext:value-type="percentage">
            <text:p>2.76%</text:p>
          </table:table-cell>
          <table:table-cell table:style-name="ce5" table:formula="of:=([.M13]-[.I13])/[.I13]" office:value-type="percentage" office:value="0.0371422238626505" calcext:value-type="percentage">
            <text:p>3.71%</text:p>
          </table:table-cell>
          <table:table-cell table:style-name="ce45" table:formula="of:=([.N13]-[.M13])/[.M13]" office:value-type="percentage" office:value="0.0574243495017934" calcext:value-type="percentage">
            <text:p>5.74%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-0.9&quot;)" office:value-type="string" office:string-value="random-callstack-ubench-0.9" calcext:value-type="string">
            <text:p>random-callstack-ubench-0.9</text:p>
          </table:table-cell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C$2:C$6,$B$2:$B$6,LAMBDA(value,column,column&amp;&quot;&quot;='&quot;&quot;&amp;value&amp;&quot;&quot;'&quot;&quot;)),LAMBDA(acc,val,acc&amp;&quot;&quot; AND &quot;&quot;&amp;val))&amp;&quot;&quot;)&quot;&quot;)&quot;);1569707)" office:value-type="float" office:value="1569707" calcext:value-type="float">
            <text:p>1.570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D$2:D$6,$B$2:$B$6,LAMBDA(value,column,column&amp;&quot;&quot;='&quot;&quot;&amp;value&amp;&quot;&quot;'&quot;&quot;)),LAMBDA(acc,val,acc&amp;&quot;&quot; AND &quot;&quot;&amp;val))&amp;&quot;&quot;)&quot;&quot;)&quot;);1923068)" office:value-type="float" office:value="1923068" calcext:value-type="float">
            <text:p>1.923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E$2:E$6,$B$2:$B$6,LAMBDA(value,column,column&amp;&quot;&quot;='&quot;&quot;&amp;value&amp;&quot;&quot;'&quot;&quot;)),LAMBDA(acc,val,acc&amp;&quot;&quot; AND &quot;&quot;&amp;val))&amp;&quot;&quot;)&quot;&quot;)&quot;);2094114)" office:value-type="float" office:value="2094114" calcext:value-type="float">
            <text:p>2.094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F$2:F$6,$B$2:$B$6,LAMBDA(value,column,column&amp;&quot;&quot;='&quot;&quot;&amp;value&amp;&quot;&quot;'&quot;&quot;)),LAMBDA(acc,val,acc&amp;&quot;&quot; AND &quot;&quot;&amp;val))&amp;&quot;&quot;)&quot;&quot;)&quot;);2130078)" office:value-type="float" office:value="2130078" calcext:value-type="float">
            <text:p>2.130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G$2:G$6,$B$2:$B$6,LAMBDA(value,column,column&amp;&quot;&quot;='&quot;&quot;&amp;value&amp;&quot;&quot;'&quot;&quot;)),LAMBDA(acc,val,acc&amp;&quot;&quot; AND &quot;&quot;&amp;val))&amp;&quot;&quot;)&quot;&quot;)&quot;);2013090)" office:value-type="float" office:value="2013090" calcext:value-type="float">
            <text:p>2.013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H$2:H$6,$B$2:$B$6,LAMBDA(value,column,column&amp;&quot;&quot;='&quot;&quot;&amp;value&amp;&quot;&quot;'&quot;&quot;)),LAMBDA(acc,val,acc&amp;&quot;&quot; AND &quot;&quot;&amp;val))&amp;&quot;&quot;)&quot;&quot;)&quot;);2049054)" office:value-type="float" office:value="2049054" calcext:value-type="float">
            <text:p>2.049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I$2:I$6,$B$2:$B$6,LAMBDA(value,column,column&amp;&quot;&quot;='&quot;&quot;&amp;value&amp;&quot;&quot;'&quot;&quot;)),LAMBDA(acc,val,acc&amp;&quot;&quot; AND &quot;&quot;&amp;val))&amp;&quot;&quot;)&quot;&quot;)&quot;);2104421)" office:value-type="float" office:value="2104421" calcext:value-type="float">
            <text:p>2.104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J$2:J$6,$B$2:$B$6,LAMBDA(value,column,column&amp;&quot;&quot;='&quot;&quot;&amp;value&amp;&quot;&quot;'&quot;&quot;)),LAMBDA(acc,val,acc&amp;&quot;&quot; AND &quot;&quot;&amp;val))&amp;&quot;&quot;)&quot;&quot;)&quot;);2298729)" office:value-type="float" office:value="2298729" calcext:value-type="float">
            <text:p>2.299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K$2:K$6,$B$2:$B$6,LAMBDA(value,column,column&amp;&quot;&quot;='&quot;&quot;&amp;value&amp;&quot;&quot;'&quot;&quot;)),LAMBDA(acc,val,acc&amp;&quot;&quot; AND &quot;&quot;&amp;val))&amp;&quot;&quot;)&quot;&quot;)&quot;);2334693)" office:value-type="float" office:value="2334693" calcext:value-type="float">
            <text:p>2.335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L$2:L$6,$B$2:$B$6,LAMBDA(value,column,column&amp;&quot;&quot;='&quot;&quot;&amp;value&amp;&quot;&quot;'&quot;&quot;)),LAMBDA(acc,val,acc&amp;&quot;&quot; AND &quot;&quot;&amp;val))&amp;&quot;&quot;)&quot;&quot;)&quot;);2223341)" office:value-type="float" office:value="2223341" calcext:value-type="float">
            <text:p>2.223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M$2:M$6,$B$2:$B$6,LAMBDA(value,column,column&amp;&quot;&quot;='&quot;&quot;&amp;value&amp;&quot;&quot;'&quot;&quot;)),LAMBDA(acc,val,acc&amp;&quot;&quot; AND &quot;&quot;&amp;val))&amp;&quot;&quot;)&quot;&quot;)&quot;);2259315)" office:value-type="float" office:value="2259315" calcext:value-type="float">
            <text:p>2.259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4&amp;&quot;&quot;'&quot;&quot;,MAP(N$2:N$6,$B$2:$B$6,LAMBDA(value,column,column&amp;&quot;&quot;='&quot;&quot;&amp;value&amp;&quot;&quot;'&quot;&quot;)),LAMBDA(acc,val,acc&amp;&quot;&quot; AND &quot;&quot;&amp;val))&amp;&quot;&quot;)&quot;&quot;)&quot;);2494829)" office:value-type="float" office:value="2494829" calcext:value-type="float">
            <text:p>2.495E+06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4&amp;&quot;&quot;'&quot;&quot;,MAP(O$2:O$6,$B$2:$B$6,LAMBDA(value,column,column&amp;&quot;&quot;='&quot;&quot;&amp;value&amp;&quot;&quot;'&quot;&quot;)),LAMBDA(acc,val,acc&amp;&quot;&quot; AND &quot;&quot;&amp;val))&amp;&quot;&quot;)&quot;&quot;)&quot;);4499)" office:value-type="float" office:value="4499" calcext:value-type="float">
            <text:p>4,499</text:p>
          </table:table-cell>
          <table:table-cell table:style-name="ce24" table:formula="of:=[.O14]*1000/[.M14]" office:value-type="float" office:value="1.99131152583858" calcext:value-type="float">
            <text:p>1.9913</text:p>
          </table:table-cell>
          <table:table-cell table:style-name="ce5" table:formula="of:=([.D14]-[.C14])/[.C14]" office:value-type="percentage" office:value="0.225112712117612" calcext:value-type="percentage">
            <text:p>22.51%</text:p>
          </table:table-cell>
          <table:table-cell table:style-name="ce29" table:formula="of:=([.E14]-[.D14])/[.D14]" office:value-type="percentage" office:value="0.0889443327017037" calcext:value-type="percentage">
            <text:p>8.89%</text:p>
          </table:table-cell>
          <table:table-cell table:style-name="ce34" table:formula="of:=([.F14]-[.E14])/[.E14]" office:value-type="percentage" office:value="0.0171738501342334" calcext:value-type="percentage">
            <text:p>1.72%</text:p>
          </table:table-cell>
          <table:table-cell table:style-name="ce5" table:formula="of:=([.G14]-[.D14])/[.D14]" office:value-type="percentage" office:value="0.0468116572060894" calcext:value-type="percentage">
            <text:p>4.68%</text:p>
          </table:table-cell>
          <table:table-cell table:style-name="ce5" table:formula="of:=([.H14]-[.G14])/[.G14]" office:value-type="percentage" office:value="0.0178650730965829" calcext:value-type="percentage">
            <text:p>1.79%</text:p>
          </table:table-cell>
          <table:table-cell table:style-name="ce29" table:formula="of:=([.I14]-[.D14])/[.D14]" office:value-type="percentage" office:value="0.0943039975705487" calcext:value-type="percentage">
            <text:p>9.43%</text:p>
          </table:table-cell>
          <table:table-cell table:style-name="ce40" table:formula="of:=([.J14]-[.I14])/[.I14]" office:value-type="percentage" office:value="0.0923332356025719" calcext:value-type="percentage">
            <text:p>9.23%</text:p>
          </table:table-cell>
          <table:table-cell table:style-name="ce34" table:formula="of:=([.K14]-[.J14])/[.J14]" office:value-type="percentage" office:value="0.0156451673946777" calcext:value-type="percentage">
            <text:p>1.56%</text:p>
          </table:table-cell>
          <table:table-cell table:style-name="ce5" table:formula="of:=([.L14]-[.I14])/[.I14]" office:value-type="percentage" office:value="0.0565096052548421" calcext:value-type="percentage">
            <text:p>5.65%</text:p>
          </table:table-cell>
          <table:table-cell table:style-name="ce5" table:formula="of:=([.M14]-[.I14])/[.I14]" office:value-type="percentage" office:value="0.0736040934774933" calcext:value-type="percentage">
            <text:p>7.36%</text:p>
          </table:table-cell>
          <table:table-cell table:style-name="ce45" table:formula="of:=([.N14]-[.M14])/[.M14]" office:value-type="percentage" office:value="0.104241329783585" calcext:value-type="percentage">
            <text:p>10.42%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+large-alloc-0.5&quot;)" office:value-type="string" office:string-value="random-callstack-ubench+large-alloc-0.5" calcext:value-type="string">
            <text:p>random-callstack-ubench+large-alloc-0.5</text:p>
          </table:table-cell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C$2:C$6,$B$2:$B$6,LAMBDA(value,column,column&amp;&quot;&quot;='&quot;&quot;&amp;value&amp;&quot;&quot;'&quot;&quot;)),LAMBDA(acc,val,acc&amp;&quot;&quot; AND &quot;&quot;&amp;val))&amp;&quot;&quot;)&quot;&quot;)&quot;);1567886)" office:value-type="float" office:value="1567886" calcext:value-type="float">
            <text:p>1.568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D$2:D$6,$B$2:$B$6,LAMBDA(value,column,column&amp;&quot;&quot;='&quot;&quot;&amp;value&amp;&quot;&quot;'&quot;&quot;)),LAMBDA(acc,val,acc&amp;&quot;&quot; AND &quot;&quot;&amp;val))&amp;&quot;&quot;)&quot;&quot;)&quot;);2021727)" office:value-type="float" office:value="2021727" calcext:value-type="float">
            <text:p>2.022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E$2:E$6,$B$2:$B$6,LAMBDA(value,column,column&amp;&quot;&quot;='&quot;&quot;&amp;value&amp;&quot;&quot;'&quot;&quot;)),LAMBDA(acc,val,acc&amp;&quot;&quot; AND &quot;&quot;&amp;val))&amp;&quot;&quot;)&quot;&quot;)&quot;);2117153)" office:value-type="float" office:value="2117153" calcext:value-type="float">
            <text:p>2.117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F$2:F$6,$B$2:$B$6,LAMBDA(value,column,column&amp;&quot;&quot;='&quot;&quot;&amp;value&amp;&quot;&quot;'&quot;&quot;)),LAMBDA(acc,val,acc&amp;&quot;&quot; AND &quot;&quot;&amp;val))&amp;&quot;&quot;)&quot;&quot;)&quot;);2137197)" office:value-type="float" office:value="2137197" calcext:value-type="float">
            <text:p>2.137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G$2:G$6,$B$2:$B$6,LAMBDA(value,column,column&amp;&quot;&quot;='&quot;&quot;&amp;value&amp;&quot;&quot;'&quot;&quot;)),LAMBDA(acc,val,acc&amp;&quot;&quot; AND &quot;&quot;&amp;val))&amp;&quot;&quot;)&quot;&quot;)&quot;);2071949)" office:value-type="float" office:value="2071949" calcext:value-type="float">
            <text:p>2.072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H$2:H$6,$B$2:$B$6,LAMBDA(value,column,column&amp;&quot;&quot;='&quot;&quot;&amp;value&amp;&quot;&quot;'&quot;&quot;)),LAMBDA(acc,val,acc&amp;&quot;&quot; AND &quot;&quot;&amp;val))&amp;&quot;&quot;)&quot;&quot;)&quot;);2091993)" office:value-type="float" office:value="2091993" calcext:value-type="float">
            <text:p>2.092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I$2:I$6,$B$2:$B$6,LAMBDA(value,column,column&amp;&quot;&quot;='&quot;&quot;&amp;value&amp;&quot;&quot;'&quot;&quot;)),LAMBDA(acc,val,acc&amp;&quot;&quot; AND &quot;&quot;&amp;val))&amp;&quot;&quot;)&quot;&quot;)&quot;);2203052)" office:value-type="float" office:value="2203052" calcext:value-type="float">
            <text:p>2.203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J$2:J$6,$B$2:$B$6,LAMBDA(value,column,column&amp;&quot;&quot;='&quot;&quot;&amp;value&amp;&quot;&quot;'&quot;&quot;)),LAMBDA(acc,val,acc&amp;&quot;&quot; AND &quot;&quot;&amp;val))&amp;&quot;&quot;)&quot;&quot;)&quot;);2317128)" office:value-type="float" office:value="2317128" calcext:value-type="float">
            <text:p>2.317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K$2:K$6,$B$2:$B$6,LAMBDA(value,column,column&amp;&quot;&quot;='&quot;&quot;&amp;value&amp;&quot;&quot;'&quot;&quot;)),LAMBDA(acc,val,acc&amp;&quot;&quot; AND &quot;&quot;&amp;val))&amp;&quot;&quot;)&quot;&quot;)&quot;);2337172)" office:value-type="float" office:value="2337172" calcext:value-type="float">
            <text:p>2.337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L$2:L$6,$B$2:$B$6,LAMBDA(value,column,column&amp;&quot;&quot;='&quot;&quot;&amp;value&amp;&quot;&quot;'&quot;&quot;)),LAMBDA(acc,val,acc&amp;&quot;&quot; AND &quot;&quot;&amp;val))&amp;&quot;&quot;)&quot;&quot;)&quot;);2291063)" office:value-type="float" office:value="2291063" calcext:value-type="float">
            <text:p>2.29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M$2:M$6,$B$2:$B$6,LAMBDA(value,column,column&amp;&quot;&quot;='&quot;&quot;&amp;value&amp;&quot;&quot;'&quot;&quot;)),LAMBDA(acc,val,acc&amp;&quot;&quot; AND &quot;&quot;&amp;val))&amp;&quot;&quot;)&quot;&quot;)&quot;);2311107)" office:value-type="float" office:value="2311107" calcext:value-type="float">
            <text:p>2.31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5&amp;&quot;&quot;'&quot;&quot;,MAP(N$2:N$6,$B$2:$B$6,LAMBDA(value,column,column&amp;&quot;&quot;='&quot;&quot;&amp;value&amp;&quot;&quot;'&quot;&quot;)),LAMBDA(acc,val,acc&amp;&quot;&quot; AND &quot;&quot;&amp;val))&amp;&quot;&quot;)&quot;&quot;)&quot;);2426297)" office:value-type="float" office:value="2426297" calcext:value-type="float">
            <text:p>2.426E+06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5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table:formula="of:=[.O15]*1000/[.M15]" office:value-type="float" office:value="1.08562693116329" calcext:value-type="float">
            <text:p>1.0856</text:p>
          </table:table-cell>
          <table:table-cell table:style-name="ce5" table:formula="of:=([.D15]-[.C15])/[.C15]" office:value-type="percentage" office:value="0.28946045822209" calcext:value-type="percentage">
            <text:p>28.95%</text:p>
          </table:table-cell>
          <table:table-cell table:style-name="ce29" table:formula="of:=([.E15]-[.D15])/[.D15]" office:value-type="percentage" office:value="0.0472002401906885" calcext:value-type="percentage">
            <text:p>4.72%</text:p>
          </table:table-cell>
          <table:table-cell table:style-name="ce34" table:formula="of:=([.F15]-[.E15])/[.E15]" office:value-type="percentage" office:value="0.00946743102647754" calcext:value-type="percentage">
            <text:p>0.95%</text:p>
          </table:table-cell>
          <table:table-cell table:style-name="ce5" table:formula="of:=([.G15]-[.D15])/[.D15]" office:value-type="percentage" office:value="0.0248411382941416" calcext:value-type="percentage">
            <text:p>2.48%</text:p>
          </table:table-cell>
          <table:table-cell table:style-name="ce5" table:formula="of:=([.H15]-[.G15])/[.G15]" office:value-type="percentage" office:value="0.0096739832881987" calcext:value-type="percentage">
            <text:p>0.97%</text:p>
          </table:table-cell>
          <table:table-cell table:style-name="ce29" table:formula="of:=([.I15]-[.D15])/[.D15]" office:value-type="percentage" office:value="0.0896881725376374" calcext:value-type="percentage">
            <text:p>8.97%</text:p>
          </table:table-cell>
          <table:table-cell table:style-name="ce40" table:formula="of:=([.J15]-[.I15])/[.I15]" office:value-type="percentage" office:value="0.0517808930520024" calcext:value-type="percentage">
            <text:p>5.18%</text:p>
          </table:table-cell>
          <table:table-cell table:style-name="ce34" table:formula="of:=([.K15]-[.J15])/[.J15]" office:value-type="percentage" office:value="0.00865036372612993" calcext:value-type="percentage">
            <text:p>0.87%</text:p>
          </table:table-cell>
          <table:table-cell table:style-name="ce5" table:formula="of:=([.L15]-[.I15])/[.I15]" office:value-type="percentage" office:value="0.0399495790385338" calcext:value-type="percentage">
            <text:p>3.99%</text:p>
          </table:table-cell>
          <table:table-cell table:style-name="ce5" table:formula="of:=([.M15]-[.I15])/[.I15]" office:value-type="percentage" office:value="0.0490478663236274" calcext:value-type="percentage">
            <text:p>4.90%</text:p>
          </table:table-cell>
          <table:table-cell table:style-name="ce45" table:formula="of:=([.N15]-[.M15])/[.M15]" office:value-type="percentage" office:value="0.0498419155841768" calcext:value-type="percentage">
            <text:p>4.98%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+small-alloc-0.5&quot;)" office:value-type="string" office:string-value="random-callstack-ubench+small-alloc-0.5" calcext:value-type="string">
            <text:p>random-callstack-ubench+small-alloc-0.5</text:p>
          </table:table-cell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C$2:C$6,$B$2:$B$6,LAMBDA(value,column,column&amp;&quot;&quot;='&quot;&quot;&amp;value&amp;&quot;&quot;'&quot;&quot;)),LAMBDA(acc,val,acc&amp;&quot;&quot; AND &quot;&quot;&amp;val))&amp;&quot;&quot;)&quot;&quot;)&quot;);1567886)" office:value-type="float" office:value="1567886" calcext:value-type="float">
            <text:p>1.568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D$2:D$6,$B$2:$B$6,LAMBDA(value,column,column&amp;&quot;&quot;='&quot;&quot;&amp;value&amp;&quot;&quot;'&quot;&quot;)),LAMBDA(acc,val,acc&amp;&quot;&quot; AND &quot;&quot;&amp;val))&amp;&quot;&quot;)&quot;&quot;)&quot;);1881055)" office:value-type="float" office:value="1881055" calcext:value-type="float">
            <text:p>1.88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E$2:E$6,$B$2:$B$6,LAMBDA(value,column,column&amp;&quot;&quot;='&quot;&quot;&amp;value&amp;&quot;&quot;'&quot;&quot;)),LAMBDA(acc,val,acc&amp;&quot;&quot; AND &quot;&quot;&amp;val))&amp;&quot;&quot;)&quot;&quot;)&quot;);1976481)" office:value-type="float" office:value="1976481" calcext:value-type="float">
            <text:p>1.976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F$2:F$6,$B$2:$B$6,LAMBDA(value,column,column&amp;&quot;&quot;='&quot;&quot;&amp;value&amp;&quot;&quot;'&quot;&quot;)),LAMBDA(acc,val,acc&amp;&quot;&quot; AND &quot;&quot;&amp;val))&amp;&quot;&quot;)&quot;&quot;)&quot;);1996525)" office:value-type="float" office:value="1996525" calcext:value-type="float">
            <text:p>1.997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G$2:G$6,$B$2:$B$6,LAMBDA(value,column,column&amp;&quot;&quot;='&quot;&quot;&amp;value&amp;&quot;&quot;'&quot;&quot;)),LAMBDA(acc,val,acc&amp;&quot;&quot; AND &quot;&quot;&amp;val))&amp;&quot;&quot;)&quot;&quot;)&quot;);1931277)" office:value-type="float" office:value="1931277" calcext:value-type="float">
            <text:p>1.93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H$2:H$6,$B$2:$B$6,LAMBDA(value,column,column&amp;&quot;&quot;='&quot;&quot;&amp;value&amp;&quot;&quot;'&quot;&quot;)),LAMBDA(acc,val,acc&amp;&quot;&quot; AND &quot;&quot;&amp;val))&amp;&quot;&quot;)&quot;&quot;)&quot;);1951321)" office:value-type="float" office:value="1951321" calcext:value-type="float">
            <text:p>1.95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I$2:I$6,$B$2:$B$6,LAMBDA(value,column,column&amp;&quot;&quot;='&quot;&quot;&amp;value&amp;&quot;&quot;'&quot;&quot;)),LAMBDA(acc,val,acc&amp;&quot;&quot; AND &quot;&quot;&amp;val))&amp;&quot;&quot;)&quot;&quot;)&quot;);2032924)" office:value-type="float" office:value="2032924" calcext:value-type="float">
            <text:p>2.033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J$2:J$6,$B$2:$B$6,LAMBDA(value,column,column&amp;&quot;&quot;='&quot;&quot;&amp;value&amp;&quot;&quot;'&quot;&quot;)),LAMBDA(acc,val,acc&amp;&quot;&quot; AND &quot;&quot;&amp;val))&amp;&quot;&quot;)&quot;&quot;)&quot;);2160720)" office:value-type="float" office:value="2160720" calcext:value-type="float">
            <text:p>2.16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K$2:K$6,$B$2:$B$6,LAMBDA(value,column,column&amp;&quot;&quot;='&quot;&quot;&amp;value&amp;&quot;&quot;'&quot;&quot;)),LAMBDA(acc,val,acc&amp;&quot;&quot; AND &quot;&quot;&amp;val))&amp;&quot;&quot;)&quot;&quot;)&quot;);2180764)" office:value-type="float" office:value="2180764" calcext:value-type="float">
            <text:p>2.181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L$2:L$6,$B$2:$B$6,LAMBDA(value,column,column&amp;&quot;&quot;='&quot;&quot;&amp;value&amp;&quot;&quot;'&quot;&quot;)),LAMBDA(acc,val,acc&amp;&quot;&quot; AND &quot;&quot;&amp;val))&amp;&quot;&quot;)&quot;&quot;)&quot;);2114088)" office:value-type="float" office:value="2114088" calcext:value-type="float">
            <text:p>2.114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M$2:M$6,$B$2:$B$6,LAMBDA(value,column,column&amp;&quot;&quot;='&quot;&quot;&amp;value&amp;&quot;&quot;'&quot;&quot;)),LAMBDA(acc,val,acc&amp;&quot;&quot; AND &quot;&quot;&amp;val))&amp;&quot;&quot;)&quot;&quot;)&quot;);2134141)" office:value-type="float" office:value="2134141" calcext:value-type="float">
            <text:p>2.134E+06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6&amp;&quot;&quot;'&quot;&quot;,MAP(N$2:N$6,$B$2:$B$6,LAMBDA(value,column,column&amp;&quot;&quot;='&quot;&quot;&amp;value&amp;&quot;&quot;'&quot;&quot;)),LAMBDA(acc,val,acc&amp;&quot;&quot; AND &quot;&quot;&amp;val))&amp;&quot;&quot;)&quot;&quot;)&quot;);2252168)" office:value-type="float" office:value="2252168" calcext:value-type="float">
            <text:p>2.252E+06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6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table:formula="of:=[.O16]*1000/[.M16]" office:value-type="float" office:value="1.17564865676635" calcext:value-type="float">
            <text:p>1.1756</text:p>
          </table:table-cell>
          <table:table-cell table:style-name="ce5" table:formula="of:=([.D16]-[.C16])/[.C16]" office:value-type="percentage" office:value="0.199739649438798" calcext:value-type="percentage">
            <text:p>19.97%</text:p>
          </table:table-cell>
          <table:table-cell table:style-name="ce29" table:formula="of:=([.E16]-[.D16])/[.D16]" office:value-type="percentage" office:value="0.0507300424495828" calcext:value-type="percentage">
            <text:p>5.07%</text:p>
          </table:table-cell>
          <table:table-cell table:style-name="ce34" table:formula="of:=([.F16]-[.E16])/[.E16]" office:value-type="percentage" office:value="0.0101412561011211" calcext:value-type="percentage">
            <text:p>1.01%</text:p>
          </table:table-cell>
          <table:table-cell table:style-name="ce5" table:formula="of:=([.G16]-[.D16])/[.D16]" office:value-type="percentage" office:value="0.0266988471894761" calcext:value-type="percentage">
            <text:p>2.67%</text:p>
          </table:table-cell>
          <table:table-cell table:style-name="ce5" table:formula="of:=([.H16]-[.G16])/[.G16]" office:value-type="percentage" office:value="0.0103786251273121" calcext:value-type="percentage">
            <text:p>1.04%</text:p>
          </table:table-cell>
          <table:table-cell table:style-name="ce29" table:formula="of:=([.I16]-[.D16])/[.D16]" office:value-type="percentage" office:value="0.0807360762976096" calcext:value-type="percentage">
            <text:p>8.07%</text:p>
          </table:table-cell>
          <table:table-cell table:style-name="ce40" table:formula="of:=([.J16]-[.I16])/[.I16]" office:value-type="percentage" office:value="0.0628631468761252" calcext:value-type="percentage">
            <text:p>6.29%</text:p>
          </table:table-cell>
          <table:table-cell table:style-name="ce34" table:formula="of:=([.K16]-[.J16])/[.J16]" office:value-type="percentage" office:value="0.00927653745047947" calcext:value-type="percentage">
            <text:p>0.93%</text:p>
          </table:table-cell>
          <table:table-cell table:style-name="ce5" table:formula="of:=([.L16]-[.I16])/[.I16]" office:value-type="percentage" office:value="0.0399247586235393" calcext:value-type="percentage">
            <text:p>3.99%</text:p>
          </table:table-cell>
          <table:table-cell table:style-name="ce5" table:formula="of:=([.M16]-[.I16])/[.I16]" office:value-type="percentage" office:value="0.0497888755310085" calcext:value-type="percentage">
            <text:p>4.98%</text:p>
          </table:table-cell>
          <table:table-cell table:style-name="ce45" table:formula="of:=([.N16]-[.M16])/[.M16]" office:value-type="percentage" office:value="0.0553042184185581" calcext:value-type="percentage">
            <text:p>5.53%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1"/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C$2:C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D$2:D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E$2:E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F$2:F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G$2:G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H$2:H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I$2:I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J$2:J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K$2:K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L$2:L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M$2:M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N$2:N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7&amp;&quot;&quot;'&quot;&quot;,MAP(O$2:O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4" table:formula="of:=[.O17]*1000/[.M17]" office:value-type="string" office:string-value="" calcext:value-type="error">
            <text:p>#VALUE!</text:p>
          </table:table-cell>
          <table:table-cell table:style-name="ce5" table:formula="of:=([.D17]-[.C17])/[.C17]" office:value-type="string" office:string-value="" calcext:value-type="error">
            <text:p>#VALUE!</text:p>
          </table:table-cell>
          <table:table-cell table:style-name="ce29" table:formula="of:=([.E17]-[.D17])/[.D17]" office:value-type="string" office:string-value="" calcext:value-type="error">
            <text:p>#VALUE!</text:p>
          </table:table-cell>
          <table:table-cell table:style-name="ce34" table:formula="of:=([.F17]-[.E17])/[.E17]" office:value-type="string" office:string-value="" calcext:value-type="error">
            <text:p>#VALUE!</text:p>
          </table:table-cell>
          <table:table-cell table:style-name="ce5" table:formula="of:=([.G17]-[.D17])/[.D17]" office:value-type="string" office:string-value="" calcext:value-type="error">
            <text:p>#VALUE!</text:p>
          </table:table-cell>
          <table:table-cell table:style-name="ce5" table:formula="of:=([.H17]-[.G17])/[.G17]" office:value-type="string" office:string-value="" calcext:value-type="error">
            <text:p>#VALUE!</text:p>
          </table:table-cell>
          <table:table-cell table:style-name="ce29" table:formula="of:=([.I17]-[.D17])/[.D17]" office:value-type="string" office:string-value="" calcext:value-type="error">
            <text:p>#VALUE!</text:p>
          </table:table-cell>
          <table:table-cell table:style-name="ce40" table:formula="of:=([.J17]-[.I17])/[.I17]" office:value-type="string" office:string-value="" calcext:value-type="error">
            <text:p>#VALUE!</text:p>
          </table:table-cell>
          <table:table-cell table:style-name="ce34" table:formula="of:=([.K17]-[.J17])/[.J17]" office:value-type="string" office:string-value="" calcext:value-type="error">
            <text:p>#VALUE!</text:p>
          </table:table-cell>
          <table:table-cell table:style-name="ce5" table:formula="of:=([.L17]-[.I17])/[.I17]" office:value-type="string" office:string-value="" calcext:value-type="error">
            <text:p>#VALUE!</text:p>
          </table:table-cell>
          <table:table-cell table:style-name="ce5" table:formula="of:=([.M17]-[.I17])/[.I17]" office:value-type="string" office:string-value="" calcext:value-type="error">
            <text:p>#VALUE!</text:p>
          </table:table-cell>
          <table:table-cell table:style-name="ce45" table:formula="of:=([.N17]-[.M17])/[.M17]" office:value-type="string" office:string-value="" calcext:value-type="error">
            <text:p>#VALUE!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 table:style-name="ce1"/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C$2:C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D$2:D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E$2:E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F$2:F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G$2:G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H$2:H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I$2:I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J$2:J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K$2:K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L$2:L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M$2:M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N$2:N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8&amp;&quot;&quot;'&quot;&quot;,MAP(O$2:O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4" table:formula="of:=[.O18]*1000/[.M18]" office:value-type="string" office:string-value="" calcext:value-type="error">
            <text:p>#VALUE!</text:p>
          </table:table-cell>
          <table:table-cell table:style-name="ce5" table:formula="of:=([.D18]-[.C18])/[.C18]" office:value-type="string" office:string-value="" calcext:value-type="error">
            <text:p>#VALUE!</text:p>
          </table:table-cell>
          <table:table-cell table:style-name="ce29" table:formula="of:=([.E18]-[.D18])/[.D18]" office:value-type="string" office:string-value="" calcext:value-type="error">
            <text:p>#VALUE!</text:p>
          </table:table-cell>
          <table:table-cell table:style-name="ce34" table:formula="of:=([.F18]-[.E18])/[.E18]" office:value-type="string" office:string-value="" calcext:value-type="error">
            <text:p>#VALUE!</text:p>
          </table:table-cell>
          <table:table-cell table:style-name="ce5" table:formula="of:=([.G18]-[.D18])/[.D18]" office:value-type="string" office:string-value="" calcext:value-type="error">
            <text:p>#VALUE!</text:p>
          </table:table-cell>
          <table:table-cell table:style-name="ce5" table:formula="of:=([.H18]-[.G18])/[.G18]" office:value-type="string" office:string-value="" calcext:value-type="error">
            <text:p>#VALUE!</text:p>
          </table:table-cell>
          <table:table-cell table:style-name="ce29" table:formula="of:=([.I18]-[.D18])/[.D18]" office:value-type="string" office:string-value="" calcext:value-type="error">
            <text:p>#VALUE!</text:p>
          </table:table-cell>
          <table:table-cell table:style-name="ce40" table:formula="of:=([.J18]-[.I18])/[.I18]" office:value-type="string" office:string-value="" calcext:value-type="error">
            <text:p>#VALUE!</text:p>
          </table:table-cell>
          <table:table-cell table:style-name="ce34" table:formula="of:=([.K18]-[.J18])/[.J18]" office:value-type="string" office:string-value="" calcext:value-type="error">
            <text:p>#VALUE!</text:p>
          </table:table-cell>
          <table:table-cell table:style-name="ce5" table:formula="of:=([.L18]-[.I18])/[.I18]" office:value-type="string" office:string-value="" calcext:value-type="error">
            <text:p>#VALUE!</text:p>
          </table:table-cell>
          <table:table-cell table:style-name="ce5" table:formula="of:=([.M18]-[.I18])/[.I18]" office:value-type="string" office:string-value="" calcext:value-type="error">
            <text:p>#VALUE!</text:p>
          </table:table-cell>
          <table:table-cell table:style-name="ce45" table:formula="of:=([.N18]-[.M18])/[.M18]" office:value-type="string" office:string-value="" calcext:value-type="error">
            <text:p>#VALUE!</text:p>
          </table:table-cell>
          <table:table-cell table:number-columns-repeated="3"/>
          <table:table-cell table:style-name="ce21"/>
          <table:table-cell table:number-columns-repeated="993"/>
        </table:table-row>
        <table:table-row table:style-name="ro1">
          <table:table-cell/>
          <table:table-cell table:style-name="ce8" table:number-columns-repeated="14"/>
          <table:table-cell table:style-name="ce25"/>
          <table:table-cell table:number-columns-repeated="14"/>
          <table:table-cell table:style-name="ce21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Config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Data range</text:p>
          </table:table-cell>
          <table:table-cell table:style-name="ce17" office:value-type="string" calcext:value-type="string">
            <text:p>Data!A2:O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14" office:value-type="string" calcext:value-type="string">
            <text:p>Benchmarks column</text:p>
          </table:table-cell>
          <table:table-cell table:style-name="ce18" office:value-type="string" calcext:value-type="string">
            <text:p>Data!D2:D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Data column</text:p>
          </table:table-cell>
          <table:table-cell table:style-name="ce19"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ck Pressure" table:style-name="ta7">
        <table:table-column table:style-name="co19" table:default-cell-style-name="Default"/>
        <table:table-column table:style-name="co20" table:default-cell-style-name="Default"/>
        <table:table-column table:style-name="co22" table:number-columns-repeated="13" table:default-cell-style-name="Default"/>
        <table:table-column table:style-name="co23" table:default-cell-style-name="Default"/>
        <table:table-column table:style-name="co27" table:number-columns-repeated="5" table:default-cell-style-name="Default"/>
        <table:table-column table:style-name="co28" table:number-columns-repeated="6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5" table:number-columns-repeated="994" table:default-cell-style-name="Default"/>
        <table:table-row table:style-name="ro1">
          <table:table-cell/>
          <table:table-cell table:style-name="ce8" table:number-columns-repeated="14"/>
          <table:table-cell/>
          <table:table-cell table:style-name="ce26" office:value-type="string" calcext:value-type="string" table:number-columns-spanned="11" table:number-rows-spanned="1">
            <text:p>Overheads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Stack Revocatio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one</text:p>
          </table:table-cell>
          <table:table-cell table:number-columns-repeated="11" table:style-name="ce9" office:value-type="string" calcext:value-type="string">
            <text:p>uninit</text:p>
          </table:table-cell>
          <table:table-cell table:style-name="ce8" office:value-type="string" calcext:value-type="string">
            <text:p>uninit</text:p>
          </table:table-cell>
          <table:table-cell table:style-name="ce23" office:value-type="string" calcext:value-type="string" table:number-columns-spanned="1" table:number-rows-spanned="6">
            <text:p>Secure calls per 1000 insts</text:p>
          </table:table-cell>
          <table:table-cell table:style-name="ce26" office:value-type="string" calcext:value-type="string" table:number-columns-spanned="11" table:number-rows-spanned="1">
            <text:p>Uninit</text:p>
          </table:table-cell>
          <table:covered-table-cell table:number-columns-repeated="10"/>
          <table:table-cell/>
          <table:table-cell table:style-name="ce23" office:value-type="string" calcext:value-type="string" table:number-columns-spanned="1" table:number-rows-spanned="5">
            <text:p>Total Without Reserve Stack</text:p>
          </table:table-cell>
          <table:table-cell table:style-name="ce23" office:value-type="string" calcext:value-type="string" table:number-columns-spanned="1" table:number-rows-spanned="5">
            <text:p>Total with Reserve Stack</text:p>
          </table:table-cell>
          <table:table-cell table:style-name="ce23" office:value-type="string" calcext:value-type="string" table:number-columns-spanned="1" table:number-rows-spanned="5">
            <text:p>Encapsulation Comparison (Negative = in favor of Indirect Sentry)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eserve stack</text:p>
          </table:table-cell>
          <table:table-cell table:style-name="ce9" office:value-type="string" calcext:value-type="string">
            <text:p>N</text:p>
          </table:table-cell>
          <table:table-cell table:number-columns-repeated="6" table:style-name="ce9" office:value-type="string" calcext:value-type="string">
            <text:p>none</text:p>
          </table:table-cell>
          <table:table-cell table:number-columns-repeated="6" table:style-name="ce9" office:value-type="string" calcext:value-type="string">
            <text:p>reserve</text:p>
          </table:table-cell>
          <table:table-cell table:style-name="ce8" office:value-type="string" calcext:value-type="string">
            <text:p>reserve</text:p>
          </table:table-cell>
          <table:covered-table-cell/>
          <table:table-cell table:style-name="ce8"/>
          <table:table-cell table:style-name="ce27"/>
          <table:table-cell table:style-name="ce8" table:number-columns-repeated="3"/>
          <table:table-cell table:style-name="ce36" office:value-type="string" calcext:value-type="string" table:number-columns-spanned="6" table:number-rows-spanned="1">
            <text:p>Reserve</text:p>
          </table:table-cell>
          <table:covered-table-cell table:number-columns-repeated="4"/>
          <table:covered-table-cell table:style-name="ce42"/>
          <table:table-cell/>
          <table:covered-table-cell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Return Encapsulation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9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trampoline</text:p>
          </table:table-cell>
          <table:table-cell table:number-columns-repeated="2" table:style-name="ce9" office:value-type="string" calcext:value-type="string">
            <text:p>isentry</text:p>
          </table:table-cell>
          <table:table-cell table:style-name="ce9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trampoline</text:p>
          </table:table-cell>
          <table:table-cell table:number-columns-repeated="3" table:style-name="ce9" office:value-type="string" calcext:value-type="string">
            <text:p>isentry</text:p>
          </table:table-cell>
          <table:table-cell table:style-name="ce8" office:value-type="string" calcext:value-type="string">
            <text:p>isentry</text:p>
          </table:table-cell>
          <table:covered-table-cell/>
          <table:table-cell table:style-name="ce8"/>
          <table:table-cell table:style-name="ce30" office:value-type="string" calcext:value-type="string" table:number-columns-spanned="2" table:number-rows-spanned="1">
            <text:p>Trampoline</text:p>
          </table:table-cell>
          <table:covered-table-cell table:style-name="ce31"/>
          <table:table-cell table:style-name="ce35" office:value-type="string" calcext:value-type="string" table:number-columns-spanned="2" table:number-rows-spanned="1">
            <text:p>Isentry</text:p>
          </table:table-cell>
          <table:covered-table-cell table:style-name="ce31"/>
          <table:table-cell table:style-name="ce27"/>
          <table:table-cell table:style-name="ce37" office:value-type="string" calcext:value-type="string" table:number-columns-spanned="2" table:number-rows-spanned="1">
            <text:p>Trampoline</text:p>
          </table:table-cell>
          <table:covered-table-cell table:style-name="ce31"/>
          <table:table-cell table:style-name="ce41" office:value-type="string" calcext:value-type="string" table:number-columns-spanned="3" table:number-rows-spanned="1">
            <text:p>Isentry</text:p>
          </table:table-cell>
          <table:covered-table-cell/>
          <table:covered-table-cell table:style-name="ce42"/>
          <table:table-cell/>
          <table:covered-table-cell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Clear Registers</text:p>
          </table:table-cell>
          <table:table-cell table:style-name="ce9" office:value-type="string" calcext:value-type="string">
            <text:p>C</text:p>
          </table:table-cell>
          <table:table-cell table:number-columns-repeated="3"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number-columns-repeated="2"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noclear</text:p>
          </table:table-cell>
          <table:table-cell table:number-columns-repeated="2" table:style-name="ce9" office:value-type="string" calcext:value-type="string">
            <text:p>clear</text:p>
          </table:table-cell>
          <table:table-cell table:style-name="ce8" office:value-type="string" calcext:value-type="string">
            <text:p>clear</text:p>
          </table:table-cell>
          <table:covered-table-cell/>
          <table:table-cell table:style-name="ce8"/>
          <table:table-cell table:style-name="ce27"/>
          <table:table-cell table:style-name="ce32" office:value-type="string" calcext:value-type="string">
            <text:p>Clear</text:p>
          </table:table-cell>
          <table:table-cell table:style-name="ce8"/>
          <table:table-cell table:style-name="ce8" office:value-type="string" calcext:value-type="string">
            <text:p>Clear</text:p>
          </table:table-cell>
          <table:table-cell table:style-name="ce27"/>
          <table:table-cell table:style-name="ce38"/>
          <table:table-cell table:style-name="ce32" office:value-type="string" calcext:value-type="string">
            <text:p>Clear</text:p>
          </table:table-cell>
          <table:table-cell table:style-name="ce8"/>
          <table:table-cell table:style-name="ce8" office:value-type="string" calcext:value-type="string">
            <text:p>Clear</text:p>
          </table:table-cell>
          <table:table-cell table:style-name="ce43"/>
          <table:table-cell/>
          <table:covered-table-cell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Reduce callee-saved registers</text:p>
          </table:table-cell>
          <table:table-cell table:style-name="ce9" office:value-type="string" calcext:value-type="string">
            <text:p>O</text:p>
          </table:table-cell>
          <table:table-cell table:number-columns-repeated="11" table:style-name="ce9" office:value-type="string" calcext:value-type="string">
            <text:p>reduce</text:p>
          </table:table-cell>
          <table:table-cell table:style-name="ce9" office:value-type="string" calcext:value-type="string">
            <text:p>noreduce</text:p>
          </table:table-cell>
          <table:table-cell table:style-name="ce8" office:value-type="string" calcext:value-type="string">
            <text:p>reduce</text:p>
          </table:table-cell>
          <table:covered-table-cell/>
          <table:table-cell table:style-name="ce8"/>
          <table:table-cell table:style-name="ce27"/>
          <table:table-cell table:style-name="ce32"/>
          <table:table-cell table:style-name="ce8" table:number-columns-repeated="2"/>
          <table:table-cell table:style-name="ce27"/>
          <table:table-cell table:style-name="ce38"/>
          <table:table-cell table:style-name="ce32"/>
          <table:table-cell table:style-name="ce8" table:number-columns-repeated="2"/>
          <table:table-cell table:style-name="ce43" office:value-type="string" calcext:value-type="string">
            <text:p>Noreduce</text:p>
          </table:table-cell>
          <table:table-cell table:style-name="ce1"/>
          <table:covered-table-cell table:number-columns-repeated="3"/>
          <table:table-cell table:number-columns-repeated="993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8" office:value-type="string" calcext:value-type="string">
            <text:p>D</text:p>
          </table:table-cell>
          <table:table-cell table:number-columns-repeated="11"/>
          <table:table-cell table:style-name="ce1"/>
          <table:table-cell table:style-name="ce1" office:value-type="string" calcext:value-type="string">
            <text:p>Secure calls</text:p>
          </table:table-cell>
          <table:covered-table-cell/>
          <table:table-cell/>
          <table:table-cell table:style-name="ce28"/>
          <table:table-cell table:style-name="ce33"/>
          <table:table-cell table:number-columns-repeated="2"/>
          <table:table-cell table:style-name="ce28"/>
          <table:table-cell table:style-name="ce39"/>
          <table:table-cell table:style-name="ce33"/>
          <table:table-cell table:number-columns-repeated="2"/>
          <table:table-cell table:style-name="ce44"/>
          <table:table-cell table:number-columns-repeated="997"/>
        </table:table-row>
        <table:table-row table:style-name="ro1">
          <table:table-cell table:style-name="ce4" table:formula="of:=IFERROR(__xludf.dummyfunction(&quot;UNIQUE(FILTER(INDIRECT($D$23),INDIRECT($D$23)&lt;&gt;&quot;&quot;&quot;&quot;))&quot;);&quot;coremark&quot;)" office:value-type="string" office:string-value="coremark" calcext:value-type="string">
            <text:p>coremark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C$2:C$6,$B$2:$B$6,LAMBDA(value,column,column&amp;&quot;&quot;='&quot;&quot;&amp;value&amp;&quot;&quot;'&quot;&quot;)),LAMBDA(acc,val,acc&amp;&quot;&quot; AND &quot;&quot;&amp;val))&amp;&quot;&quot;)&quot;&quot;)&quot;);3744)" office:value-type="float" office:value="3744" calcext:value-type="float">
            <text:p>3,74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D$2:D$6,$B$2:$B$6,LAMBDA(value,column,column&amp;&quot;&quot;='&quot;&quot;&amp;value&amp;&quot;&quot;'&quot;&quot;)),LAMBDA(acc,val,acc&amp;&quot;&quot; AND &quot;&quot;&amp;val))&amp;&quot;&quot;)&quot;&quot;)&quot;);3744)" office:value-type="float" office:value="3744" calcext:value-type="float">
            <text:p>3,74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E$2:E$6,$B$2:$B$6,LAMBDA(value,column,column&amp;&quot;&quot;='&quot;&quot;&amp;value&amp;&quot;&quot;'&quot;&quot;)),LAMBDA(acc,val,acc&amp;&quot;&quot; AND &quot;&quot;&amp;val))&amp;&quot;&quot;)&quot;&quot;)&quot;);24816)" office:value-type="float" office:value="24816" calcext:value-type="float">
            <text:p>24,81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F$2:F$6,$B$2:$B$6,LAMBDA(value,column,column&amp;&quot;&quot;='&quot;&quot;&amp;value&amp;&quot;&quot;'&quot;&quot;)),LAMBDA(acc,val,acc&amp;&quot;&quot; AND &quot;&quot;&amp;val))&amp;&quot;&quot;)&quot;&quot;)&quot;);24784)" office:value-type="float" office:value="24784" calcext:value-type="float">
            <text:p>24,7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G$2:G$6,$B$2:$B$6,LAMBDA(value,column,column&amp;&quot;&quot;='&quot;&quot;&amp;value&amp;&quot;&quot;'&quot;&quot;)),LAMBDA(acc,val,acc&amp;&quot;&quot; AND &quot;&quot;&amp;val))&amp;&quot;&quot;)&quot;&quot;)&quot;);24816)" office:value-type="float" office:value="24816" calcext:value-type="float">
            <text:p>24,81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H$2:H$6,$B$2:$B$6,LAMBDA(value,column,column&amp;&quot;&quot;='&quot;&quot;&amp;value&amp;&quot;&quot;'&quot;&quot;)),LAMBDA(acc,val,acc&amp;&quot;&quot; AND &quot;&quot;&amp;val))&amp;&quot;&quot;)&quot;&quot;)&quot;);24784)" office:value-type="float" office:value="24784" calcext:value-type="float">
            <text:p>24,7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I$2:I$6,$B$2:$B$6,LAMBDA(value,column,column&amp;&quot;&quot;='&quot;&quot;&amp;value&amp;&quot;&quot;'&quot;&quot;)),LAMBDA(acc,val,acc&amp;&quot;&quot; AND &quot;&quot;&amp;val))&amp;&quot;&quot;)&quot;&quot;)&quot;);3744)" office:value-type="float" office:value="3744" calcext:value-type="float">
            <text:p>3,74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J$2:J$6,$B$2:$B$6,LAMBDA(value,column,column&amp;&quot;&quot;='&quot;&quot;&amp;value&amp;&quot;&quot;'&quot;&quot;)),LAMBDA(acc,val,acc&amp;&quot;&quot; AND &quot;&quot;&amp;val))&amp;&quot;&quot;)&quot;&quot;)&quot;);4192)" office:value-type="float" office:value="4192" calcext:value-type="float">
            <text:p>4,1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K$2:K$6,$B$2:$B$6,LAMBDA(value,column,column&amp;&quot;&quot;='&quot;&quot;&amp;value&amp;&quot;&quot;'&quot;&quot;)),LAMBDA(acc,val,acc&amp;&quot;&quot; AND &quot;&quot;&amp;val))&amp;&quot;&quot;)&quot;&quot;)&quot;);4208)" office:value-type="float" office:value="4208" calcext:value-type="float">
            <text:p>4,20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L$2:L$6,$B$2:$B$6,LAMBDA(value,column,column&amp;&quot;&quot;='&quot;&quot;&amp;value&amp;&quot;&quot;'&quot;&quot;)),LAMBDA(acc,val,acc&amp;&quot;&quot; AND &quot;&quot;&amp;val))&amp;&quot;&quot;)&quot;&quot;)&quot;);4080)" office:value-type="float" office:value="4080" calcext:value-type="float">
            <text:p>4,0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M$2:M$6,$B$2:$B$6,LAMBDA(value,column,column&amp;&quot;&quot;='&quot;&quot;&amp;value&amp;&quot;&quot;'&quot;&quot;)),LAMBDA(acc,val,acc&amp;&quot;&quot; AND &quot;&quot;&amp;val))&amp;&quot;&quot;)&quot;&quot;)&quot;);4080)" office:value-type="float" office:value="4080" calcext:value-type="float">
            <text:p>4,0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N$2:N$6,$B$2:$B$6,LAMBDA(value,column,column&amp;&quot;&quot;='&quot;&quot;&amp;value&amp;&quot;&quot;'&quot;&quot;)),LAMBDA(acc,val,acc&amp;&quot;&quot; AND &quot;&quot;&amp;val))&amp;&quot;&quot;)&quot;&quot;)&quot;);4224)" office:value-type="float" office:value="4224" calcext:value-type="float">
            <text:p>4,224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8&amp;&quot;&quot;'&quot;&quot;,MAP(O$2:O$6,$B$2:$B$6,LAMBDA(value,column,column&amp;&quot;&quot;='&quot;&quot;&amp;value&amp;&quot;&quot;'&quot;&quot;)),LAMBDA(acc,val,acc&amp;&quot;&quot; AND &quot;&quot;&amp;val))&amp;&quot;&quot;)&quot;&quot;)&quot;);603)" office:value-type="float" office:value="603" calcext:value-type="float">
            <text:p>603</text:p>
          </table:table-cell>
          <table:table-cell table:style-name="ce24" table:number-matrix-columns-spanned="1" table:number-matrix-rows-spanned="9" table:formula="of:=[$Instructions.P8:.P16]" office:value-type="float" office:value="0.0257224916827411" calcext:value-type="float">
            <text:p>0.0257</text:p>
          </table:table-cell>
          <table:table-cell table:style-name="ce5" table:formula="of:=([.D8]-[.C8])/[.C8]" office:value-type="percentage" office:value="0" calcext:value-type="percentage">
            <text:p>0.00%</text:p>
          </table:table-cell>
          <table:table-cell table:style-name="ce29" table:formula="of:=([.E8]-[.D8])/[.D8]" office:value-type="percentage" office:value="5.62820512820513" calcext:value-type="percentage">
            <text:p>562.82%</text:p>
          </table:table-cell>
          <table:table-cell table:style-name="ce34" table:formula="of:=([.F8]-[.E8])/[.E8]" office:value-type="percentage" office:value="-0.00128949065119278" calcext:value-type="percentage">
            <text:p>-0.13%</text:p>
          </table:table-cell>
          <table:table-cell table:style-name="ce5" table:formula="of:=([.G8]-[.D8])/[.D8]" office:value-type="percentage" office:value="5.62820512820513" calcext:value-type="percentage">
            <text:p>562.82%</text:p>
          </table:table-cell>
          <table:table-cell table:style-name="ce5" table:formula="of:=([.H8]-[.G8])/[.G8]" office:value-type="percentage" office:value="-0.00128949065119278" calcext:value-type="percentage">
            <text:p>-0.13%</text:p>
          </table:table-cell>
          <table:table-cell table:style-name="ce29" table:formula="of:=([.I8]-[.D8])/[.D8]" office:value-type="percentage" office:value="0" calcext:value-type="percentage">
            <text:p>0.00%</text:p>
          </table:table-cell>
          <table:table-cell table:style-name="ce40" table:formula="of:=([.J8]-[.I8])/[.I8]" office:value-type="percentage" office:value="0.11965811965812" calcext:value-type="percentage">
            <text:p>11.97%</text:p>
          </table:table-cell>
          <table:table-cell table:style-name="ce34" table:formula="of:=([.K8]-[.J8])/[.J8]" office:value-type="percentage" office:value="0.00381679389312977" calcext:value-type="percentage">
            <text:p>0.38%</text:p>
          </table:table-cell>
          <table:table-cell table:style-name="ce5" table:formula="of:=([.L8]-[.I8])/[.I8]" office:value-type="percentage" office:value="0.0897435897435897" calcext:value-type="percentage">
            <text:p>8.97%</text:p>
          </table:table-cell>
          <table:table-cell table:style-name="ce5" table:formula="of:=([.M8]-[.I8])/[.I8]" office:value-type="percentage" office:value="0.0897435897435897" calcext:value-type="percentage">
            <text:p>8.97%</text:p>
          </table:table-cell>
          <table:table-cell table:style-name="ce45" table:formula="of:=([.N8]-[.M8])/[.M8]" office:value-type="percentage" office:value="0.0352941176470588" calcext:value-type="percentage">
            <text:p>3.53%</text:p>
          </table:table-cell>
          <table:table-cell/>
          <table:table-cell table:style-name="ce5" table:formula="of:=([.H8]-[.C8])/[.C8]" office:value-type="percentage" office:value="5.61965811965812" calcext:value-type="percentage">
            <text:p>561.97%</text:p>
          </table:table-cell>
          <table:table-cell table:style-name="ce5" table:formula="of:=([.M8]-[.C8])/[.C8]" office:value-type="percentage" office:value="0.0897435897435897" calcext:value-type="percentage">
            <text:p>8.97%</text:p>
          </table:table-cell>
          <table:table-cell table:style-name="ce5" table:formula="of:=([.$M8]-[.$K8])/[.$I8]" office:value-type="percentage" office:value="-0.0341880341880342" calcext:value-type="percentage">
            <text:p>-3.42%</text:p>
          </table:table-cell>
          <table:table-cell table:number-columns-repeated="993"/>
        </table:table-row>
        <table:table-row table:style-name="ro1">
          <table:table-cell table:style-name="ce4" table:formula="of:=IFERROR(__xludf.dummyfunction(&quot;&quot;&quot;COMPUTED_VALUE&quot;&quot;&quot;);&quot;libc-bench_malloc&quot;)" office:value-type="string" office:string-value="libc-bench_malloc" calcext:value-type="string">
            <text:p>libc-bench_malloc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C$2:C$6,$B$2:$B$6,LAMBDA(value,column,column&amp;&quot;&quot;='&quot;&quot;&amp;value&amp;&quot;&quot;'&quot;&quot;)),LAMBDA(acc,val,acc&amp;&quot;&quot; AND &quot;&quot;&amp;val))&amp;&quot;&quot;)&quot;&quot;)&quot;);2320)" office:value-type="float" office:value="2320" calcext:value-type="float">
            <text:p>2,3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D$2:D$6,$B$2:$B$6,LAMBDA(value,column,column&amp;&quot;&quot;='&quot;&quot;&amp;value&amp;&quot;&quot;'&quot;&quot;)),LAMBDA(acc,val,acc&amp;&quot;&quot; AND &quot;&quot;&amp;val))&amp;&quot;&quot;)&quot;&quot;)&quot;);2320)" office:value-type="float" office:value="2320" calcext:value-type="float">
            <text:p>2,3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E$2:E$6,$B$2:$B$6,LAMBDA(value,column,column&amp;&quot;&quot;='&quot;&quot;&amp;value&amp;&quot;&quot;'&quot;&quot;)),LAMBDA(acc,val,acc&amp;&quot;&quot; AND &quot;&quot;&amp;val))&amp;&quot;&quot;)&quot;&quot;)&quot;);17200)" office:value-type="float" office:value="17200" calcext:value-type="float">
            <text:p>17,20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F$2:F$6,$B$2:$B$6,LAMBDA(value,column,column&amp;&quot;&quot;='&quot;&quot;&amp;value&amp;&quot;&quot;'&quot;&quot;)),LAMBDA(acc,val,acc&amp;&quot;&quot; AND &quot;&quot;&amp;val))&amp;&quot;&quot;)&quot;&quot;)&quot;);17184)" office:value-type="float" office:value="17184" calcext:value-type="float">
            <text:p>17,1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G$2:G$6,$B$2:$B$6,LAMBDA(value,column,column&amp;&quot;&quot;='&quot;&quot;&amp;value&amp;&quot;&quot;'&quot;&quot;)),LAMBDA(acc,val,acc&amp;&quot;&quot; AND &quot;&quot;&amp;val))&amp;&quot;&quot;)&quot;&quot;)&quot;);17200)" office:value-type="float" office:value="17200" calcext:value-type="float">
            <text:p>17,20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H$2:H$6,$B$2:$B$6,LAMBDA(value,column,column&amp;&quot;&quot;='&quot;&quot;&amp;value&amp;&quot;&quot;'&quot;&quot;)),LAMBDA(acc,val,acc&amp;&quot;&quot; AND &quot;&quot;&amp;val))&amp;&quot;&quot;)&quot;&quot;)&quot;);17184)" office:value-type="float" office:value="17184" calcext:value-type="float">
            <text:p>17,1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I$2:I$6,$B$2:$B$6,LAMBDA(value,column,column&amp;&quot;&quot;='&quot;&quot;&amp;value&amp;&quot;&quot;'&quot;&quot;)),LAMBDA(acc,val,acc&amp;&quot;&quot; AND &quot;&quot;&amp;val))&amp;&quot;&quot;)&quot;&quot;)&quot;);2320)" office:value-type="float" office:value="2320" calcext:value-type="float">
            <text:p>2,3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J$2:J$6,$B$2:$B$6,LAMBDA(value,column,column&amp;&quot;&quot;='&quot;&quot;&amp;value&amp;&quot;&quot;'&quot;&quot;)),LAMBDA(acc,val,acc&amp;&quot;&quot; AND &quot;&quot;&amp;val))&amp;&quot;&quot;)&quot;&quot;)&quot;);2320)" office:value-type="float" office:value="2320" calcext:value-type="float">
            <text:p>2,3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K$2:K$6,$B$2:$B$6,LAMBDA(value,column,column&amp;&quot;&quot;='&quot;&quot;&amp;value&amp;&quot;&quot;'&quot;&quot;)),LAMBDA(acc,val,acc&amp;&quot;&quot; AND &quot;&quot;&amp;val))&amp;&quot;&quot;)&quot;&quot;)&quot;);2320)" office:value-type="float" office:value="2320" calcext:value-type="float">
            <text:p>2,3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L$2:L$6,$B$2:$B$6,LAMBDA(value,column,column&amp;&quot;&quot;='&quot;&quot;&amp;value&amp;&quot;&quot;'&quot;&quot;)),LAMBDA(acc,val,acc&amp;&quot;&quot; AND &quot;&quot;&amp;val))&amp;&quot;&quot;)&quot;&quot;)&quot;);2320)" office:value-type="float" office:value="2320" calcext:value-type="float">
            <text:p>2,3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M$2:M$6,$B$2:$B$6,LAMBDA(value,column,column&amp;&quot;&quot;='&quot;&quot;&amp;value&amp;&quot;&quot;'&quot;&quot;)),LAMBDA(acc,val,acc&amp;&quot;&quot; AND &quot;&quot;&amp;val))&amp;&quot;&quot;)&quot;&quot;)&quot;);2320)" office:value-type="float" office:value="2320" calcext:value-type="float">
            <text:p>2,3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N$2:N$6,$B$2:$B$6,LAMBDA(value,column,column&amp;&quot;&quot;='&quot;&quot;&amp;value&amp;&quot;&quot;'&quot;&quot;)),LAMBDA(acc,val,acc&amp;&quot;&quot; AND &quot;&quot;&amp;val))&amp;&quot;&quot;)&quot;&quot;)&quot;);2352)" office:value-type="float" office:value="2352" calcext:value-type="float">
            <text:p>2,352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9&amp;&quot;&quot;'&quot;&quot;,MAP(O$2:O$6,$B$2:$B$6,LAMBDA(value,column,column&amp;&quot;&quot;='&quot;&quot;&amp;value&amp;&quot;&quot;'&quot;&quot;)),LAMBDA(acc,val,acc&amp;&quot;&quot; AND &quot;&quot;&amp;val))&amp;&quot;&quot;)&quot;&quot;)&quot;);18000)" office:value-type="float" office:value="18000" calcext:value-type="float">
            <text:p>18,000</text:p>
          </table:table-cell>
          <table:table-cell table:style-name="ce24" office:value-type="float" office:value="1.25450384303313" calcext:value-type="float">
            <text:p>1.2545</text:p>
          </table:table-cell>
          <table:table-cell table:style-name="ce5" table:formula="of:=([.D9]-[.C9])/[.C9]" office:value-type="percentage" office:value="0" calcext:value-type="percentage">
            <text:p>0.00%</text:p>
          </table:table-cell>
          <table:table-cell table:style-name="ce29" table:formula="of:=([.E9]-[.D9])/[.D9]" office:value-type="percentage" office:value="6.41379310344828" calcext:value-type="percentage">
            <text:p>641.38%</text:p>
          </table:table-cell>
          <table:table-cell table:style-name="ce34" table:formula="of:=([.F9]-[.E9])/[.E9]" office:value-type="percentage" office:value="-0.000930232558139535" calcext:value-type="percentage">
            <text:p>-0.09%</text:p>
          </table:table-cell>
          <table:table-cell table:style-name="ce5" table:formula="of:=([.G9]-[.D9])/[.D9]" office:value-type="percentage" office:value="6.41379310344828" calcext:value-type="percentage">
            <text:p>641.38%</text:p>
          </table:table-cell>
          <table:table-cell table:style-name="ce5" table:formula="of:=([.H9]-[.G9])/[.G9]" office:value-type="percentage" office:value="-0.000930232558139535" calcext:value-type="percentage">
            <text:p>-0.09%</text:p>
          </table:table-cell>
          <table:table-cell table:style-name="ce29" table:formula="of:=([.I9]-[.D9])/[.D9]" office:value-type="percentage" office:value="0" calcext:value-type="percentage">
            <text:p>0.00%</text:p>
          </table:table-cell>
          <table:table-cell table:style-name="ce40" table:formula="of:=([.J9]-[.I9])/[.I9]" office:value-type="percentage" office:value="0" calcext:value-type="percentage">
            <text:p>0.00%</text:p>
          </table:table-cell>
          <table:table-cell table:style-name="ce34" table:formula="of:=([.K9]-[.J9])/[.J9]" office:value-type="percentage" office:value="0" calcext:value-type="percentage">
            <text:p>0.00%</text:p>
          </table:table-cell>
          <table:table-cell table:style-name="ce5" table:formula="of:=([.L9]-[.I9])/[.I9]" office:value-type="percentage" office:value="0" calcext:value-type="percentage">
            <text:p>0.00%</text:p>
          </table:table-cell>
          <table:table-cell table:style-name="ce5" table:formula="of:=([.M9]-[.I9])/[.I9]" office:value-type="percentage" office:value="0" calcext:value-type="percentage">
            <text:p>0.00%</text:p>
          </table:table-cell>
          <table:table-cell table:style-name="ce45" table:formula="of:=([.N9]-[.M9])/[.M9]" office:value-type="percentage" office:value="0.0137931034482759" calcext:value-type="percentage">
            <text:p>1.38%</text:p>
          </table:table-cell>
          <table:table-cell/>
          <table:table-cell table:style-name="ce5" table:formula="of:=([.H9]-[.C9])/[.C9]" office:value-type="percentage" office:value="6.40689655172414" calcext:value-type="percentage">
            <text:p>640.69%</text:p>
          </table:table-cell>
          <table:table-cell table:style-name="ce5" table:formula="of:=([.M9]-[.C9])/[.C9]" office:value-type="percentage" office:value="0" calcext:value-type="percentage">
            <text:p>0.00%</text:p>
          </table:table-cell>
          <table:table-cell table:style-name="ce5" table:formula="of:=([.$M9]-[.$K9])/[.$I9]" office:value-type="percentage" office:value="0" calcext:value-type="percentage">
            <text:p>0.00%</text:p>
          </table:table-cell>
          <table:table-cell table:number-columns-repeated="993"/>
        </table:table-row>
        <table:table-row table:style-name="ro1">
          <table:table-cell table:style-name="ce4" table:formula="of:=IFERROR(__xludf.dummyfunction(&quot;&quot;&quot;COMPUTED_VALUE&quot;&quot;&quot;);&quot;libc-bench_string&quot;)" office:value-type="string" office:string-value="libc-bench_string" calcext:value-type="string">
            <text:p>libc-bench_string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C$2:C$6,$B$2:$B$6,LAMBDA(value,column,column&amp;&quot;&quot;='&quot;&quot;&amp;value&amp;&quot;&quot;'&quot;&quot;)),LAMBDA(acc,val,acc&amp;&quot;&quot; AND &quot;&quot;&amp;val))&amp;&quot;&quot;)&quot;&quot;)&quot;);2336)" office:value-type="float" office:value="2336" calcext:value-type="float">
            <text:p>2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D$2:D$6,$B$2:$B$6,LAMBDA(value,column,column&amp;&quot;&quot;='&quot;&quot;&amp;value&amp;&quot;&quot;'&quot;&quot;)),LAMBDA(acc,val,acc&amp;&quot;&quot; AND &quot;&quot;&amp;val))&amp;&quot;&quot;)&quot;&quot;)&quot;);2336)" office:value-type="float" office:value="2336" calcext:value-type="float">
            <text:p>2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E$2:E$6,$B$2:$B$6,LAMBDA(value,column,column&amp;&quot;&quot;='&quot;&quot;&amp;value&amp;&quot;&quot;'&quot;&quot;)),LAMBDA(acc,val,acc&amp;&quot;&quot; AND &quot;&quot;&amp;val))&amp;&quot;&quot;)&quot;&quot;)&quot;);16880)" office:value-type="float" office:value="16880" calcext:value-type="float">
            <text:p>16,8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F$2:F$6,$B$2:$B$6,LAMBDA(value,column,column&amp;&quot;&quot;='&quot;&quot;&amp;value&amp;&quot;&quot;'&quot;&quot;)),LAMBDA(acc,val,acc&amp;&quot;&quot; AND &quot;&quot;&amp;val))&amp;&quot;&quot;)&quot;&quot;)&quot;);16864)" office:value-type="float" office:value="16864" calcext:value-type="float">
            <text:p>16,8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G$2:G$6,$B$2:$B$6,LAMBDA(value,column,column&amp;&quot;&quot;='&quot;&quot;&amp;value&amp;&quot;&quot;'&quot;&quot;)),LAMBDA(acc,val,acc&amp;&quot;&quot; AND &quot;&quot;&amp;val))&amp;&quot;&quot;)&quot;&quot;)&quot;);16880)" office:value-type="float" office:value="16880" calcext:value-type="float">
            <text:p>16,8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H$2:H$6,$B$2:$B$6,LAMBDA(value,column,column&amp;&quot;&quot;='&quot;&quot;&amp;value&amp;&quot;&quot;'&quot;&quot;)),LAMBDA(acc,val,acc&amp;&quot;&quot; AND &quot;&quot;&amp;val))&amp;&quot;&quot;)&quot;&quot;)&quot;);16864)" office:value-type="float" office:value="16864" calcext:value-type="float">
            <text:p>16,8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I$2:I$6,$B$2:$B$6,LAMBDA(value,column,column&amp;&quot;&quot;='&quot;&quot;&amp;value&amp;&quot;&quot;'&quot;&quot;)),LAMBDA(acc,val,acc&amp;&quot;&quot; AND &quot;&quot;&amp;val))&amp;&quot;&quot;)&quot;&quot;)&quot;);2336)" office:value-type="float" office:value="2336" calcext:value-type="float">
            <text:p>2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J$2:J$6,$B$2:$B$6,LAMBDA(value,column,column&amp;&quot;&quot;='&quot;&quot;&amp;value&amp;&quot;&quot;'&quot;&quot;)),LAMBDA(acc,val,acc&amp;&quot;&quot; AND &quot;&quot;&amp;val))&amp;&quot;&quot;)&quot;&quot;)&quot;);2336)" office:value-type="float" office:value="2336" calcext:value-type="float">
            <text:p>2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K$2:K$6,$B$2:$B$6,LAMBDA(value,column,column&amp;&quot;&quot;='&quot;&quot;&amp;value&amp;&quot;&quot;'&quot;&quot;)),LAMBDA(acc,val,acc&amp;&quot;&quot; AND &quot;&quot;&amp;val))&amp;&quot;&quot;)&quot;&quot;)&quot;);2336)" office:value-type="float" office:value="2336" calcext:value-type="float">
            <text:p>2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L$2:L$6,$B$2:$B$6,LAMBDA(value,column,column&amp;&quot;&quot;='&quot;&quot;&amp;value&amp;&quot;&quot;'&quot;&quot;)),LAMBDA(acc,val,acc&amp;&quot;&quot; AND &quot;&quot;&amp;val))&amp;&quot;&quot;)&quot;&quot;)&quot;);2336)" office:value-type="float" office:value="2336" calcext:value-type="float">
            <text:p>2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M$2:M$6,$B$2:$B$6,LAMBDA(value,column,column&amp;&quot;&quot;='&quot;&quot;&amp;value&amp;&quot;&quot;'&quot;&quot;)),LAMBDA(acc,val,acc&amp;&quot;&quot; AND &quot;&quot;&amp;val))&amp;&quot;&quot;)&quot;&quot;)&quot;);2336)" office:value-type="float" office:value="2336" calcext:value-type="float">
            <text:p>2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N$2:N$6,$B$2:$B$6,LAMBDA(value,column,column&amp;&quot;&quot;='&quot;&quot;&amp;value&amp;&quot;&quot;'&quot;&quot;)),LAMBDA(acc,val,acc&amp;&quot;&quot; AND &quot;&quot;&amp;val))&amp;&quot;&quot;)&quot;&quot;)&quot;);2336)" office:value-type="float" office:value="2336" calcext:value-type="float">
            <text:p>2,336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0&amp;&quot;&quot;'&quot;&quot;,MAP(O$2:O$6,$B$2:$B$6,LAMBDA(value,column,column&amp;&quot;&quot;='&quot;&quot;&amp;value&amp;&quot;&quot;'&quot;&quot;)),LAMBDA(acc,val,acc&amp;&quot;&quot; AND &quot;&quot;&amp;val))&amp;&quot;&quot;)&quot;&quot;)&quot;);898)" office:value-type="float" office:value="898" calcext:value-type="float">
            <text:p>898</text:p>
          </table:table-cell>
          <table:table-cell table:style-name="ce24" office:value-type="float" office:value="0.0348671663853803" calcext:value-type="float">
            <text:p>0.0349</text:p>
          </table:table-cell>
          <table:table-cell table:style-name="ce5" table:formula="of:=([.D10]-[.C10])/[.C10]" office:value-type="percentage" office:value="0" calcext:value-type="percentage">
            <text:p>0.00%</text:p>
          </table:table-cell>
          <table:table-cell table:style-name="ce29" table:formula="of:=([.E10]-[.D10])/[.D10]" office:value-type="percentage" office:value="6.22602739726027" calcext:value-type="percentage">
            <text:p>622.60%</text:p>
          </table:table-cell>
          <table:table-cell table:style-name="ce34" table:formula="of:=([.F10]-[.E10])/[.E10]" office:value-type="percentage" office:value="-0.000947867298578199" calcext:value-type="percentage">
            <text:p>-0.09%</text:p>
          </table:table-cell>
          <table:table-cell table:style-name="ce5" table:formula="of:=([.G10]-[.D10])/[.D10]" office:value-type="percentage" office:value="6.22602739726027" calcext:value-type="percentage">
            <text:p>622.60%</text:p>
          </table:table-cell>
          <table:table-cell table:style-name="ce5" table:formula="of:=([.H10]-[.G10])/[.G10]" office:value-type="percentage" office:value="-0.000947867298578199" calcext:value-type="percentage">
            <text:p>-0.09%</text:p>
          </table:table-cell>
          <table:table-cell table:style-name="ce29" table:formula="of:=([.I10]-[.D10])/[.D10]" office:value-type="percentage" office:value="0" calcext:value-type="percentage">
            <text:p>0.00%</text:p>
          </table:table-cell>
          <table:table-cell table:style-name="ce40" table:formula="of:=([.J10]-[.I10])/[.I10]" office:value-type="percentage" office:value="0" calcext:value-type="percentage">
            <text:p>0.00%</text:p>
          </table:table-cell>
          <table:table-cell table:style-name="ce34" table:formula="of:=([.K10]-[.J10])/[.J10]" office:value-type="percentage" office:value="0" calcext:value-type="percentage">
            <text:p>0.00%</text:p>
          </table:table-cell>
          <table:table-cell table:style-name="ce5" table:formula="of:=([.L10]-[.I10])/[.I10]" office:value-type="percentage" office:value="0" calcext:value-type="percentage">
            <text:p>0.00%</text:p>
          </table:table-cell>
          <table:table-cell table:style-name="ce5" table:formula="of:=([.M10]-[.I10])/[.I10]" office:value-type="percentage" office:value="0" calcext:value-type="percentage">
            <text:p>0.00%</text:p>
          </table:table-cell>
          <table:table-cell table:style-name="ce45" table:formula="of:=([.N10]-[.M10])/[.M10]" office:value-type="percentage" office:value="0" calcext:value-type="percentage">
            <text:p>0.00%</text:p>
          </table:table-cell>
          <table:table-cell/>
          <table:table-cell table:style-name="ce5" table:formula="of:=([.H10]-[.C10])/[.C10]" office:value-type="percentage" office:value="6.21917808219178" calcext:value-type="percentage">
            <text:p>621.92%</text:p>
          </table:table-cell>
          <table:table-cell table:style-name="ce5" table:formula="of:=([.M10]-[.C10])/[.C10]" office:value-type="percentage" office:value="0" calcext:value-type="percentage">
            <text:p>0.00%</text:p>
          </table:table-cell>
          <table:table-cell table:style-name="ce5" table:formula="of:=([.$M10]-[.$K10])/[.$I10]" office:value-type="percentage" office:value="0" calcext:value-type="percentage">
            <text:p>0.00%</text:p>
          </table:table-cell>
          <table:table-cell table:number-columns-repeated="993"/>
        </table:table-row>
        <table:table-row table:style-name="ro1">
          <table:table-cell table:style-name="ce4" table:formula="of:=IFERROR(__xludf.dummyfunction(&quot;&quot;&quot;COMPUTED_VALUE&quot;&quot;&quot;);&quot;libc-bench_regex&quot;)" office:value-type="string" office:string-value="libc-bench_regex" calcext:value-type="string">
            <text:p>libc-bench_regex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C$2:C$6,$B$2:$B$6,LAMBDA(value,column,column&amp;&quot;&quot;='&quot;&quot;&amp;value&amp;&quot;&quot;'&quot;&quot;)),LAMBDA(acc,val,acc&amp;&quot;&quot; AND &quot;&quot;&amp;val))&amp;&quot;&quot;)&quot;&quot;)&quot;);5504)" office:value-type="float" office:value="5504" calcext:value-type="float">
            <text:p>5,5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D$2:D$6,$B$2:$B$6,LAMBDA(value,column,column&amp;&quot;&quot;='&quot;&quot;&amp;value&amp;&quot;&quot;'&quot;&quot;)),LAMBDA(acc,val,acc&amp;&quot;&quot; AND &quot;&quot;&amp;val))&amp;&quot;&quot;)&quot;&quot;)&quot;);5504)" office:value-type="float" office:value="5504" calcext:value-type="float">
            <text:p>5,5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E$2:E$6,$B$2:$B$6,LAMBDA(value,column,column&amp;&quot;&quot;='&quot;&quot;&amp;value&amp;&quot;&quot;'&quot;&quot;)),LAMBDA(acc,val,acc&amp;&quot;&quot; AND &quot;&quot;&amp;val))&amp;&quot;&quot;)&quot;&quot;)&quot;);21056)" office:value-type="float" office:value="21056" calcext:value-type="float">
            <text:p>21,05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F$2:F$6,$B$2:$B$6,LAMBDA(value,column,column&amp;&quot;&quot;='&quot;&quot;&amp;value&amp;&quot;&quot;'&quot;&quot;)),LAMBDA(acc,val,acc&amp;&quot;&quot; AND &quot;&quot;&amp;val))&amp;&quot;&quot;)&quot;&quot;)&quot;);21040)" office:value-type="float" office:value="21040" calcext:value-type="float">
            <text:p>21,04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G$2:G$6,$B$2:$B$6,LAMBDA(value,column,column&amp;&quot;&quot;='&quot;&quot;&amp;value&amp;&quot;&quot;'&quot;&quot;)),LAMBDA(acc,val,acc&amp;&quot;&quot; AND &quot;&quot;&amp;val))&amp;&quot;&quot;)&quot;&quot;)&quot;);21056)" office:value-type="float" office:value="21056" calcext:value-type="float">
            <text:p>21,05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H$2:H$6,$B$2:$B$6,LAMBDA(value,column,column&amp;&quot;&quot;='&quot;&quot;&amp;value&amp;&quot;&quot;'&quot;&quot;)),LAMBDA(acc,val,acc&amp;&quot;&quot; AND &quot;&quot;&amp;val))&amp;&quot;&quot;)&quot;&quot;)&quot;);21040)" office:value-type="float" office:value="21040" calcext:value-type="float">
            <text:p>21,04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I$2:I$6,$B$2:$B$6,LAMBDA(value,column,column&amp;&quot;&quot;='&quot;&quot;&amp;value&amp;&quot;&quot;'&quot;&quot;)),LAMBDA(acc,val,acc&amp;&quot;&quot; AND &quot;&quot;&amp;val))&amp;&quot;&quot;)&quot;&quot;)&quot;);5504)" office:value-type="float" office:value="5504" calcext:value-type="float">
            <text:p>5,5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J$2:J$6,$B$2:$B$6,LAMBDA(value,column,column&amp;&quot;&quot;='&quot;&quot;&amp;value&amp;&quot;&quot;'&quot;&quot;)),LAMBDA(acc,val,acc&amp;&quot;&quot; AND &quot;&quot;&amp;val))&amp;&quot;&quot;)&quot;&quot;)&quot;);6160)" office:value-type="float" office:value="6160" calcext:value-type="float">
            <text:p>6,16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K$2:K$6,$B$2:$B$6,LAMBDA(value,column,column&amp;&quot;&quot;='&quot;&quot;&amp;value&amp;&quot;&quot;'&quot;&quot;)),LAMBDA(acc,val,acc&amp;&quot;&quot; AND &quot;&quot;&amp;val))&amp;&quot;&quot;)&quot;&quot;)&quot;);6160)" office:value-type="float" office:value="6160" calcext:value-type="float">
            <text:p>6,16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L$2:L$6,$B$2:$B$6,LAMBDA(value,column,column&amp;&quot;&quot;='&quot;&quot;&amp;value&amp;&quot;&quot;'&quot;&quot;)),LAMBDA(acc,val,acc&amp;&quot;&quot; AND &quot;&quot;&amp;val))&amp;&quot;&quot;)&quot;&quot;)&quot;);5968)" office:value-type="float" office:value="5968" calcext:value-type="float">
            <text:p>5,96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M$2:M$6,$B$2:$B$6,LAMBDA(value,column,column&amp;&quot;&quot;='&quot;&quot;&amp;value&amp;&quot;&quot;'&quot;&quot;)),LAMBDA(acc,val,acc&amp;&quot;&quot; AND &quot;&quot;&amp;val))&amp;&quot;&quot;)&quot;&quot;)&quot;);5968)" office:value-type="float" office:value="5968" calcext:value-type="float">
            <text:p>5,96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N$2:N$6,$B$2:$B$6,LAMBDA(value,column,column&amp;&quot;&quot;='&quot;&quot;&amp;value&amp;&quot;&quot;'&quot;&quot;)),LAMBDA(acc,val,acc&amp;&quot;&quot; AND &quot;&quot;&amp;val))&amp;&quot;&quot;)&quot;&quot;)&quot;);6160)" office:value-type="float" office:value="6160" calcext:value-type="float">
            <text:p>6,160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1&amp;&quot;&quot;'&quot;&quot;,MAP(O$2:O$6,$B$2:$B$6,LAMBDA(value,column,column&amp;&quot;&quot;='&quot;&quot;&amp;value&amp;&quot;&quot;'&quot;&quot;)),LAMBDA(acc,val,acc&amp;&quot;&quot; AND &quot;&quot;&amp;val))&amp;&quot;&quot;)&quot;&quot;)&quot;);33)" office:value-type="float" office:value="33" calcext:value-type="float">
            <text:p>33</text:p>
          </table:table-cell>
          <table:table-cell table:style-name="ce24" office:value-type="float" office:value="0.0650198901754946" calcext:value-type="float">
            <text:p>0.0650</text:p>
          </table:table-cell>
          <table:table-cell table:style-name="ce5" table:formula="of:=([.D11]-[.C11])/[.C11]" office:value-type="percentage" office:value="0" calcext:value-type="percentage">
            <text:p>0.00%</text:p>
          </table:table-cell>
          <table:table-cell table:style-name="ce29" table:formula="of:=([.E11]-[.D11])/[.D11]" office:value-type="percentage" office:value="2.82558139534884" calcext:value-type="percentage">
            <text:p>282.56%</text:p>
          </table:table-cell>
          <table:table-cell table:style-name="ce34" table:formula="of:=([.F11]-[.E11])/[.E11]" office:value-type="percentage" office:value="-0.000759878419452888" calcext:value-type="percentage">
            <text:p>-0.08%</text:p>
          </table:table-cell>
          <table:table-cell table:style-name="ce5" table:formula="of:=([.G11]-[.D11])/[.D11]" office:value-type="percentage" office:value="2.82558139534884" calcext:value-type="percentage">
            <text:p>282.56%</text:p>
          </table:table-cell>
          <table:table-cell table:style-name="ce5" table:formula="of:=([.H11]-[.G11])/[.G11]" office:value-type="percentage" office:value="-0.000759878419452888" calcext:value-type="percentage">
            <text:p>-0.08%</text:p>
          </table:table-cell>
          <table:table-cell table:style-name="ce29" table:formula="of:=([.I11]-[.D11])/[.D11]" office:value-type="percentage" office:value="0" calcext:value-type="percentage">
            <text:p>0.00%</text:p>
          </table:table-cell>
          <table:table-cell table:style-name="ce40" table:formula="of:=([.J11]-[.I11])/[.I11]" office:value-type="percentage" office:value="0.119186046511628" calcext:value-type="percentage">
            <text:p>11.92%</text:p>
          </table:table-cell>
          <table:table-cell table:style-name="ce34" table:formula="of:=([.K11]-[.J11])/[.J11]" office:value-type="percentage" office:value="0" calcext:value-type="percentage">
            <text:p>0.00%</text:p>
          </table:table-cell>
          <table:table-cell table:style-name="ce5" table:formula="of:=([.L11]-[.I11])/[.I11]" office:value-type="percentage" office:value="0.0843023255813954" calcext:value-type="percentage">
            <text:p>8.43%</text:p>
          </table:table-cell>
          <table:table-cell table:style-name="ce5" table:formula="of:=([.M11]-[.I11])/[.I11]" office:value-type="percentage" office:value="0.0843023255813954" calcext:value-type="percentage">
            <text:p>8.43%</text:p>
          </table:table-cell>
          <table:table-cell table:style-name="ce45" table:formula="of:=([.N11]-[.M11])/[.M11]" office:value-type="percentage" office:value="0.032171581769437" calcext:value-type="percentage">
            <text:p>3.22%</text:p>
          </table:table-cell>
          <table:table-cell/>
          <table:table-cell table:style-name="ce5" table:formula="of:=([.H11]-[.C11])/[.C11]" office:value-type="percentage" office:value="2.82267441860465" calcext:value-type="percentage">
            <text:p>282.27%</text:p>
          </table:table-cell>
          <table:table-cell table:style-name="ce5" table:formula="of:=([.M11]-[.C11])/[.C11]" office:value-type="percentage" office:value="0.0843023255813954" calcext:value-type="percentage">
            <text:p>8.43%</text:p>
          </table:table-cell>
          <table:table-cell table:style-name="ce5" table:formula="of:=([.$M11]-[.$K11])/[.$I11]" office:value-type="percentage" office:value="-0.0348837209302326" calcext:value-type="percentage">
            <text:p>-3.49%</text:p>
          </table:table-cell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-0.1&quot;)" office:value-type="string" office:string-value="random-callstack-ubench-0.1" calcext:value-type="string">
            <text:p>random-callstack-ubench-0.1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C$2:C$6,$B$2:$B$6,LAMBDA(value,column,column&amp;&quot;&quot;='&quot;&quot;&amp;value&amp;&quot;&quot;'&quot;&quot;)),LAMBDA(acc,val,acc&amp;&quot;&quot; AND &quot;&quot;&amp;val))&amp;&quot;&quot;)&quot;&quot;)&quot;);23680)" office:value-type="float" office:value="23680" calcext:value-type="float">
            <text:p>23,6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D$2:D$6,$B$2:$B$6,LAMBDA(value,column,column&amp;&quot;&quot;='&quot;&quot;&amp;value&amp;&quot;&quot;'&quot;&quot;)),LAMBDA(acc,val,acc&amp;&quot;&quot; AND &quot;&quot;&amp;val))&amp;&quot;&quot;)&quot;&quot;)&quot;);23680)" office:value-type="float" office:value="23680" calcext:value-type="float">
            <text:p>23,6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E$2:E$6,$B$2:$B$6,LAMBDA(value,column,column&amp;&quot;&quot;='&quot;&quot;&amp;value&amp;&quot;&quot;'&quot;&quot;)),LAMBDA(acc,val,acc&amp;&quot;&quot; AND &quot;&quot;&amp;val))&amp;&quot;&quot;)&quot;&quot;)&quot;);115408)" office:value-type="float" office:value="115408" calcext:value-type="float">
            <text:p>115,40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F$2:F$6,$B$2:$B$6,LAMBDA(value,column,column&amp;&quot;&quot;='&quot;&quot;&amp;value&amp;&quot;&quot;'&quot;&quot;)),LAMBDA(acc,val,acc&amp;&quot;&quot; AND &quot;&quot;&amp;val))&amp;&quot;&quot;)&quot;&quot;)&quot;);115392)" office:value-type="float" office:value="115392" calcext:value-type="float">
            <text:p>115,3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G$2:G$6,$B$2:$B$6,LAMBDA(value,column,column&amp;&quot;&quot;='&quot;&quot;&amp;value&amp;&quot;&quot;'&quot;&quot;)),LAMBDA(acc,val,acc&amp;&quot;&quot; AND &quot;&quot;&amp;val))&amp;&quot;&quot;)&quot;&quot;)&quot;);115408)" office:value-type="float" office:value="115408" calcext:value-type="float">
            <text:p>115,40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H$2:H$6,$B$2:$B$6,LAMBDA(value,column,column&amp;&quot;&quot;='&quot;&quot;&amp;value&amp;&quot;&quot;'&quot;&quot;)),LAMBDA(acc,val,acc&amp;&quot;&quot; AND &quot;&quot;&amp;val))&amp;&quot;&quot;)&quot;&quot;)&quot;);115392)" office:value-type="float" office:value="115392" calcext:value-type="float">
            <text:p>115,3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I$2:I$6,$B$2:$B$6,LAMBDA(value,column,column&amp;&quot;&quot;='&quot;&quot;&amp;value&amp;&quot;&quot;'&quot;&quot;)),LAMBDA(acc,val,acc&amp;&quot;&quot; AND &quot;&quot;&amp;val))&amp;&quot;&quot;)&quot;&quot;)&quot;);23744)" office:value-type="float" office:value="23744" calcext:value-type="float">
            <text:p>23,74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J$2:J$6,$B$2:$B$6,LAMBDA(value,column,column&amp;&quot;&quot;='&quot;&quot;&amp;value&amp;&quot;&quot;'&quot;&quot;)),LAMBDA(acc,val,acc&amp;&quot;&quot; AND &quot;&quot;&amp;val))&amp;&quot;&quot;)&quot;&quot;)&quot;);24624)" office:value-type="float" office:value="24624" calcext:value-type="float">
            <text:p>24,62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K$2:K$6,$B$2:$B$6,LAMBDA(value,column,column&amp;&quot;&quot;='&quot;&quot;&amp;value&amp;&quot;&quot;'&quot;&quot;)),LAMBDA(acc,val,acc&amp;&quot;&quot; AND &quot;&quot;&amp;val))&amp;&quot;&quot;)&quot;&quot;)&quot;);24624)" office:value-type="float" office:value="24624" calcext:value-type="float">
            <text:p>24,62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L$2:L$6,$B$2:$B$6,LAMBDA(value,column,column&amp;&quot;&quot;='&quot;&quot;&amp;value&amp;&quot;&quot;'&quot;&quot;)),LAMBDA(acc,val,acc&amp;&quot;&quot; AND &quot;&quot;&amp;val))&amp;&quot;&quot;)&quot;&quot;)&quot;);24448)" office:value-type="float" office:value="24448" calcext:value-type="float">
            <text:p>24,44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M$2:M$6,$B$2:$B$6,LAMBDA(value,column,column&amp;&quot;&quot;='&quot;&quot;&amp;value&amp;&quot;&quot;'&quot;&quot;)),LAMBDA(acc,val,acc&amp;&quot;&quot; AND &quot;&quot;&amp;val))&amp;&quot;&quot;)&quot;&quot;)&quot;);24448)" office:value-type="float" office:value="24448" calcext:value-type="float">
            <text:p>24,44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N$2:N$6,$B$2:$B$6,LAMBDA(value,column,column&amp;&quot;&quot;='&quot;&quot;&amp;value&amp;&quot;&quot;'&quot;&quot;)),LAMBDA(acc,val,acc&amp;&quot;&quot; AND &quot;&quot;&amp;val))&amp;&quot;&quot;)&quot;&quot;)&quot;);26864)" office:value-type="float" office:value="26864" calcext:value-type="float">
            <text:p>26,864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2&amp;&quot;&quot;'&quot;&quot;,MAP(O$2:O$6,$B$2:$B$6,LAMBDA(value,column,column&amp;&quot;&quot;='&quot;&quot;&amp;value&amp;&quot;&quot;'&quot;&quot;)),LAMBDA(acc,val,acc&amp;&quot;&quot; AND &quot;&quot;&amp;val))&amp;&quot;&quot;)&quot;&quot;)&quot;);529)" office:value-type="float" office:value="529" calcext:value-type="float">
            <text:p>529</text:p>
          </table:table-cell>
          <table:table-cell table:style-name="ce24" office:value-type="float" office:value="0.251754069111965" calcext:value-type="float">
            <text:p>0.2518</text:p>
          </table:table-cell>
          <table:table-cell table:style-name="ce5" table:formula="of:=([.D12]-[.C12])/[.C12]" office:value-type="percentage" office:value="0" calcext:value-type="percentage">
            <text:p>0.00%</text:p>
          </table:table-cell>
          <table:table-cell table:style-name="ce29" table:formula="of:=([.E12]-[.D12])/[.D12]" office:value-type="percentage" office:value="3.87364864864865" calcext:value-type="percentage">
            <text:p>387.36%</text:p>
          </table:table-cell>
          <table:table-cell table:style-name="ce34" table:formula="of:=([.F12]-[.E12])/[.E12]" office:value-type="percentage" office:value="-0.000138638569249965" calcext:value-type="percentage">
            <text:p>-0.01%</text:p>
          </table:table-cell>
          <table:table-cell table:style-name="ce5" table:formula="of:=([.G12]-[.D12])/[.D12]" office:value-type="percentage" office:value="3.87364864864865" calcext:value-type="percentage">
            <text:p>387.36%</text:p>
          </table:table-cell>
          <table:table-cell table:style-name="ce5" table:formula="of:=([.H12]-[.G12])/[.G12]" office:value-type="percentage" office:value="-0.000138638569249965" calcext:value-type="percentage">
            <text:p>-0.01%</text:p>
          </table:table-cell>
          <table:table-cell table:style-name="ce29" table:formula="of:=([.I12]-[.D12])/[.D12]" office:value-type="percentage" office:value="0.0027027027027027" calcext:value-type="percentage">
            <text:p>0.27%</text:p>
          </table:table-cell>
          <table:table-cell table:style-name="ce40" table:formula="of:=([.J12]-[.I12])/[.I12]" office:value-type="percentage" office:value="0.0370619946091644" calcext:value-type="percentage">
            <text:p>3.71%</text:p>
          </table:table-cell>
          <table:table-cell table:style-name="ce34" table:formula="of:=([.K12]-[.J12])/[.J12]" office:value-type="percentage" office:value="0" calcext:value-type="percentage">
            <text:p>0.00%</text:p>
          </table:table-cell>
          <table:table-cell table:style-name="ce5" table:formula="of:=([.L12]-[.I12])/[.I12]" office:value-type="percentage" office:value="0.0296495956873315" calcext:value-type="percentage">
            <text:p>2.96%</text:p>
          </table:table-cell>
          <table:table-cell table:style-name="ce5" table:formula="of:=([.M12]-[.I12])/[.I12]" office:value-type="percentage" office:value="0.0296495956873315" calcext:value-type="percentage">
            <text:p>2.96%</text:p>
          </table:table-cell>
          <table:table-cell table:style-name="ce45" table:formula="of:=([.N12]-[.M12])/[.M12]" office:value-type="percentage" office:value="0.0988219895287958" calcext:value-type="percentage">
            <text:p>9.88%</text:p>
          </table:table-cell>
          <table:table-cell/>
          <table:table-cell table:style-name="ce5" table:formula="of:=([.H12]-[.C12])/[.C12]" office:value-type="percentage" office:value="3.87297297297297" calcext:value-type="percentage">
            <text:p>387.30%</text:p>
          </table:table-cell>
          <table:table-cell table:style-name="ce5" table:formula="of:=([.M12]-[.C12])/[.C12]" office:value-type="percentage" office:value="0.0324324324324324" calcext:value-type="percentage">
            <text:p>3.24%</text:p>
          </table:table-cell>
          <table:table-cell table:style-name="ce5" table:formula="of:=([.$M12]-[.$K12])/[.$I12]" office:value-type="percentage" office:value="-0.00741239892183288" calcext:value-type="percentage">
            <text:p>-0.74%</text:p>
          </table:table-cell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-0.5&quot;)" office:value-type="string" office:string-value="random-callstack-ubench-0.5" calcext:value-type="string">
            <text:p>random-callstack-ubench-0.5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C$2:C$6,$B$2:$B$6,LAMBDA(value,column,column&amp;&quot;&quot;='&quot;&quot;&amp;value&amp;&quot;&quot;'&quot;&quot;)),LAMBDA(acc,val,acc&amp;&quot;&quot; AND &quot;&quot;&amp;val))&amp;&quot;&quot;)&quot;&quot;)&quot;);23680)" office:value-type="float" office:value="23680" calcext:value-type="float">
            <text:p>23,6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D$2:D$6,$B$2:$B$6,LAMBDA(value,column,column&amp;&quot;&quot;='&quot;&quot;&amp;value&amp;&quot;&quot;'&quot;&quot;)),LAMBDA(acc,val,acc&amp;&quot;&quot; AND &quot;&quot;&amp;val))&amp;&quot;&quot;)&quot;&quot;)&quot;);23680)" office:value-type="float" office:value="23680" calcext:value-type="float">
            <text:p>23,6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E$2:E$6,$B$2:$B$6,LAMBDA(value,column,column&amp;&quot;&quot;='&quot;&quot;&amp;value&amp;&quot;&quot;'&quot;&quot;)),LAMBDA(acc,val,acc&amp;&quot;&quot; AND &quot;&quot;&amp;val))&amp;&quot;&quot;)&quot;&quot;)&quot;);401648)" office:value-type="float" office:value="401648" calcext:value-type="float">
            <text:p>401,64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F$2:F$6,$B$2:$B$6,LAMBDA(value,column,column&amp;&quot;&quot;='&quot;&quot;&amp;value&amp;&quot;&quot;'&quot;&quot;)),LAMBDA(acc,val,acc&amp;&quot;&quot; AND &quot;&quot;&amp;val))&amp;&quot;&quot;)&quot;&quot;)&quot;);401632)" office:value-type="float" office:value="401632" calcext:value-type="float">
            <text:p>401,63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G$2:G$6,$B$2:$B$6,LAMBDA(value,column,column&amp;&quot;&quot;='&quot;&quot;&amp;value&amp;&quot;&quot;'&quot;&quot;)),LAMBDA(acc,val,acc&amp;&quot;&quot; AND &quot;&quot;&amp;val))&amp;&quot;&quot;)&quot;&quot;)&quot;);401648)" office:value-type="float" office:value="401648" calcext:value-type="float">
            <text:p>401,64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H$2:H$6,$B$2:$B$6,LAMBDA(value,column,column&amp;&quot;&quot;='&quot;&quot;&amp;value&amp;&quot;&quot;'&quot;&quot;)),LAMBDA(acc,val,acc&amp;&quot;&quot; AND &quot;&quot;&amp;val))&amp;&quot;&quot;)&quot;&quot;)&quot;);401632)" office:value-type="float" office:value="401632" calcext:value-type="float">
            <text:p>401,63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I$2:I$6,$B$2:$B$6,LAMBDA(value,column,column&amp;&quot;&quot;='&quot;&quot;&amp;value&amp;&quot;&quot;'&quot;&quot;)),LAMBDA(acc,val,acc&amp;&quot;&quot; AND &quot;&quot;&amp;val))&amp;&quot;&quot;)&quot;&quot;)&quot;);23744)" office:value-type="float" office:value="23744" calcext:value-type="float">
            <text:p>23,74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J$2:J$6,$B$2:$B$6,LAMBDA(value,column,column&amp;&quot;&quot;='&quot;&quot;&amp;value&amp;&quot;&quot;'&quot;&quot;)),LAMBDA(acc,val,acc&amp;&quot;&quot; AND &quot;&quot;&amp;val))&amp;&quot;&quot;)&quot;&quot;)&quot;);27136)" office:value-type="float" office:value="27136" calcext:value-type="float">
            <text:p>27,1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K$2:K$6,$B$2:$B$6,LAMBDA(value,column,column&amp;&quot;&quot;='&quot;&quot;&amp;value&amp;&quot;&quot;'&quot;&quot;)),LAMBDA(acc,val,acc&amp;&quot;&quot; AND &quot;&quot;&amp;val))&amp;&quot;&quot;)&quot;&quot;)&quot;);27136)" office:value-type="float" office:value="27136" calcext:value-type="float">
            <text:p>27,1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L$2:L$6,$B$2:$B$6,LAMBDA(value,column,column&amp;&quot;&quot;='&quot;&quot;&amp;value&amp;&quot;&quot;'&quot;&quot;)),LAMBDA(acc,val,acc&amp;&quot;&quot; AND &quot;&quot;&amp;val))&amp;&quot;&quot;)&quot;&quot;)&quot;);26464)" office:value-type="float" office:value="26464" calcext:value-type="float">
            <text:p>26,4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M$2:M$6,$B$2:$B$6,LAMBDA(value,column,column&amp;&quot;&quot;='&quot;&quot;&amp;value&amp;&quot;&quot;'&quot;&quot;)),LAMBDA(acc,val,acc&amp;&quot;&quot; AND &quot;&quot;&amp;val))&amp;&quot;&quot;)&quot;&quot;)&quot;);26464)" office:value-type="float" office:value="26464" calcext:value-type="float">
            <text:p>26,4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N$2:N$6,$B$2:$B$6,LAMBDA(value,column,column&amp;&quot;&quot;='&quot;&quot;&amp;value&amp;&quot;&quot;'&quot;&quot;)),LAMBDA(acc,val,acc&amp;&quot;&quot; AND &quot;&quot;&amp;val))&amp;&quot;&quot;)&quot;&quot;)&quot;);35088)" office:value-type="float" office:value="35088" calcext:value-type="float">
            <text:p>35,088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3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office:value-type="float" office:value="1.15064243820628" calcext:value-type="float">
            <text:p>1.1506</text:p>
          </table:table-cell>
          <table:table-cell table:style-name="ce5" table:formula="of:=([.D13]-[.C13])/[.C13]" office:value-type="percentage" office:value="0" calcext:value-type="percentage">
            <text:p>0.00%</text:p>
          </table:table-cell>
          <table:table-cell table:style-name="ce29" table:formula="of:=([.E13]-[.D13])/[.D13]" office:value-type="percentage" office:value="15.9614864864865" calcext:value-type="percentage">
            <text:p>1596.15%</text:p>
          </table:table-cell>
          <table:table-cell table:style-name="ce34" table:formula="of:=([.F13]-[.E13])/[.E13]" office:value-type="percentage" office:value="-0.0000398358761900968" calcext:value-type="percentage">
            <text:p>0.00%</text:p>
          </table:table-cell>
          <table:table-cell table:style-name="ce5" table:formula="of:=([.G13]-[.D13])/[.D13]" office:value-type="percentage" office:value="15.9614864864865" calcext:value-type="percentage">
            <text:p>1596.15%</text:p>
          </table:table-cell>
          <table:table-cell table:style-name="ce5" table:formula="of:=([.H13]-[.G13])/[.G13]" office:value-type="percentage" office:value="-0.0000398358761900968" calcext:value-type="percentage">
            <text:p>0.00%</text:p>
          </table:table-cell>
          <table:table-cell table:style-name="ce29" table:formula="of:=([.I13]-[.D13])/[.D13]" office:value-type="percentage" office:value="0.0027027027027027" calcext:value-type="percentage">
            <text:p>0.27%</text:p>
          </table:table-cell>
          <table:table-cell table:style-name="ce40" table:formula="of:=([.J13]-[.I13])/[.I13]" office:value-type="percentage" office:value="0.142857142857143" calcext:value-type="percentage">
            <text:p>14.29%</text:p>
          </table:table-cell>
          <table:table-cell table:style-name="ce34" table:formula="of:=([.K13]-[.J13])/[.J13]" office:value-type="percentage" office:value="0" calcext:value-type="percentage">
            <text:p>0.00%</text:p>
          </table:table-cell>
          <table:table-cell table:style-name="ce5" table:formula="of:=([.L13]-[.I13])/[.I13]" office:value-type="percentage" office:value="0.11455525606469" calcext:value-type="percentage">
            <text:p>11.46%</text:p>
          </table:table-cell>
          <table:table-cell table:style-name="ce5" table:formula="of:=([.M13]-[.I13])/[.I13]" office:value-type="percentage" office:value="0.11455525606469" calcext:value-type="percentage">
            <text:p>11.46%</text:p>
          </table:table-cell>
          <table:table-cell table:style-name="ce45" table:formula="of:=([.N13]-[.M13])/[.M13]" office:value-type="percentage" office:value="0.325876662636034" calcext:value-type="percentage">
            <text:p>32.59%</text:p>
          </table:table-cell>
          <table:table-cell/>
          <table:table-cell table:style-name="ce5" table:formula="of:=([.H13]-[.C13])/[.C13]" office:value-type="percentage" office:value="15.9608108108108" calcext:value-type="percentage">
            <text:p>1596.08%</text:p>
          </table:table-cell>
          <table:table-cell table:style-name="ce5" table:formula="of:=([.M13]-[.C13])/[.C13]" office:value-type="percentage" office:value="0.117567567567568" calcext:value-type="percentage">
            <text:p>11.76%</text:p>
          </table:table-cell>
          <table:table-cell table:style-name="ce5" table:formula="of:=([.$M13]-[.$K13])/[.$I13]" office:value-type="percentage" office:value="-0.0283018867924528" calcext:value-type="percentage">
            <text:p>-2.83%</text:p>
          </table:table-cell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-0.9&quot;)" office:value-type="string" office:string-value="random-callstack-ubench-0.9" calcext:value-type="string">
            <text:p>random-callstack-ubench-0.9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C$2:C$6,$B$2:$B$6,LAMBDA(value,column,column&amp;&quot;&quot;='&quot;&quot;&amp;value&amp;&quot;&quot;'&quot;&quot;)),LAMBDA(acc,val,acc&amp;&quot;&quot; AND &quot;&quot;&amp;val))&amp;&quot;&quot;)&quot;&quot;)&quot;);23680)" office:value-type="float" office:value="23680" calcext:value-type="float">
            <text:p>23,6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D$2:D$6,$B$2:$B$6,LAMBDA(value,column,column&amp;&quot;&quot;='&quot;&quot;&amp;value&amp;&quot;&quot;'&quot;&quot;)),LAMBDA(acc,val,acc&amp;&quot;&quot; AND &quot;&quot;&amp;val))&amp;&quot;&quot;)&quot;&quot;)&quot;);23680)" office:value-type="float" office:value="23680" calcext:value-type="float">
            <text:p>23,6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E$2:E$6,$B$2:$B$6,LAMBDA(value,column,column&amp;&quot;&quot;='&quot;&quot;&amp;value&amp;&quot;&quot;'&quot;&quot;)),LAMBDA(acc,val,acc&amp;&quot;&quot; AND &quot;&quot;&amp;val))&amp;&quot;&quot;)&quot;&quot;)&quot;);688368)" office:value-type="float" office:value="688368" calcext:value-type="float">
            <text:p>688,36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F$2:F$6,$B$2:$B$6,LAMBDA(value,column,column&amp;&quot;&quot;='&quot;&quot;&amp;value&amp;&quot;&quot;'&quot;&quot;)),LAMBDA(acc,val,acc&amp;&quot;&quot; AND &quot;&quot;&amp;val))&amp;&quot;&quot;)&quot;&quot;)&quot;);688352)" office:value-type="float" office:value="688352" calcext:value-type="float">
            <text:p>688,35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G$2:G$6,$B$2:$B$6,LAMBDA(value,column,column&amp;&quot;&quot;='&quot;&quot;&amp;value&amp;&quot;&quot;'&quot;&quot;)),LAMBDA(acc,val,acc&amp;&quot;&quot; AND &quot;&quot;&amp;val))&amp;&quot;&quot;)&quot;&quot;)&quot;);688368)" office:value-type="float" office:value="688368" calcext:value-type="float">
            <text:p>688,36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H$2:H$6,$B$2:$B$6,LAMBDA(value,column,column&amp;&quot;&quot;='&quot;&quot;&amp;value&amp;&quot;&quot;'&quot;&quot;)),LAMBDA(acc,val,acc&amp;&quot;&quot; AND &quot;&quot;&amp;val))&amp;&quot;&quot;)&quot;&quot;)&quot;);688352)" office:value-type="float" office:value="688352" calcext:value-type="float">
            <text:p>688,35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I$2:I$6,$B$2:$B$6,LAMBDA(value,column,column&amp;&quot;&quot;='&quot;&quot;&amp;value&amp;&quot;&quot;'&quot;&quot;)),LAMBDA(acc,val,acc&amp;&quot;&quot; AND &quot;&quot;&amp;val))&amp;&quot;&quot;)&quot;&quot;)&quot;);23744)" office:value-type="float" office:value="23744" calcext:value-type="float">
            <text:p>23,74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J$2:J$6,$B$2:$B$6,LAMBDA(value,column,column&amp;&quot;&quot;='&quot;&quot;&amp;value&amp;&quot;&quot;'&quot;&quot;)),LAMBDA(acc,val,acc&amp;&quot;&quot; AND &quot;&quot;&amp;val))&amp;&quot;&quot;)&quot;&quot;)&quot;);30336)" office:value-type="float" office:value="30336" calcext:value-type="float">
            <text:p>30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K$2:K$6,$B$2:$B$6,LAMBDA(value,column,column&amp;&quot;&quot;='&quot;&quot;&amp;value&amp;&quot;&quot;'&quot;&quot;)),LAMBDA(acc,val,acc&amp;&quot;&quot; AND &quot;&quot;&amp;val))&amp;&quot;&quot;)&quot;&quot;)&quot;);30336)" office:value-type="float" office:value="30336" calcext:value-type="float">
            <text:p>30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L$2:L$6,$B$2:$B$6,LAMBDA(value,column,column&amp;&quot;&quot;='&quot;&quot;&amp;value&amp;&quot;&quot;'&quot;&quot;)),LAMBDA(acc,val,acc&amp;&quot;&quot; AND &quot;&quot;&amp;val))&amp;&quot;&quot;)&quot;&quot;)&quot;);29024)" office:value-type="float" office:value="29024" calcext:value-type="float">
            <text:p>29,02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M$2:M$6,$B$2:$B$6,LAMBDA(value,column,column&amp;&quot;&quot;='&quot;&quot;&amp;value&amp;&quot;&quot;'&quot;&quot;)),LAMBDA(acc,val,acc&amp;&quot;&quot; AND &quot;&quot;&amp;val))&amp;&quot;&quot;)&quot;&quot;)&quot;);29024)" office:value-type="float" office:value="29024" calcext:value-type="float">
            <text:p>29,02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N$2:N$6,$B$2:$B$6,LAMBDA(value,column,column&amp;&quot;&quot;='&quot;&quot;&amp;value&amp;&quot;&quot;'&quot;&quot;)),LAMBDA(acc,val,acc&amp;&quot;&quot; AND &quot;&quot;&amp;val))&amp;&quot;&quot;)&quot;&quot;)&quot;);44848)" office:value-type="float" office:value="44848" calcext:value-type="float">
            <text:p>44,848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4&amp;&quot;&quot;'&quot;&quot;,MAP(O$2:O$6,$B$2:$B$6,LAMBDA(value,column,column&amp;&quot;&quot;='&quot;&quot;&amp;value&amp;&quot;&quot;'&quot;&quot;)),LAMBDA(acc,val,acc&amp;&quot;&quot; AND &quot;&quot;&amp;val))&amp;&quot;&quot;)&quot;&quot;)&quot;);4499)" office:value-type="float" office:value="4499" calcext:value-type="float">
            <text:p>4,499</text:p>
          </table:table-cell>
          <table:table-cell table:style-name="ce24" office:value-type="float" office:value="1.99131152583858" calcext:value-type="float">
            <text:p>1.9913</text:p>
          </table:table-cell>
          <table:table-cell table:style-name="ce5" table:formula="of:=([.D14]-[.C14])/[.C14]" office:value-type="percentage" office:value="0" calcext:value-type="percentage">
            <text:p>0.00%</text:p>
          </table:table-cell>
          <table:table-cell table:style-name="ce29" table:formula="of:=([.E14]-[.D14])/[.D14]" office:value-type="percentage" office:value="28.0695945945946" calcext:value-type="percentage">
            <text:p>2806.96%</text:p>
          </table:table-cell>
          <table:table-cell table:style-name="ce34" table:formula="of:=([.F14]-[.E14])/[.E14]" office:value-type="percentage" office:value="-0.0000232433814471329" calcext:value-type="percentage">
            <text:p>0.00%</text:p>
          </table:table-cell>
          <table:table-cell table:style-name="ce5" table:formula="of:=([.G14]-[.D14])/[.D14]" office:value-type="percentage" office:value="28.0695945945946" calcext:value-type="percentage">
            <text:p>2806.96%</text:p>
          </table:table-cell>
          <table:table-cell table:style-name="ce5" table:formula="of:=([.H14]-[.G14])/[.G14]" office:value-type="percentage" office:value="-0.0000232433814471329" calcext:value-type="percentage">
            <text:p>0.00%</text:p>
          </table:table-cell>
          <table:table-cell table:style-name="ce29" table:formula="of:=([.I14]-[.D14])/[.D14]" office:value-type="percentage" office:value="0.0027027027027027" calcext:value-type="percentage">
            <text:p>0.27%</text:p>
          </table:table-cell>
          <table:table-cell table:style-name="ce40" table:formula="of:=([.J14]-[.I14])/[.I14]" office:value-type="percentage" office:value="0.277628032345013" calcext:value-type="percentage">
            <text:p>27.76%</text:p>
          </table:table-cell>
          <table:table-cell table:style-name="ce34" table:formula="of:=([.K14]-[.J14])/[.J14]" office:value-type="percentage" office:value="0" calcext:value-type="percentage">
            <text:p>0.00%</text:p>
          </table:table-cell>
          <table:table-cell table:style-name="ce5" table:formula="of:=([.L14]-[.I14])/[.I14]" office:value-type="percentage" office:value="0.222371967654986" calcext:value-type="percentage">
            <text:p>22.24%</text:p>
          </table:table-cell>
          <table:table-cell table:style-name="ce5" table:formula="of:=([.M14]-[.I14])/[.I14]" office:value-type="percentage" office:value="0.222371967654986" calcext:value-type="percentage">
            <text:p>22.24%</text:p>
          </table:table-cell>
          <table:table-cell table:style-name="ce45" table:formula="of:=([.N14]-[.M14])/[.M14]" office:value-type="percentage" office:value="0.545203969128997" calcext:value-type="percentage">
            <text:p>54.52%</text:p>
          </table:table-cell>
          <table:table-cell/>
          <table:table-cell table:style-name="ce5" table:formula="of:=([.H14]-[.C14])/[.C14]" office:value-type="percentage" office:value="28.0689189189189" calcext:value-type="percentage">
            <text:p>2806.89%</text:p>
          </table:table-cell>
          <table:table-cell table:style-name="ce5" table:formula="of:=([.M14]-[.C14])/[.C14]" office:value-type="percentage" office:value="0.225675675675676" calcext:value-type="percentage">
            <text:p>22.57%</text:p>
          </table:table-cell>
          <table:table-cell table:style-name="ce5" table:formula="of:=([.$M14]-[.$K14])/[.$I14]" office:value-type="percentage" office:value="-0.055256064690027" calcext:value-type="percentage">
            <text:p>-5.53%</text:p>
          </table:table-cell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+large-alloc-0.5&quot;)" office:value-type="string" office:string-value="random-callstack-ubench+large-alloc-0.5" calcext:value-type="string">
            <text:p>random-callstack-ubench+large-alloc-0.5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C$2:C$6,$B$2:$B$6,LAMBDA(value,column,column&amp;&quot;&quot;='&quot;&quot;&amp;value&amp;&quot;&quot;'&quot;&quot;)),LAMBDA(acc,val,acc&amp;&quot;&quot; AND &quot;&quot;&amp;val))&amp;&quot;&quot;)&quot;&quot;)&quot;);39040)" office:value-type="float" office:value="39040" calcext:value-type="float">
            <text:p>39,04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D$2:D$6,$B$2:$B$6,LAMBDA(value,column,column&amp;&quot;&quot;='&quot;&quot;&amp;value&amp;&quot;&quot;'&quot;&quot;)),LAMBDA(acc,val,acc&amp;&quot;&quot; AND &quot;&quot;&amp;val))&amp;&quot;&quot;)&quot;&quot;)&quot;);39040)" office:value-type="float" office:value="39040" calcext:value-type="float">
            <text:p>39,04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E$2:E$6,$B$2:$B$6,LAMBDA(value,column,column&amp;&quot;&quot;='&quot;&quot;&amp;value&amp;&quot;&quot;'&quot;&quot;)),LAMBDA(acc,val,acc&amp;&quot;&quot; AND &quot;&quot;&amp;val))&amp;&quot;&quot;)&quot;&quot;)&quot;);401808)" office:value-type="float" office:value="401808" calcext:value-type="float">
            <text:p>401,80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F$2:F$6,$B$2:$B$6,LAMBDA(value,column,column&amp;&quot;&quot;='&quot;&quot;&amp;value&amp;&quot;&quot;'&quot;&quot;)),LAMBDA(acc,val,acc&amp;&quot;&quot; AND &quot;&quot;&amp;val))&amp;&quot;&quot;)&quot;&quot;)&quot;);401792)" office:value-type="float" office:value="401792" calcext:value-type="float">
            <text:p>401,7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G$2:G$6,$B$2:$B$6,LAMBDA(value,column,column&amp;&quot;&quot;='&quot;&quot;&amp;value&amp;&quot;&quot;'&quot;&quot;)),LAMBDA(acc,val,acc&amp;&quot;&quot; AND &quot;&quot;&amp;val))&amp;&quot;&quot;)&quot;&quot;)&quot;);401808)" office:value-type="float" office:value="401808" calcext:value-type="float">
            <text:p>401,80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H$2:H$6,$B$2:$B$6,LAMBDA(value,column,column&amp;&quot;&quot;='&quot;&quot;&amp;value&amp;&quot;&quot;'&quot;&quot;)),LAMBDA(acc,val,acc&amp;&quot;&quot; AND &quot;&quot;&amp;val))&amp;&quot;&quot;)&quot;&quot;)&quot;);401792)" office:value-type="float" office:value="401792" calcext:value-type="float">
            <text:p>401,7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I$2:I$6,$B$2:$B$6,LAMBDA(value,column,column&amp;&quot;&quot;='&quot;&quot;&amp;value&amp;&quot;&quot;'&quot;&quot;)),LAMBDA(acc,val,acc&amp;&quot;&quot; AND &quot;&quot;&amp;val))&amp;&quot;&quot;)&quot;&quot;)&quot;);39168)" office:value-type="float" office:value="39168" calcext:value-type="float">
            <text:p>39,16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J$2:J$6,$B$2:$B$6,LAMBDA(value,column,column&amp;&quot;&quot;='&quot;&quot;&amp;value&amp;&quot;&quot;'&quot;&quot;)),LAMBDA(acc,val,acc&amp;&quot;&quot; AND &quot;&quot;&amp;val))&amp;&quot;&quot;)&quot;&quot;)&quot;);42560)" office:value-type="float" office:value="42560" calcext:value-type="float">
            <text:p>42,56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K$2:K$6,$B$2:$B$6,LAMBDA(value,column,column&amp;&quot;&quot;='&quot;&quot;&amp;value&amp;&quot;&quot;'&quot;&quot;)),LAMBDA(acc,val,acc&amp;&quot;&quot; AND &quot;&quot;&amp;val))&amp;&quot;&quot;)&quot;&quot;)&quot;);42560)" office:value-type="float" office:value="42560" calcext:value-type="float">
            <text:p>42,56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L$2:L$6,$B$2:$B$6,LAMBDA(value,column,column&amp;&quot;&quot;='&quot;&quot;&amp;value&amp;&quot;&quot;'&quot;&quot;)),LAMBDA(acc,val,acc&amp;&quot;&quot; AND &quot;&quot;&amp;val))&amp;&quot;&quot;)&quot;&quot;)&quot;);41888)" office:value-type="float" office:value="41888" calcext:value-type="float">
            <text:p>41,88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M$2:M$6,$B$2:$B$6,LAMBDA(value,column,column&amp;&quot;&quot;='&quot;&quot;&amp;value&amp;&quot;&quot;'&quot;&quot;)),LAMBDA(acc,val,acc&amp;&quot;&quot; AND &quot;&quot;&amp;val))&amp;&quot;&quot;)&quot;&quot;)&quot;);41888)" office:value-type="float" office:value="41888" calcext:value-type="float">
            <text:p>41,88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N$2:N$6,$B$2:$B$6,LAMBDA(value,column,column&amp;&quot;&quot;='&quot;&quot;&amp;value&amp;&quot;&quot;'&quot;&quot;)),LAMBDA(acc,val,acc&amp;&quot;&quot; AND &quot;&quot;&amp;val))&amp;&quot;&quot;)&quot;&quot;)&quot;);50352)" office:value-type="float" office:value="50352" calcext:value-type="float">
            <text:p>50,352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5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office:value-type="float" office:value="1.08562693116329" calcext:value-type="float">
            <text:p>1.0856</text:p>
          </table:table-cell>
          <table:table-cell table:style-name="ce5" table:formula="of:=([.D15]-[.C15])/[.C15]" office:value-type="percentage" office:value="0" calcext:value-type="percentage">
            <text:p>0.00%</text:p>
          </table:table-cell>
          <table:table-cell table:style-name="ce29" table:formula="of:=([.E15]-[.D15])/[.D15]" office:value-type="percentage" office:value="9.2922131147541" calcext:value-type="percentage">
            <text:p>929.22%</text:p>
          </table:table-cell>
          <table:table-cell table:style-name="ce34" table:formula="of:=([.F15]-[.E15])/[.E15]" office:value-type="percentage" office:value="-0.0000398200135388046" calcext:value-type="percentage">
            <text:p>0.00%</text:p>
          </table:table-cell>
          <table:table-cell table:style-name="ce5" table:formula="of:=([.G15]-[.D15])/[.D15]" office:value-type="percentage" office:value="9.2922131147541" calcext:value-type="percentage">
            <text:p>929.22%</text:p>
          </table:table-cell>
          <table:table-cell table:style-name="ce5" table:formula="of:=([.H15]-[.G15])/[.G15]" office:value-type="percentage" office:value="-0.0000398200135388046" calcext:value-type="percentage">
            <text:p>0.00%</text:p>
          </table:table-cell>
          <table:table-cell table:style-name="ce29" table:formula="of:=([.I15]-[.D15])/[.D15]" office:value-type="percentage" office:value="0.00327868852459016" calcext:value-type="percentage">
            <text:p>0.33%</text:p>
          </table:table-cell>
          <table:table-cell table:style-name="ce40" table:formula="of:=([.J15]-[.I15])/[.I15]" office:value-type="percentage" office:value="0.0866013071895425" calcext:value-type="percentage">
            <text:p>8.66%</text:p>
          </table:table-cell>
          <table:table-cell table:style-name="ce34" table:formula="of:=([.K15]-[.J15])/[.J15]" office:value-type="percentage" office:value="0" calcext:value-type="percentage">
            <text:p>0.00%</text:p>
          </table:table-cell>
          <table:table-cell table:style-name="ce5" table:formula="of:=([.L15]-[.I15])/[.I15]" office:value-type="percentage" office:value="0.0694444444444444" calcext:value-type="percentage">
            <text:p>6.94%</text:p>
          </table:table-cell>
          <table:table-cell table:style-name="ce5" table:formula="of:=([.M15]-[.I15])/[.I15]" office:value-type="percentage" office:value="0.0694444444444444" calcext:value-type="percentage">
            <text:p>6.94%</text:p>
          </table:table-cell>
          <table:table-cell table:style-name="ce45" table:formula="of:=([.N15]-[.M15])/[.M15]" office:value-type="percentage" office:value="0.202062643239114" calcext:value-type="percentage">
            <text:p>20.21%</text:p>
          </table:table-cell>
          <table:table-cell/>
          <table:table-cell table:style-name="ce5" table:formula="of:=([.H15]-[.C15])/[.C15]" office:value-type="percentage" office:value="9.29180327868852" calcext:value-type="percentage">
            <text:p>929.18%</text:p>
          </table:table-cell>
          <table:table-cell table:style-name="ce5" table:formula="of:=([.M15]-[.C15])/[.C15]" office:value-type="percentage" office:value="0.0729508196721311" calcext:value-type="percentage">
            <text:p>7.30%</text:p>
          </table:table-cell>
          <table:table-cell table:style-name="ce5" table:formula="of:=([.$M15]-[.$K15])/[.$I15]" office:value-type="percentage" office:value="-0.017156862745098" calcext:value-type="percentage">
            <text:p>-1.72%</text:p>
          </table:table-cell>
          <table:table-cell table:number-columns-repeated="993"/>
        </table:table-row>
        <table:table-row table:style-name="ro1">
          <table:table-cell table:style-name="ce1" table:formula="of:=IFERROR(__xludf.dummyfunction(&quot;&quot;&quot;COMPUTED_VALUE&quot;&quot;&quot;);&quot;random-callstack-ubench+small-alloc-0.5&quot;)" office:value-type="string" office:string-value="random-callstack-ubench+small-alloc-0.5" calcext:value-type="string">
            <text:p>random-callstack-ubench+small-alloc-0.5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C$2:C$6,$B$2:$B$6,LAMBDA(value,column,column&amp;&quot;&quot;='&quot;&quot;&amp;value&amp;&quot;&quot;'&quot;&quot;)),LAMBDA(acc,val,acc&amp;&quot;&quot; AND &quot;&quot;&amp;val))&amp;&quot;&quot;)&quot;&quot;)&quot;);17536)" office:value-type="float" office:value="17536" calcext:value-type="float">
            <text:p>17,5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D$2:D$6,$B$2:$B$6,LAMBDA(value,column,column&amp;&quot;&quot;='&quot;&quot;&amp;value&amp;&quot;&quot;'&quot;&quot;)),LAMBDA(acc,val,acc&amp;&quot;&quot; AND &quot;&quot;&amp;val))&amp;&quot;&quot;)&quot;&quot;)&quot;);17536)" office:value-type="float" office:value="17536" calcext:value-type="float">
            <text:p>17,5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E$2:E$6,$B$2:$B$6,LAMBDA(value,column,column&amp;&quot;&quot;='&quot;&quot;&amp;value&amp;&quot;&quot;'&quot;&quot;)),LAMBDA(acc,val,acc&amp;&quot;&quot; AND &quot;&quot;&amp;val))&amp;&quot;&quot;)&quot;&quot;)&quot;);401584)" office:value-type="float" office:value="401584" calcext:value-type="float">
            <text:p>401,5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F$2:F$6,$B$2:$B$6,LAMBDA(value,column,column&amp;&quot;&quot;='&quot;&quot;&amp;value&amp;&quot;&quot;'&quot;&quot;)),LAMBDA(acc,val,acc&amp;&quot;&quot; AND &quot;&quot;&amp;val))&amp;&quot;&quot;)&quot;&quot;)&quot;);401568)" office:value-type="float" office:value="401568" calcext:value-type="float">
            <text:p>401,56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G$2:G$6,$B$2:$B$6,LAMBDA(value,column,column&amp;&quot;&quot;='&quot;&quot;&amp;value&amp;&quot;&quot;'&quot;&quot;)),LAMBDA(acc,val,acc&amp;&quot;&quot; AND &quot;&quot;&amp;val))&amp;&quot;&quot;)&quot;&quot;)&quot;);401584)" office:value-type="float" office:value="401584" calcext:value-type="float">
            <text:p>401,5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H$2:H$6,$B$2:$B$6,LAMBDA(value,column,column&amp;&quot;&quot;='&quot;&quot;&amp;value&amp;&quot;&quot;'&quot;&quot;)),LAMBDA(acc,val,acc&amp;&quot;&quot; AND &quot;&quot;&amp;val))&amp;&quot;&quot;)&quot;&quot;)&quot;);401568)" office:value-type="float" office:value="401568" calcext:value-type="float">
            <text:p>401,56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I$2:I$6,$B$2:$B$6,LAMBDA(value,column,column&amp;&quot;&quot;='&quot;&quot;&amp;value&amp;&quot;&quot;'&quot;&quot;)),LAMBDA(acc,val,acc&amp;&quot;&quot; AND &quot;&quot;&amp;val))&amp;&quot;&quot;)&quot;&quot;)&quot;);17600)" office:value-type="float" office:value="17600" calcext:value-type="float">
            <text:p>17,60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J$2:J$6,$B$2:$B$6,LAMBDA(value,column,column&amp;&quot;&quot;='&quot;&quot;&amp;value&amp;&quot;&quot;'&quot;&quot;)),LAMBDA(acc,val,acc&amp;&quot;&quot; AND &quot;&quot;&amp;val))&amp;&quot;&quot;)&quot;&quot;)&quot;);21024)" office:value-type="float" office:value="21024" calcext:value-type="float">
            <text:p>21,02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K$2:K$6,$B$2:$B$6,LAMBDA(value,column,column&amp;&quot;&quot;='&quot;&quot;&amp;value&amp;&quot;&quot;'&quot;&quot;)),LAMBDA(acc,val,acc&amp;&quot;&quot; AND &quot;&quot;&amp;val))&amp;&quot;&quot;)&quot;&quot;)&quot;);21024)" office:value-type="float" office:value="21024" calcext:value-type="float">
            <text:p>21,02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L$2:L$6,$B$2:$B$6,LAMBDA(value,column,column&amp;&quot;&quot;='&quot;&quot;&amp;value&amp;&quot;&quot;'&quot;&quot;)),LAMBDA(acc,val,acc&amp;&quot;&quot; AND &quot;&quot;&amp;val))&amp;&quot;&quot;)&quot;&quot;)&quot;);20304)" office:value-type="float" office:value="20304" calcext:value-type="float">
            <text:p>20,3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M$2:M$6,$B$2:$B$6,LAMBDA(value,column,column&amp;&quot;&quot;='&quot;&quot;&amp;value&amp;&quot;&quot;'&quot;&quot;)),LAMBDA(acc,val,acc&amp;&quot;&quot; AND &quot;&quot;&amp;val))&amp;&quot;&quot;)&quot;&quot;)&quot;);20304)" office:value-type="float" office:value="20304" calcext:value-type="float">
            <text:p>20,3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N$2:N$6,$B$2:$B$6,LAMBDA(value,column,column&amp;&quot;&quot;='&quot;&quot;&amp;value&amp;&quot;&quot;'&quot;&quot;)),LAMBDA(acc,val,acc&amp;&quot;&quot; AND &quot;&quot;&amp;val))&amp;&quot;&quot;)&quot;&quot;)&quot;);28976)" office:value-type="float" office:value="28976" calcext:value-type="float">
            <text:p>28,976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6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office:value-type="float" office:value="1.17564865676635" calcext:value-type="float">
            <text:p>1.1756</text:p>
          </table:table-cell>
          <table:table-cell table:style-name="ce5" table:formula="of:=([.D16]-[.C16])/[.C16]" office:value-type="percentage" office:value="0" calcext:value-type="percentage">
            <text:p>0.00%</text:p>
          </table:table-cell>
          <table:table-cell table:style-name="ce29" table:formula="of:=([.E16]-[.D16])/[.D16]" office:value-type="percentage" office:value="21.9005474452555" calcext:value-type="percentage">
            <text:p>2190.05%</text:p>
          </table:table-cell>
          <table:table-cell table:style-name="ce34" table:formula="of:=([.F16]-[.E16])/[.E16]" office:value-type="percentage" office:value="-0.0000398422247898323" calcext:value-type="percentage">
            <text:p>0.00%</text:p>
          </table:table-cell>
          <table:table-cell table:style-name="ce5" table:formula="of:=([.G16]-[.D16])/[.D16]" office:value-type="percentage" office:value="21.9005474452555" calcext:value-type="percentage">
            <text:p>2190.05%</text:p>
          </table:table-cell>
          <table:table-cell table:style-name="ce5" table:formula="of:=([.H16]-[.G16])/[.G16]" office:value-type="percentage" office:value="-0.0000398422247898323" calcext:value-type="percentage">
            <text:p>0.00%</text:p>
          </table:table-cell>
          <table:table-cell table:style-name="ce29" table:formula="of:=([.I16]-[.D16])/[.D16]" office:value-type="percentage" office:value="0.00364963503649635" calcext:value-type="percentage">
            <text:p>0.36%</text:p>
          </table:table-cell>
          <table:table-cell table:style-name="ce40" table:formula="of:=([.J16]-[.I16])/[.I16]" office:value-type="percentage" office:value="0.194545454545455" calcext:value-type="percentage">
            <text:p>19.45%</text:p>
          </table:table-cell>
          <table:table-cell table:style-name="ce34" table:formula="of:=([.K16]-[.J16])/[.J16]" office:value-type="percentage" office:value="0" calcext:value-type="percentage">
            <text:p>0.00%</text:p>
          </table:table-cell>
          <table:table-cell table:style-name="ce5" table:formula="of:=([.L16]-[.I16])/[.I16]" office:value-type="percentage" office:value="0.153636363636364" calcext:value-type="percentage">
            <text:p>15.36%</text:p>
          </table:table-cell>
          <table:table-cell table:style-name="ce5" table:formula="of:=([.M16]-[.I16])/[.I16]" office:value-type="percentage" office:value="0.153636363636364" calcext:value-type="percentage">
            <text:p>15.36%</text:p>
          </table:table-cell>
          <table:table-cell table:style-name="ce45" table:formula="of:=([.N16]-[.M16])/[.M16]" office:value-type="percentage" office:value="0.427107959022853" calcext:value-type="percentage">
            <text:p>42.71%</text:p>
          </table:table-cell>
          <table:table-cell/>
          <table:table-cell table:style-name="ce5" table:formula="of:=([.H16]-[.C16])/[.C16]" office:value-type="percentage" office:value="21.8996350364963" calcext:value-type="percentage">
            <text:p>2189.96%</text:p>
          </table:table-cell>
          <table:table-cell table:style-name="ce5" table:formula="of:=([.M16]-[.C16])/[.C16]" office:value-type="percentage" office:value="0.157846715328467" calcext:value-type="percentage">
            <text:p>15.78%</text:p>
          </table:table-cell>
          <table:table-cell table:style-name="ce5" table:formula="of:=([.$M16]-[.$K16])/[.$I16]" office:value-type="percentage" office:value="-0.0409090909090909" calcext:value-type="percentage">
            <text:p>-4.09%</text:p>
          </table:table-cell>
          <table:table-cell table:number-columns-repeated="993"/>
        </table:table-row>
        <table:table-row table:style-name="ro1">
          <table:table-cell table:style-name="ce1"/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C$2:C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D$2:D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E$2:E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F$2:F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G$2:G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H$2:H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I$2:I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J$2:J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K$2:K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L$2:L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M$2:M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N$2:N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7&amp;&quot;&quot;'&quot;&quot;,MAP(O$2:O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4"/>
          <table:table-cell table:style-name="ce5" table:formula="of:=([.D17]-[.C17])/[.C17]" office:value-type="string" office:string-value="" calcext:value-type="error">
            <text:p>#VALUE!</text:p>
          </table:table-cell>
          <table:table-cell table:style-name="ce29" table:formula="of:=([.E17]-[.D17])/[.D17]" office:value-type="string" office:string-value="" calcext:value-type="error">
            <text:p>#VALUE!</text:p>
          </table:table-cell>
          <table:table-cell table:style-name="ce34" table:formula="of:=([.F17]-[.E17])/[.E17]" office:value-type="string" office:string-value="" calcext:value-type="error">
            <text:p>#VALUE!</text:p>
          </table:table-cell>
          <table:table-cell table:style-name="ce5" table:formula="of:=([.G17]-[.D17])/[.D17]" office:value-type="string" office:string-value="" calcext:value-type="error">
            <text:p>#VALUE!</text:p>
          </table:table-cell>
          <table:table-cell table:style-name="ce5" table:formula="of:=([.H17]-[.G17])/[.G17]" office:value-type="string" office:string-value="" calcext:value-type="error">
            <text:p>#VALUE!</text:p>
          </table:table-cell>
          <table:table-cell table:style-name="ce29" table:formula="of:=([.I17]-[.D17])/[.D17]" office:value-type="string" office:string-value="" calcext:value-type="error">
            <text:p>#VALUE!</text:p>
          </table:table-cell>
          <table:table-cell table:style-name="ce40" table:formula="of:=([.J17]-[.I17])/[.I17]" office:value-type="string" office:string-value="" calcext:value-type="error">
            <text:p>#VALUE!</text:p>
          </table:table-cell>
          <table:table-cell table:style-name="ce34" table:formula="of:=([.K17]-[.J17])/[.J17]" office:value-type="string" office:string-value="" calcext:value-type="error">
            <text:p>#VALUE!</text:p>
          </table:table-cell>
          <table:table-cell table:style-name="ce5" table:formula="of:=([.L17]-[.I17])/[.I17]" office:value-type="string" office:string-value="" calcext:value-type="error">
            <text:p>#VALUE!</text:p>
          </table:table-cell>
          <table:table-cell table:style-name="ce5" table:formula="of:=([.M17]-[.I17])/[.I17]" office:value-type="string" office:string-value="" calcext:value-type="error">
            <text:p>#VALUE!</text:p>
          </table:table-cell>
          <table:table-cell table:style-name="ce45" table:formula="of:=([.N17]-[.M17])/[.M17]" office:value-type="string" office:string-value="" calcext:value-type="error">
            <text:p>#VALUE!</text:p>
          </table:table-cell>
          <table:table-cell/>
          <table:table-cell table:style-name="ce5" table:formula="of:=([.H17]-[.C17])/[.C17]" office:value-type="string" office:string-value="" calcext:value-type="error">
            <text:p>#VALUE!</text:p>
          </table:table-cell>
          <table:table-cell table:style-name="ce5" table:formula="of:=([.M17]-[.C17])/[.C17]" office:value-type="string" office:string-value="" calcext:value-type="error">
            <text:p>#VALUE!</text:p>
          </table:table-cell>
          <table:table-cell table:style-name="ce5" table:formula="of:=([.$M17]-[.$K17])/[.$I17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1"/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C$2:C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D$2:D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E$2:E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F$2:F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G$2:G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H$2:H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I$2:I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J$2:J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K$2:K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L$2:L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M$2:M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N$2:N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8&amp;&quot;&quot;'&quot;&quot;,MAP(O$2:O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4"/>
          <table:table-cell table:style-name="ce5" table:formula="of:=([.D18]-[.C18])/[.C18]" office:value-type="string" office:string-value="" calcext:value-type="error">
            <text:p>#VALUE!</text:p>
          </table:table-cell>
          <table:table-cell table:style-name="ce29" table:formula="of:=([.E18]-[.D18])/[.D18]" office:value-type="string" office:string-value="" calcext:value-type="error">
            <text:p>#VALUE!</text:p>
          </table:table-cell>
          <table:table-cell table:style-name="ce34" table:formula="of:=([.F18]-[.E18])/[.E18]" office:value-type="string" office:string-value="" calcext:value-type="error">
            <text:p>#VALUE!</text:p>
          </table:table-cell>
          <table:table-cell table:style-name="ce5" table:formula="of:=([.G18]-[.D18])/[.D18]" office:value-type="string" office:string-value="" calcext:value-type="error">
            <text:p>#VALUE!</text:p>
          </table:table-cell>
          <table:table-cell table:style-name="ce5" table:formula="of:=([.H18]-[.G18])/[.G18]" office:value-type="string" office:string-value="" calcext:value-type="error">
            <text:p>#VALUE!</text:p>
          </table:table-cell>
          <table:table-cell table:style-name="ce29" table:formula="of:=([.I18]-[.D18])/[.D18]" office:value-type="string" office:string-value="" calcext:value-type="error">
            <text:p>#VALUE!</text:p>
          </table:table-cell>
          <table:table-cell table:style-name="ce40" table:formula="of:=([.J18]-[.I18])/[.I18]" office:value-type="string" office:string-value="" calcext:value-type="error">
            <text:p>#VALUE!</text:p>
          </table:table-cell>
          <table:table-cell table:style-name="ce34" table:formula="of:=([.K18]-[.J18])/[.J18]" office:value-type="string" office:string-value="" calcext:value-type="error">
            <text:p>#VALUE!</text:p>
          </table:table-cell>
          <table:table-cell table:style-name="ce5" table:formula="of:=([.L18]-[.I18])/[.I18]" office:value-type="string" office:string-value="" calcext:value-type="error">
            <text:p>#VALUE!</text:p>
          </table:table-cell>
          <table:table-cell table:style-name="ce5" table:formula="of:=([.M18]-[.I18])/[.I18]" office:value-type="string" office:string-value="" calcext:value-type="error">
            <text:p>#VALUE!</text:p>
          </table:table-cell>
          <table:table-cell table:style-name="ce45" table:formula="of:=([.N18]-[.M18])/[.M18]" office:value-type="string" office:string-value="" calcext:value-type="error">
            <text:p>#VALUE!</text:p>
          </table:table-cell>
          <table:table-cell/>
          <table:table-cell table:style-name="ce5" table:formula="of:=([.H18]-[.C18])/[.C18]" office:value-type="string" office:string-value="" calcext:value-type="error">
            <text:p>#VALUE!</text:p>
          </table:table-cell>
          <table:table-cell table:style-name="ce5" table:formula="of:=([.M18]-[.C18])/[.C18]" office:value-type="string" office:string-value="" calcext:value-type="error">
            <text:p>#VALUE!</text:p>
          </table:table-cell>
          <table:table-cell table:style-name="ce5" table:formula="of:=([.$M18]-[.$K18])/[.$I18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/>
          <table:table-cell table:style-name="ce8" table:number-columns-repeated="14"/>
          <table:table-cell table:style-name="ce2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Config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Data range</text:p>
          </table:table-cell>
          <table:table-cell table:style-name="ce17" office:value-type="string" calcext:value-type="string">
            <text:p>Data!A2:O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14" office:value-type="string" calcext:value-type="string">
            <text:p>Benchmarks column</text:p>
          </table:table-cell>
          <table:table-cell table:style-name="ce18" office:value-type="string" calcext:value-type="string">
            <text:p>Data!D2:D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Data column</text:p>
          </table:table-cell>
          <table:table-cell table:style-name="ce19"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ck Allocation" table:style-name="ta8">
        <table:table-column table:style-name="co19" table:default-cell-style-name="Default"/>
        <table:table-column table:style-name="co20" table:default-cell-style-name="Default"/>
        <table:table-column table:style-name="co22" table:number-columns-repeated="13" table:default-cell-style-name="Default"/>
        <table:table-column table:style-name="co23" table:default-cell-style-name="Default"/>
        <table:table-column table:style-name="co27" table:number-columns-repeated="5" table:default-cell-style-name="Default"/>
        <table:table-column table:style-name="co28" table:number-columns-repeated="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5" table:number-columns-repeated="995" table:default-cell-style-name="Default"/>
        <table:table-row table:style-name="ro1">
          <table:table-cell/>
          <table:table-cell table:style-name="ce8" table:number-columns-repeated="14"/>
          <table:table-cell/>
          <table:table-cell table:style-name="ce26" office:value-type="string" calcext:value-type="string" table:number-columns-spanned="11" table:number-rows-spanned="1">
            <text:p>Overheads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Stack Revocatio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one</text:p>
          </table:table-cell>
          <table:table-cell table:number-columns-repeated="11" table:style-name="ce9" office:value-type="string" calcext:value-type="string">
            <text:p>uninit</text:p>
          </table:table-cell>
          <table:table-cell table:style-name="ce8" office:value-type="string" calcext:value-type="string">
            <text:p>uninit</text:p>
          </table:table-cell>
          <table:table-cell table:style-name="ce23" office:value-type="string" calcext:value-type="string" table:number-columns-spanned="1" table:number-rows-spanned="6">
            <text:p>Secure calls per 1000 insts</text:p>
          </table:table-cell>
          <table:table-cell table:style-name="ce26" office:value-type="string" calcext:value-type="string" table:number-columns-spanned="11" table:number-rows-spanned="1">
            <text:p>Uninit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Reserve stack</text:p>
          </table:table-cell>
          <table:table-cell table:style-name="ce9" office:value-type="string" calcext:value-type="string">
            <text:p>N</text:p>
          </table:table-cell>
          <table:table-cell table:number-columns-repeated="6" table:style-name="ce9" office:value-type="string" calcext:value-type="string">
            <text:p>none</text:p>
          </table:table-cell>
          <table:table-cell table:number-columns-repeated="6" table:style-name="ce9" office:value-type="string" calcext:value-type="string">
            <text:p>reserve</text:p>
          </table:table-cell>
          <table:table-cell table:style-name="ce8" office:value-type="string" calcext:value-type="string">
            <text:p>reserve</text:p>
          </table:table-cell>
          <table:covered-table-cell/>
          <table:table-cell table:style-name="ce8"/>
          <table:table-cell table:style-name="ce27"/>
          <table:table-cell table:style-name="ce8" table:number-columns-repeated="3"/>
          <table:table-cell table:style-name="ce36" office:value-type="string" calcext:value-type="string" table:number-columns-spanned="6" table:number-rows-spanned="1">
            <text:p>Reserve</text:p>
          </table:table-cell>
          <table:covered-table-cell table:number-columns-repeated="4"/>
          <table:covered-table-cell table:style-name="ce42"/>
          <table:table-cell table:number-columns-repeated="997"/>
        </table:table-row>
        <table:table-row table:style-name="ro1">
          <table:table-cell table:style-name="ce2" office:value-type="string" calcext:value-type="string">
            <text:p>Return Encapsulation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9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trampoline</text:p>
          </table:table-cell>
          <table:table-cell table:number-columns-repeated="2" table:style-name="ce9" office:value-type="string" calcext:value-type="string">
            <text:p>isentry</text:p>
          </table:table-cell>
          <table:table-cell table:style-name="ce9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trampoline</text:p>
          </table:table-cell>
          <table:table-cell table:number-columns-repeated="3" table:style-name="ce9" office:value-type="string" calcext:value-type="string">
            <text:p>isentry</text:p>
          </table:table-cell>
          <table:table-cell table:style-name="ce8" office:value-type="string" calcext:value-type="string">
            <text:p>isentry</text:p>
          </table:table-cell>
          <table:covered-table-cell/>
          <table:table-cell table:style-name="ce8"/>
          <table:table-cell table:style-name="ce30" office:value-type="string" calcext:value-type="string" table:number-columns-spanned="2" table:number-rows-spanned="1">
            <text:p>Trampoline</text:p>
          </table:table-cell>
          <table:covered-table-cell table:style-name="ce31"/>
          <table:table-cell table:style-name="ce35" office:value-type="string" calcext:value-type="string" table:number-columns-spanned="2" table:number-rows-spanned="1">
            <text:p>Isentry</text:p>
          </table:table-cell>
          <table:covered-table-cell table:style-name="ce31"/>
          <table:table-cell table:style-name="ce27"/>
          <table:table-cell table:style-name="ce37" office:value-type="string" calcext:value-type="string" table:number-columns-spanned="2" table:number-rows-spanned="1">
            <text:p>Trampoline</text:p>
          </table:table-cell>
          <table:covered-table-cell table:style-name="ce31"/>
          <table:table-cell table:style-name="ce41" office:value-type="string" calcext:value-type="string" table:number-columns-spanned="3" table:number-rows-spanned="1">
            <text:p>Isentry</text:p>
          </table:table-cell>
          <table:covered-table-cell/>
          <table:covered-table-cell table:style-name="ce42"/>
          <table:table-cell table:number-columns-repeated="997"/>
        </table:table-row>
        <table:table-row table:style-name="ro1">
          <table:table-cell table:style-name="ce2" office:value-type="string" calcext:value-type="string">
            <text:p>Clear Registers</text:p>
          </table:table-cell>
          <table:table-cell table:style-name="ce9" office:value-type="string" calcext:value-type="string">
            <text:p>C</text:p>
          </table:table-cell>
          <table:table-cell table:number-columns-repeated="3"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number-columns-repeated="2" table:style-name="ce9" office:value-type="string" calcext:value-type="string">
            <text:p>noclear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noclear</text:p>
          </table:table-cell>
          <table:table-cell table:number-columns-repeated="2" table:style-name="ce9" office:value-type="string" calcext:value-type="string">
            <text:p>clear</text:p>
          </table:table-cell>
          <table:table-cell table:style-name="ce8" office:value-type="string" calcext:value-type="string">
            <text:p>clear</text:p>
          </table:table-cell>
          <table:covered-table-cell/>
          <table:table-cell table:style-name="ce8"/>
          <table:table-cell table:style-name="ce27"/>
          <table:table-cell table:style-name="ce32" office:value-type="string" calcext:value-type="string">
            <text:p>Clear</text:p>
          </table:table-cell>
          <table:table-cell table:style-name="ce8"/>
          <table:table-cell table:style-name="ce8" office:value-type="string" calcext:value-type="string">
            <text:p>Clear</text:p>
          </table:table-cell>
          <table:table-cell table:style-name="ce27"/>
          <table:table-cell table:style-name="ce38"/>
          <table:table-cell table:style-name="ce32" office:value-type="string" calcext:value-type="string">
            <text:p>Clear</text:p>
          </table:table-cell>
          <table:table-cell table:style-name="ce8"/>
          <table:table-cell table:style-name="ce8" office:value-type="string" calcext:value-type="string">
            <text:p>Clear</text:p>
          </table:table-cell>
          <table:table-cell table:style-name="ce43"/>
          <table:table-cell table:number-columns-repeated="997"/>
        </table:table-row>
        <table:table-row table:style-name="ro1">
          <table:table-cell table:style-name="ce2" office:value-type="string" calcext:value-type="string">
            <text:p>Reduce callee-saved registers</text:p>
          </table:table-cell>
          <table:table-cell table:style-name="ce9" office:value-type="string" calcext:value-type="string">
            <text:p>O</text:p>
          </table:table-cell>
          <table:table-cell table:number-columns-repeated="11" table:style-name="ce9" office:value-type="string" calcext:value-type="string">
            <text:p>reduce</text:p>
          </table:table-cell>
          <table:table-cell table:style-name="ce9" office:value-type="string" calcext:value-type="string">
            <text:p>noreduce</text:p>
          </table:table-cell>
          <table:table-cell table:style-name="ce8" office:value-type="string" calcext:value-type="string">
            <text:p>reduce</text:p>
          </table:table-cell>
          <table:covered-table-cell/>
          <table:table-cell table:style-name="ce8"/>
          <table:table-cell table:style-name="ce27"/>
          <table:table-cell table:style-name="ce32"/>
          <table:table-cell table:style-name="ce8" table:number-columns-repeated="2"/>
          <table:table-cell table:style-name="ce27"/>
          <table:table-cell table:style-name="ce38"/>
          <table:table-cell table:style-name="ce32"/>
          <table:table-cell table:style-name="ce8" table:number-columns-repeated="2"/>
          <table:table-cell table:style-name="ce43" office:value-type="string" calcext:value-type="string">
            <text:p>Reduc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8" office:value-type="string" calcext:value-type="string">
            <text:p>D</text:p>
          </table:table-cell>
          <table:table-cell table:number-columns-repeated="11"/>
          <table:table-cell table:style-name="ce1"/>
          <table:table-cell table:style-name="ce1" office:value-type="string" calcext:value-type="string">
            <text:p>Secure calls</text:p>
          </table:table-cell>
          <table:covered-table-cell/>
          <table:table-cell/>
          <table:table-cell table:style-name="ce28"/>
          <table:table-cell table:style-name="ce33"/>
          <table:table-cell table:number-columns-repeated="2"/>
          <table:table-cell table:style-name="ce28"/>
          <table:table-cell table:style-name="ce39"/>
          <table:table-cell table:style-name="ce33"/>
          <table:table-cell table:number-columns-repeated="2"/>
          <table:table-cell table:style-name="ce44"/>
          <table:table-cell table:number-columns-repeated="997"/>
        </table:table-row>
        <table:table-row table:style-name="ro1">
          <table:table-cell table:style-name="ce4" table:formula="of:=IFERROR(__xludf.dummyfunction(&quot;UNIQUE(FILTER(INDIRECT($D$23),INDIRECT($D$23)&lt;&gt;&quot;&quot;&quot;&quot;))&quot;);&quot;coremark&quot;)" office:value-type="string" office:string-value="coremark" calcext:value-type="string">
            <text:p>coremark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C$2:C$6,$B$2:$B$6,LAMBDA(value,column,column&amp;&quot;&quot;='&quot;&quot;&amp;value&amp;&quot;&quot;'&quot;&quot;)),LAMBDA(acc,val,acc&amp;&quot;&quot; AND &quot;&quot;&amp;val))&amp;&quot;&quot;)&quot;&quot;)&quot;);1679504)" office:value-type="float" office:value="1679504" calcext:value-type="float">
            <text:p>1,679,5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D$2:D$6,$B$2:$B$6,LAMBDA(value,column,column&amp;&quot;&quot;='&quot;&quot;&amp;value&amp;&quot;&quot;'&quot;&quot;)),LAMBDA(acc,val,acc&amp;&quot;&quot; AND &quot;&quot;&amp;val))&amp;&quot;&quot;)&quot;&quot;)&quot;);1679504)" office:value-type="float" office:value="1679504" calcext:value-type="float">
            <text:p>1,679,5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E$2:E$6,$B$2:$B$6,LAMBDA(value,column,column&amp;&quot;&quot;='&quot;&quot;&amp;value&amp;&quot;&quot;'&quot;&quot;)),LAMBDA(acc,val,acc&amp;&quot;&quot; AND &quot;&quot;&amp;val))&amp;&quot;&quot;)&quot;&quot;)&quot;);8767568)" office:value-type="float" office:value="8767568" calcext:value-type="float">
            <text:p>8,767,56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F$2:F$6,$B$2:$B$6,LAMBDA(value,column,column&amp;&quot;&quot;='&quot;&quot;&amp;value&amp;&quot;&quot;'&quot;&quot;)),LAMBDA(acc,val,acc&amp;&quot;&quot; AND &quot;&quot;&amp;val))&amp;&quot;&quot;)&quot;&quot;)&quot;);8886304)" office:value-type="float" office:value="8886304" calcext:value-type="float">
            <text:p>8,886,3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G$2:G$6,$B$2:$B$6,LAMBDA(value,column,column&amp;&quot;&quot;='&quot;&quot;&amp;value&amp;&quot;&quot;'&quot;&quot;)),LAMBDA(acc,val,acc&amp;&quot;&quot; AND &quot;&quot;&amp;val))&amp;&quot;&quot;)&quot;&quot;)&quot;);8539888)" office:value-type="float" office:value="8539888" calcext:value-type="float">
            <text:p>8,539,88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H$2:H$6,$B$2:$B$6,LAMBDA(value,column,column&amp;&quot;&quot;='&quot;&quot;&amp;value&amp;&quot;&quot;'&quot;&quot;)),LAMBDA(acc,val,acc&amp;&quot;&quot; AND &quot;&quot;&amp;val))&amp;&quot;&quot;)&quot;&quot;)&quot;);8661856)" office:value-type="float" office:value="8661856" calcext:value-type="float">
            <text:p>8,661,85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I$2:I$6,$B$2:$B$6,LAMBDA(value,column,column&amp;&quot;&quot;='&quot;&quot;&amp;value&amp;&quot;&quot;'&quot;&quot;)),LAMBDA(acc,val,acc&amp;&quot;&quot; AND &quot;&quot;&amp;val))&amp;&quot;&quot;)&quot;&quot;)&quot;);1679504)" office:value-type="float" office:value="1679504" calcext:value-type="float">
            <text:p>1,679,5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J$2:J$6,$B$2:$B$6,LAMBDA(value,column,column&amp;&quot;&quot;='&quot;&quot;&amp;value&amp;&quot;&quot;'&quot;&quot;)),LAMBDA(acc,val,acc&amp;&quot;&quot; AND &quot;&quot;&amp;val))&amp;&quot;&quot;)&quot;&quot;)&quot;);2863920)" office:value-type="float" office:value="2863920" calcext:value-type="float">
            <text:p>2,863,9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K$2:K$6,$B$2:$B$6,LAMBDA(value,column,column&amp;&quot;&quot;='&quot;&quot;&amp;value&amp;&quot;&quot;'&quot;&quot;)),LAMBDA(acc,val,acc&amp;&quot;&quot; AND &quot;&quot;&amp;val))&amp;&quot;&quot;)&quot;&quot;)&quot;);2979504)" office:value-type="float" office:value="2979504" calcext:value-type="float">
            <text:p>2,979,5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L$2:L$6,$B$2:$B$6,LAMBDA(value,column,column&amp;&quot;&quot;='&quot;&quot;&amp;value&amp;&quot;&quot;'&quot;&quot;)),LAMBDA(acc,val,acc&amp;&quot;&quot; AND &quot;&quot;&amp;val))&amp;&quot;&quot;)&quot;&quot;)&quot;);2600704)" office:value-type="float" office:value="2600704" calcext:value-type="float">
            <text:p>2,600,7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M$2:M$6,$B$2:$B$6,LAMBDA(value,column,column&amp;&quot;&quot;='&quot;&quot;&amp;value&amp;&quot;&quot;'&quot;&quot;)),LAMBDA(acc,val,acc&amp;&quot;&quot; AND &quot;&quot;&amp;val))&amp;&quot;&quot;)&quot;&quot;)&quot;);2716272)" office:value-type="float" office:value="2716272" calcext:value-type="float">
            <text:p>2,716,27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8&amp;&quot;&quot;'&quot;&quot;,MAP(N$2:N$6,$B$2:$B$6,LAMBDA(value,column,column&amp;&quot;&quot;='&quot;&quot;&amp;value&amp;&quot;&quot;'&quot;&quot;)),LAMBDA(acc,val,acc&amp;&quot;&quot; AND &quot;&quot;&amp;val))&amp;&quot;&quot;)&quot;&quot;)&quot;);12445440)" office:value-type="float" office:value="12445440" calcext:value-type="float">
            <text:p>12,445,440</text:p>
          </table:table-cell>
          <table:table-cell table:style-name="ce47" table:formula="of:='coremark secure call data'!$c$8" office:value-type="string" office:string-value="" calcext:value-type="error">
            <text:p>#NAME?</text:p>
          </table:table-cell>
          <table:table-cell table:style-name="ce24" table:formula="of:=[.O8]*1000/[.M8]" office:value-type="string" office:string-value="" calcext:value-type="error">
            <text:p>#NAME?</text:p>
          </table:table-cell>
          <table:table-cell table:style-name="ce5" table:formula="of:=([.D8]-[.C8])/[.C8]" office:value-type="percentage" office:value="0" calcext:value-type="percentage">
            <text:p>0.00%</text:p>
          </table:table-cell>
          <table:table-cell table:style-name="ce29" table:formula="of:=([.E8]-[.D8])/[.D8]" office:value-type="percentage" office:value="4.22033171698311" calcext:value-type="percentage">
            <text:p>422.03%</text:p>
          </table:table-cell>
          <table:table-cell table:style-name="ce34" table:formula="of:=([.F8]-[.E8])/[.E8]" office:value-type="percentage" office:value="0.0135426380496849" calcext:value-type="percentage">
            <text:p>1.35%</text:p>
          </table:table-cell>
          <table:table-cell table:style-name="ce5" table:formula="of:=([.G8]-[.D8])/[.D8]" office:value-type="percentage" office:value="4.08476788385142" calcext:value-type="percentage">
            <text:p>408.48%</text:p>
          </table:table-cell>
          <table:table-cell table:style-name="ce5" table:formula="of:=([.H8]-[.G8])/[.G8]" office:value-type="percentage" office:value="0.0142821545200593" calcext:value-type="percentage">
            <text:p>1.43%</text:p>
          </table:table-cell>
          <table:table-cell table:style-name="ce29" table:formula="of:=([.I8]-[.D8])/[.D8]" office:value-type="percentage" office:value="0" calcext:value-type="percentage">
            <text:p>0.00%</text:p>
          </table:table-cell>
          <table:table-cell table:style-name="ce40" table:formula="of:=([.J8]-[.I8])/[.I8]" office:value-type="percentage" office:value="0.705217730949137" calcext:value-type="percentage">
            <text:p>70.52%</text:p>
          </table:table-cell>
          <table:table-cell table:style-name="ce34" table:formula="of:=([.K8]-[.J8])/[.J8]" office:value-type="percentage" office:value="0.0403586692365709" calcext:value-type="percentage">
            <text:p>4.04%</text:p>
          </table:table-cell>
          <table:table-cell table:style-name="ce5" table:formula="of:=([.L8]-[.I8])/[.I8]" office:value-type="percentage" office:value="0.548495270032105" calcext:value-type="percentage">
            <text:p>54.85%</text:p>
          </table:table-cell>
          <table:table-cell table:style-name="ce5" table:formula="of:=([.M8]-[.I8])/[.I8]" office:value-type="percentage" office:value="0.617306061789671" calcext:value-type="percentage">
            <text:p>61.73%</text:p>
          </table:table-cell>
          <table:table-cell table:style-name="ce45" table:formula="of:=([.N8]-[.M8])/[.M8]" office:value-type="percentage" office:value="3.58180918553076" calcext:value-type="percentage">
            <text:p>358.18%</text:p>
          </table:table-cell>
          <table:table-cell table:number-columns-repeated="997"/>
        </table:table-row>
        <table:table-row table:style-name="ro1">
          <table:table-cell table:style-name="ce4" table:formula="of:=IFERROR(__xludf.dummyfunction(&quot;&quot;&quot;COMPUTED_VALUE&quot;&quot;&quot;);&quot;libc-bench_malloc&quot;)" office:value-type="string" office:string-value="libc-bench_malloc" calcext:value-type="string">
            <text:p>libc-bench_malloc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C$2:C$6,$B$2:$B$6,LAMBDA(value,column,column&amp;&quot;&quot;='&quot;&quot;&amp;value&amp;&quot;&quot;'&quot;&quot;)),LAMBDA(acc,val,acc&amp;&quot;&quot; AND &quot;&quot;&amp;val))&amp;&quot;&quot;)&quot;&quot;)&quot;);8926064)" office:value-type="float" office:value="8926064" calcext:value-type="float">
            <text:p>8,926,0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D$2:D$6,$B$2:$B$6,LAMBDA(value,column,column&amp;&quot;&quot;='&quot;&quot;&amp;value&amp;&quot;&quot;'&quot;&quot;)),LAMBDA(acc,val,acc&amp;&quot;&quot; AND &quot;&quot;&amp;val))&amp;&quot;&quot;)&quot;&quot;)&quot;);8926064)" office:value-type="float" office:value="8926064" calcext:value-type="float">
            <text:p>8,926,0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E$2:E$6,$B$2:$B$6,LAMBDA(value,column,column&amp;&quot;&quot;='&quot;&quot;&amp;value&amp;&quot;&quot;'&quot;&quot;)),LAMBDA(acc,val,acc&amp;&quot;&quot; AND &quot;&quot;&amp;val))&amp;&quot;&quot;)&quot;&quot;)&quot;);282783632)" office:value-type="float" office:value="282783632" calcext:value-type="float">
            <text:p>282,783,63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F$2:F$6,$B$2:$B$6,LAMBDA(value,column,column&amp;&quot;&quot;='&quot;&quot;&amp;value&amp;&quot;&quot;'&quot;&quot;)),LAMBDA(acc,val,acc&amp;&quot;&quot; AND &quot;&quot;&amp;val))&amp;&quot;&quot;)&quot;&quot;)&quot;);282207728)" office:value-type="float" office:value="282207728" calcext:value-type="float">
            <text:p>282,207,72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G$2:G$6,$B$2:$B$6,LAMBDA(value,column,column&amp;&quot;&quot;='&quot;&quot;&amp;value&amp;&quot;&quot;'&quot;&quot;)),LAMBDA(acc,val,acc&amp;&quot;&quot; AND &quot;&quot;&amp;val))&amp;&quot;&quot;)&quot;&quot;)&quot;);284607024)" office:value-type="float" office:value="284607024" calcext:value-type="float">
            <text:p>284,607,02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H$2:H$6,$B$2:$B$6,LAMBDA(value,column,column&amp;&quot;&quot;='&quot;&quot;&amp;value&amp;&quot;&quot;'&quot;&quot;)),LAMBDA(acc,val,acc&amp;&quot;&quot; AND &quot;&quot;&amp;val))&amp;&quot;&quot;)&quot;&quot;)&quot;);284031120)" office:value-type="float" office:value="284031120" calcext:value-type="float">
            <text:p>284,031,1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I$2:I$6,$B$2:$B$6,LAMBDA(value,column,column&amp;&quot;&quot;='&quot;&quot;&amp;value&amp;&quot;&quot;'&quot;&quot;)),LAMBDA(acc,val,acc&amp;&quot;&quot; AND &quot;&quot;&amp;val))&amp;&quot;&quot;)&quot;&quot;)&quot;);8926064)" office:value-type="float" office:value="8926064" calcext:value-type="float">
            <text:p>8,926,0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J$2:J$6,$B$2:$B$6,LAMBDA(value,column,column&amp;&quot;&quot;='&quot;&quot;&amp;value&amp;&quot;&quot;'&quot;&quot;)),LAMBDA(acc,val,acc&amp;&quot;&quot; AND &quot;&quot;&amp;val))&amp;&quot;&quot;)&quot;&quot;)&quot;);9855952)" office:value-type="float" office:value="9855952" calcext:value-type="float">
            <text:p>9,855,95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K$2:K$6,$B$2:$B$6,LAMBDA(value,column,column&amp;&quot;&quot;='&quot;&quot;&amp;value&amp;&quot;&quot;'&quot;&quot;)),LAMBDA(acc,val,acc&amp;&quot;&quot; AND &quot;&quot;&amp;val))&amp;&quot;&quot;)&quot;&quot;)&quot;);9568048)" office:value-type="float" office:value="9568048" calcext:value-type="float">
            <text:p>9,568,04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L$2:L$6,$B$2:$B$6,LAMBDA(value,column,column&amp;&quot;&quot;='&quot;&quot;&amp;value&amp;&quot;&quot;'&quot;&quot;)),LAMBDA(acc,val,acc&amp;&quot;&quot; AND &quot;&quot;&amp;val))&amp;&quot;&quot;)&quot;&quot;)&quot;);9855344)" office:value-type="float" office:value="9855344" calcext:value-type="float">
            <text:p>9,855,34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M$2:M$6,$B$2:$B$6,LAMBDA(value,column,column&amp;&quot;&quot;='&quot;&quot;&amp;value&amp;&quot;&quot;'&quot;&quot;)),LAMBDA(acc,val,acc&amp;&quot;&quot; AND &quot;&quot;&amp;val))&amp;&quot;&quot;)&quot;&quot;)&quot;);9567440)" office:value-type="float" office:value="9567440" calcext:value-type="float">
            <text:p>9,567,44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9&amp;&quot;&quot;'&quot;&quot;,MAP(N$2:N$6,$B$2:$B$6,LAMBDA(value,column,column&amp;&quot;&quot;='&quot;&quot;&amp;value&amp;&quot;&quot;'&quot;&quot;)),LAMBDA(acc,val,acc&amp;&quot;&quot; AND &quot;&quot;&amp;val))&amp;&quot;&quot;)&quot;&quot;)&quot;);9568592)" office:value-type="float" office:value="9568592" calcext:value-type="float">
            <text:p>9,568,592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9&amp;&quot;&quot;'&quot;&quot;,MAP(O$2:O$6,$B$2:$B$6,LAMBDA(value,column,column&amp;&quot;&quot;='&quot;&quot;&amp;value&amp;&quot;&quot;'&quot;&quot;)),LAMBDA(acc,val,acc&amp;&quot;&quot; AND &quot;&quot;&amp;val))&amp;&quot;&quot;)&quot;&quot;)&quot;);18000)" office:value-type="float" office:value="18000" calcext:value-type="float">
            <text:p>18,000</text:p>
          </table:table-cell>
          <table:table-cell table:style-name="ce24" table:formula="of:=[.O9]*1000/[.M9]" office:value-type="float" office:value="1.88138101728362" calcext:value-type="float">
            <text:p>1.8814</text:p>
          </table:table-cell>
          <table:table-cell table:style-name="ce5" table:formula="of:=([.D9]-[.C9])/[.C9]" office:value-type="percentage" office:value="0" calcext:value-type="percentage">
            <text:p>0.00%</text:p>
          </table:table-cell>
          <table:table-cell table:style-name="ce29" table:formula="of:=([.E9]-[.D9])/[.D9]" office:value-type="percentage" office:value="30.6806637281561" calcext:value-type="percentage">
            <text:p>3068.07%</text:p>
          </table:table-cell>
          <table:table-cell table:style-name="ce34" table:formula="of:=([.F9]-[.E9])/[.E9]" office:value-type="percentage" office:value="-0.00203655351594041" calcext:value-type="percentage">
            <text:p>-0.20%</text:p>
          </table:table-cell>
          <table:table-cell table:style-name="ce5" table:formula="of:=([.G9]-[.D9])/[.D9]" office:value-type="percentage" office:value="30.8849409997508" calcext:value-type="percentage">
            <text:p>3088.49%</text:p>
          </table:table-cell>
          <table:table-cell table:style-name="ce5" table:formula="of:=([.H9]-[.G9])/[.G9]" office:value-type="percentage" office:value="-0.00202350592724655" calcext:value-type="percentage">
            <text:p>-0.20%</text:p>
          </table:table-cell>
          <table:table-cell table:style-name="ce29" table:formula="of:=([.I9]-[.D9])/[.D9]" office:value-type="percentage" office:value="0" calcext:value-type="percentage">
            <text:p>0.00%</text:p>
          </table:table-cell>
          <table:table-cell table:style-name="ce40" table:formula="of:=([.J9]-[.I9])/[.I9]" office:value-type="percentage" office:value="0.104176712154428" calcext:value-type="percentage">
            <text:p>10.42%</text:p>
          </table:table-cell>
          <table:table-cell table:style-name="ce34" table:formula="of:=([.K9]-[.J9])/[.J9]" office:value-type="percentage" office:value="-0.0292111812232852" calcext:value-type="percentage">
            <text:p>-2.92%</text:p>
          </table:table-cell>
          <table:table-cell table:style-name="ce5" table:formula="of:=([.L9]-[.I9])/[.I9]" office:value-type="percentage" office:value="0.10410859702552" calcext:value-type="percentage">
            <text:p>10.41%</text:p>
          </table:table-cell>
          <table:table-cell table:style-name="ce5" table:formula="of:=([.M9]-[.I9])/[.I9]" office:value-type="percentage" office:value="0.0718542909842457" calcext:value-type="percentage">
            <text:p>7.19%</text:p>
          </table:table-cell>
          <table:table-cell table:style-name="ce45" table:formula="of:=([.N9]-[.M9])/[.M9]" office:value-type="percentage" office:value="0.000120408385106152" calcext:value-type="percentage">
            <text:p>0.01%</text:p>
          </table:table-cell>
          <table:table-cell table:number-columns-repeated="997"/>
        </table:table-row>
        <table:table-row table:style-name="ro1">
          <table:table-cell table:style-name="ce4" table:formula="of:=IFERROR(__xludf.dummyfunction(&quot;&quot;&quot;COMPUTED_VALUE&quot;&quot;&quot;);&quot;libc-bench_string&quot;)" office:value-type="string" office:string-value="libc-bench_string" calcext:value-type="string">
            <text:p>libc-bench_string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C$2:C$6,$B$2:$B$6,LAMBDA(value,column,column&amp;&quot;&quot;='&quot;&quot;&amp;value&amp;&quot;&quot;'&quot;&quot;)),LAMBDA(acc,val,acc&amp;&quot;&quot; AND &quot;&quot;&amp;val))&amp;&quot;&quot;)&quot;&quot;)&quot;);4945280)" office:value-type="float" office:value="4945280" calcext:value-type="float">
            <text:p>4,945,2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D$2:D$6,$B$2:$B$6,LAMBDA(value,column,column&amp;&quot;&quot;='&quot;&quot;&amp;value&amp;&quot;&quot;'&quot;&quot;)),LAMBDA(acc,val,acc&amp;&quot;&quot; AND &quot;&quot;&amp;val))&amp;&quot;&quot;)&quot;&quot;)&quot;);4945280)" office:value-type="float" office:value="4945280" calcext:value-type="float">
            <text:p>4,945,2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E$2:E$6,$B$2:$B$6,LAMBDA(value,column,column&amp;&quot;&quot;='&quot;&quot;&amp;value&amp;&quot;&quot;'&quot;&quot;)),LAMBDA(acc,val,acc&amp;&quot;&quot; AND &quot;&quot;&amp;val))&amp;&quot;&quot;)&quot;&quot;)&quot;);18635904)" office:value-type="float" office:value="18635904" calcext:value-type="float">
            <text:p>18,635,9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F$2:F$6,$B$2:$B$6,LAMBDA(value,column,column&amp;&quot;&quot;='&quot;&quot;&amp;value&amp;&quot;&quot;'&quot;&quot;)),LAMBDA(acc,val,acc&amp;&quot;&quot; AND &quot;&quot;&amp;val))&amp;&quot;&quot;)&quot;&quot;)&quot;);18607296)" office:value-type="float" office:value="18607296" calcext:value-type="float">
            <text:p>18,607,2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G$2:G$6,$B$2:$B$6,LAMBDA(value,column,column&amp;&quot;&quot;='&quot;&quot;&amp;value&amp;&quot;&quot;'&quot;&quot;)),LAMBDA(acc,val,acc&amp;&quot;&quot; AND &quot;&quot;&amp;val))&amp;&quot;&quot;)&quot;&quot;)&quot;);18779072)" office:value-type="float" office:value="18779072" calcext:value-type="float">
            <text:p>18,779,07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H$2:H$6,$B$2:$B$6,LAMBDA(value,column,column&amp;&quot;&quot;='&quot;&quot;&amp;value&amp;&quot;&quot;'&quot;&quot;)),LAMBDA(acc,val,acc&amp;&quot;&quot; AND &quot;&quot;&amp;val))&amp;&quot;&quot;)&quot;&quot;)&quot;);18750464)" office:value-type="float" office:value="18750464" calcext:value-type="float">
            <text:p>18,750,4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I$2:I$6,$B$2:$B$6,LAMBDA(value,column,column&amp;&quot;&quot;='&quot;&quot;&amp;value&amp;&quot;&quot;'&quot;&quot;)),LAMBDA(acc,val,acc&amp;&quot;&quot; AND &quot;&quot;&amp;val))&amp;&quot;&quot;)&quot;&quot;)&quot;);4945280)" office:value-type="float" office:value="4945280" calcext:value-type="float">
            <text:p>4,945,2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J$2:J$6,$B$2:$B$6,LAMBDA(value,column,column&amp;&quot;&quot;='&quot;&quot;&amp;value&amp;&quot;&quot;'&quot;&quot;)),LAMBDA(acc,val,acc&amp;&quot;&quot; AND &quot;&quot;&amp;val))&amp;&quot;&quot;)&quot;&quot;)&quot;);5010496)" office:value-type="float" office:value="5010496" calcext:value-type="float">
            <text:p>5,010,4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K$2:K$6,$B$2:$B$6,LAMBDA(value,column,column&amp;&quot;&quot;='&quot;&quot;&amp;value&amp;&quot;&quot;'&quot;&quot;)),LAMBDA(acc,val,acc&amp;&quot;&quot; AND &quot;&quot;&amp;val))&amp;&quot;&quot;)&quot;&quot;)&quot;);4996256)" office:value-type="float" office:value="4996256" calcext:value-type="float">
            <text:p>4,996,25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L$2:L$6,$B$2:$B$6,LAMBDA(value,column,column&amp;&quot;&quot;='&quot;&quot;&amp;value&amp;&quot;&quot;'&quot;&quot;)),LAMBDA(acc,val,acc&amp;&quot;&quot; AND &quot;&quot;&amp;val))&amp;&quot;&quot;)&quot;&quot;)&quot;);5009072)" office:value-type="float" office:value="5009072" calcext:value-type="float">
            <text:p>5,009,07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M$2:M$6,$B$2:$B$6,LAMBDA(value,column,column&amp;&quot;&quot;='&quot;&quot;&amp;value&amp;&quot;&quot;'&quot;&quot;)),LAMBDA(acc,val,acc&amp;&quot;&quot; AND &quot;&quot;&amp;val))&amp;&quot;&quot;)&quot;&quot;)&quot;);4994832)" office:value-type="float" office:value="4994832" calcext:value-type="float">
            <text:p>4,994,83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0&amp;&quot;&quot;'&quot;&quot;,MAP(N$2:N$6,$B$2:$B$6,LAMBDA(value,column,column&amp;&quot;&quot;='&quot;&quot;&amp;value&amp;&quot;&quot;'&quot;&quot;)),LAMBDA(acc,val,acc&amp;&quot;&quot; AND &quot;&quot;&amp;val))&amp;&quot;&quot;)&quot;&quot;)&quot;);4996368)" office:value-type="float" office:value="4996368" calcext:value-type="float">
            <text:p>4,996,368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0&amp;&quot;&quot;'&quot;&quot;,MAP(O$2:O$6,$B$2:$B$6,LAMBDA(value,column,column&amp;&quot;&quot;='&quot;&quot;&amp;value&amp;&quot;&quot;'&quot;&quot;)),LAMBDA(acc,val,acc&amp;&quot;&quot; AND &quot;&quot;&amp;val))&amp;&quot;&quot;)&quot;&quot;)&quot;);898)" office:value-type="float" office:value="898" calcext:value-type="float">
            <text:p>898</text:p>
          </table:table-cell>
          <table:table-cell table:style-name="ce24" table:formula="of:=[.O10]*1000/[.M10]" office:value-type="float" office:value="0.179785826630405" calcext:value-type="float">
            <text:p>0.1798</text:p>
          </table:table-cell>
          <table:table-cell table:style-name="ce5" table:formula="of:=([.D10]-[.C10])/[.C10]" office:value-type="percentage" office:value="0" calcext:value-type="percentage">
            <text:p>0.00%</text:p>
          </table:table-cell>
          <table:table-cell table:style-name="ce29" table:formula="of:=([.E10]-[.D10])/[.D10]" office:value-type="percentage" office:value="2.76842241490876" calcext:value-type="percentage">
            <text:p>276.84%</text:p>
          </table:table-cell>
          <table:table-cell table:style-name="ce34" table:formula="of:=([.F10]-[.E10])/[.E10]" office:value-type="percentage" office:value="-0.00153510127547341" calcext:value-type="percentage">
            <text:p>-0.15%</text:p>
          </table:table-cell>
          <table:table-cell table:style-name="ce5" table:formula="of:=([.G10]-[.D10])/[.D10]" office:value-type="percentage" office:value="2.79737284845347" calcext:value-type="percentage">
            <text:p>279.74%</text:p>
          </table:table-cell>
          <table:table-cell table:style-name="ce5" table:formula="of:=([.H10]-[.G10])/[.G10]" office:value-type="percentage" office:value="-0.00152339796130501" calcext:value-type="percentage">
            <text:p>-0.15%</text:p>
          </table:table-cell>
          <table:table-cell table:style-name="ce29" table:formula="of:=([.I10]-[.D10])/[.D10]" office:value-type="percentage" office:value="0" calcext:value-type="percentage">
            <text:p>0.00%</text:p>
          </table:table-cell>
          <table:table-cell table:style-name="ce40" table:formula="of:=([.J10]-[.I10])/[.I10]" office:value-type="percentage" office:value="0.0131875242655623" calcext:value-type="percentage">
            <text:p>1.32%</text:p>
          </table:table-cell>
          <table:table-cell table:style-name="ce34" table:formula="of:=([.K10]-[.J10])/[.J10]" office:value-type="percentage" office:value="-0.00284203400222253" calcext:value-type="percentage">
            <text:p>-0.28%</text:p>
          </table:table-cell>
          <table:table-cell table:style-name="ce5" table:formula="of:=([.L10]-[.I10])/[.I10]" office:value-type="percentage" office:value="0.0128995729261033" calcext:value-type="percentage">
            <text:p>1.29%</text:p>
          </table:table-cell>
          <table:table-cell table:style-name="ce5" table:formula="of:=([.M10]-[.I10])/[.I10]" office:value-type="percentage" office:value="0.0100200595315129" calcext:value-type="percentage">
            <text:p>1.00%</text:p>
          </table:table-cell>
          <table:table-cell table:style-name="ce45" table:formula="of:=([.N10]-[.M10])/[.M10]" office:value-type="percentage" office:value="0.000307517850450225" calcext:value-type="percentage">
            <text:p>0.03%</text:p>
          </table:table-cell>
          <table:table-cell table:number-columns-repeated="997"/>
        </table:table-row>
        <table:table-row table:style-name="ro1">
          <table:table-cell table:style-name="ce4" table:formula="of:=IFERROR(__xludf.dummyfunction(&quot;&quot;&quot;COMPUTED_VALUE&quot;&quot;&quot;);&quot;libc-bench_regex&quot;)" office:value-type="string" office:string-value="libc-bench_regex" calcext:value-type="string">
            <text:p>libc-bench_regex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C$2:C$6,$B$2:$B$6,LAMBDA(value,column,column&amp;&quot;&quot;='&quot;&quot;&amp;value&amp;&quot;&quot;'&quot;&quot;)),LAMBDA(acc,val,acc&amp;&quot;&quot; AND &quot;&quot;&amp;val))&amp;&quot;&quot;)&quot;&quot;)&quot;);512096)" office:value-type="float" office:value="512096" calcext:value-type="float">
            <text:p>512,0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D$2:D$6,$B$2:$B$6,LAMBDA(value,column,column&amp;&quot;&quot;='&quot;&quot;&amp;value&amp;&quot;&quot;'&quot;&quot;)),LAMBDA(acc,val,acc&amp;&quot;&quot; AND &quot;&quot;&amp;val))&amp;&quot;&quot;)&quot;&quot;)&quot;);512096)" office:value-type="float" office:value="512096" calcext:value-type="float">
            <text:p>512,0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E$2:E$6,$B$2:$B$6,LAMBDA(value,column,column&amp;&quot;&quot;='&quot;&quot;&amp;value&amp;&quot;&quot;'&quot;&quot;)),LAMBDA(acc,val,acc&amp;&quot;&quot; AND &quot;&quot;&amp;val))&amp;&quot;&quot;)&quot;&quot;)&quot;);1015632)" office:value-type="float" office:value="1015632" calcext:value-type="float">
            <text:p>1,015,63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F$2:F$6,$B$2:$B$6,LAMBDA(value,column,column&amp;&quot;&quot;='&quot;&quot;&amp;value&amp;&quot;&quot;'&quot;&quot;)),LAMBDA(acc,val,acc&amp;&quot;&quot; AND &quot;&quot;&amp;val))&amp;&quot;&quot;)&quot;&quot;)&quot;);1014624)" office:value-type="float" office:value="1014624" calcext:value-type="float">
            <text:p>1,014,62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G$2:G$6,$B$2:$B$6,LAMBDA(value,column,column&amp;&quot;&quot;='&quot;&quot;&amp;value&amp;&quot;&quot;'&quot;&quot;)),LAMBDA(acc,val,acc&amp;&quot;&quot; AND &quot;&quot;&amp;val))&amp;&quot;&quot;)&quot;&quot;)&quot;);1019792)" office:value-type="float" office:value="1019792" calcext:value-type="float">
            <text:p>1,019,7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H$2:H$6,$B$2:$B$6,LAMBDA(value,column,column&amp;&quot;&quot;='&quot;&quot;&amp;value&amp;&quot;&quot;'&quot;&quot;)),LAMBDA(acc,val,acc&amp;&quot;&quot; AND &quot;&quot;&amp;val))&amp;&quot;&quot;)&quot;&quot;)&quot;);1018784)" office:value-type="float" office:value="1018784" calcext:value-type="float">
            <text:p>1,018,7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I$2:I$6,$B$2:$B$6,LAMBDA(value,column,column&amp;&quot;&quot;='&quot;&quot;&amp;value&amp;&quot;&quot;'&quot;&quot;)),LAMBDA(acc,val,acc&amp;&quot;&quot; AND &quot;&quot;&amp;val))&amp;&quot;&quot;)&quot;&quot;)&quot;);512096)" office:value-type="float" office:value="512096" calcext:value-type="float">
            <text:p>512,0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J$2:J$6,$B$2:$B$6,LAMBDA(value,column,column&amp;&quot;&quot;='&quot;&quot;&amp;value&amp;&quot;&quot;'&quot;&quot;)),LAMBDA(acc,val,acc&amp;&quot;&quot; AND &quot;&quot;&amp;val))&amp;&quot;&quot;)&quot;&quot;)&quot;);515760)" office:value-type="float" office:value="515760" calcext:value-type="float">
            <text:p>515,76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K$2:K$6,$B$2:$B$6,LAMBDA(value,column,column&amp;&quot;&quot;='&quot;&quot;&amp;value&amp;&quot;&quot;'&quot;&quot;)),LAMBDA(acc,val,acc&amp;&quot;&quot; AND &quot;&quot;&amp;val))&amp;&quot;&quot;)&quot;&quot;)&quot;);515280)" office:value-type="float" office:value="515280" calcext:value-type="float">
            <text:p>515,2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L$2:L$6,$B$2:$B$6,LAMBDA(value,column,column&amp;&quot;&quot;='&quot;&quot;&amp;value&amp;&quot;&quot;'&quot;&quot;)),LAMBDA(acc,val,acc&amp;&quot;&quot; AND &quot;&quot;&amp;val))&amp;&quot;&quot;)&quot;&quot;)&quot;);515264)" office:value-type="float" office:value="515264" calcext:value-type="float">
            <text:p>515,2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M$2:M$6,$B$2:$B$6,LAMBDA(value,column,column&amp;&quot;&quot;='&quot;&quot;&amp;value&amp;&quot;&quot;'&quot;&quot;)),LAMBDA(acc,val,acc&amp;&quot;&quot; AND &quot;&quot;&amp;val))&amp;&quot;&quot;)&quot;&quot;)&quot;);514784)" office:value-type="float" office:value="514784" calcext:value-type="float">
            <text:p>514,7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1&amp;&quot;&quot;'&quot;&quot;,MAP(N$2:N$6,$B$2:$B$6,LAMBDA(value,column,column&amp;&quot;&quot;='&quot;&quot;&amp;value&amp;&quot;&quot;'&quot;&quot;)),LAMBDA(acc,val,acc&amp;&quot;&quot; AND &quot;&quot;&amp;val))&amp;&quot;&quot;)&quot;&quot;)&quot;);515360)" office:value-type="float" office:value="515360" calcext:value-type="float">
            <text:p>515,360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1&amp;&quot;&quot;'&quot;&quot;,MAP(O$2:O$6,$B$2:$B$6,LAMBDA(value,column,column&amp;&quot;&quot;='&quot;&quot;&amp;value&amp;&quot;&quot;'&quot;&quot;)),LAMBDA(acc,val,acc&amp;&quot;&quot; AND &quot;&quot;&amp;val))&amp;&quot;&quot;)&quot;&quot;)&quot;);33)" office:value-type="float" office:value="33" calcext:value-type="float">
            <text:p>33</text:p>
          </table:table-cell>
          <table:table-cell table:style-name="ce24" table:formula="of:=[.O11]*1000/[.M11]" office:value-type="float" office:value="0.0641045564741717" calcext:value-type="float">
            <text:p>0.0641</text:p>
          </table:table-cell>
          <table:table-cell table:style-name="ce5" table:formula="of:=([.D11]-[.C11])/[.C11]" office:value-type="percentage" office:value="0" calcext:value-type="percentage">
            <text:p>0.00%</text:p>
          </table:table-cell>
          <table:table-cell table:style-name="ce29" table:formula="of:=([.E11]-[.D11])/[.D11]" office:value-type="percentage" office:value="0.983284384177967" calcext:value-type="percentage">
            <text:p>98.33%</text:p>
          </table:table-cell>
          <table:table-cell table:style-name="ce34" table:formula="of:=([.F11]-[.E11])/[.E11]" office:value-type="percentage" office:value="-0.000992485467177088" calcext:value-type="percentage">
            <text:p>-0.10%</text:p>
          </table:table-cell>
          <table:table-cell table:style-name="ce5" table:formula="of:=([.G11]-[.D11])/[.D11]" office:value-type="percentage" office:value="0.991407861026058" calcext:value-type="percentage">
            <text:p>99.14%</text:p>
          </table:table-cell>
          <table:table-cell table:style-name="ce5" table:formula="of:=([.H11]-[.G11])/[.G11]" office:value-type="percentage" office:value="-0.000988436857712161" calcext:value-type="percentage">
            <text:p>-0.10%</text:p>
          </table:table-cell>
          <table:table-cell table:style-name="ce29" table:formula="of:=([.I11]-[.D11])/[.D11]" office:value-type="percentage" office:value="0" calcext:value-type="percentage">
            <text:p>0.00%</text:p>
          </table:table-cell>
          <table:table-cell table:style-name="ce40" table:formula="of:=([.J11]-[.I11])/[.I11]" office:value-type="percentage" office:value="0.00715490845466475" calcext:value-type="percentage">
            <text:p>0.72%</text:p>
          </table:table-cell>
          <table:table-cell table:style-name="ce34" table:formula="of:=([.K11]-[.J11])/[.J11]" office:value-type="percentage" office:value="-0.000930665425779432" calcext:value-type="percentage">
            <text:p>-0.09%</text:p>
          </table:table-cell>
          <table:table-cell table:style-name="ce5" table:formula="of:=([.L11]-[.I11])/[.I11]" office:value-type="percentage" office:value="0.00618634006123852" calcext:value-type="percentage">
            <text:p>0.62%</text:p>
          </table:table-cell>
          <table:table-cell table:style-name="ce5" table:formula="of:=([.M11]-[.I11])/[.I11]" office:value-type="percentage" office:value="0.00524901580953571" calcext:value-type="percentage">
            <text:p>0.52%</text:p>
          </table:table-cell>
          <table:table-cell table:style-name="ce45" table:formula="of:=([.N11]-[.M11])/[.M11]" office:value-type="percentage" office:value="0.00111891589482191" calcext:value-type="percentage">
            <text:p>0.11%</text:p>
          </table:table-cell>
          <table:table-cell table:number-columns-repeated="997"/>
        </table:table-row>
        <table:table-row table:style-name="ro1">
          <table:table-cell table:style-name="ce1" table:formula="of:=IFERROR(__xludf.dummyfunction(&quot;&quot;&quot;COMPUTED_VALUE&quot;&quot;&quot;);&quot;random-callstack-ubench-0.1&quot;)" office:value-type="string" office:string-value="random-callstack-ubench-0.1" calcext:value-type="string">
            <text:p>random-callstack-ubench-0.1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C$2:C$6,$B$2:$B$6,LAMBDA(value,column,column&amp;&quot;&quot;='&quot;&quot;&amp;value&amp;&quot;&quot;'&quot;&quot;)),LAMBDA(acc,val,acc&amp;&quot;&quot; AND &quot;&quot;&amp;val))&amp;&quot;&quot;)&quot;&quot;)&quot;);2826496)" office:value-type="float" office:value="2826496" calcext:value-type="float">
            <text:p>2,826,4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D$2:D$6,$B$2:$B$6,LAMBDA(value,column,column&amp;&quot;&quot;='&quot;&quot;&amp;value&amp;&quot;&quot;'&quot;&quot;)),LAMBDA(acc,val,acc&amp;&quot;&quot; AND &quot;&quot;&amp;val))&amp;&quot;&quot;)&quot;&quot;)&quot;);2826464)" office:value-type="float" office:value="2826464" calcext:value-type="float">
            <text:p>2,826,4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E$2:E$6,$B$2:$B$6,LAMBDA(value,column,column&amp;&quot;&quot;='&quot;&quot;&amp;value&amp;&quot;&quot;'&quot;&quot;)),LAMBDA(acc,val,acc&amp;&quot;&quot; AND &quot;&quot;&amp;val))&amp;&quot;&quot;)&quot;&quot;)&quot;);6377312)" office:value-type="float" office:value="6377312" calcext:value-type="float">
            <text:p>6,377,31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F$2:F$6,$B$2:$B$6,LAMBDA(value,column,column&amp;&quot;&quot;='&quot;&quot;&amp;value&amp;&quot;&quot;'&quot;&quot;)),LAMBDA(acc,val,acc&amp;&quot;&quot; AND &quot;&quot;&amp;val))&amp;&quot;&quot;)&quot;&quot;)&quot;);6376784)" office:value-type="float" office:value="6376784" calcext:value-type="float">
            <text:p>6,376,7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G$2:G$6,$B$2:$B$6,LAMBDA(value,column,column&amp;&quot;&quot;='&quot;&quot;&amp;value&amp;&quot;&quot;'&quot;&quot;)),LAMBDA(acc,val,acc&amp;&quot;&quot; AND &quot;&quot;&amp;val))&amp;&quot;&quot;)&quot;&quot;)&quot;);6377312)" office:value-type="float" office:value="6377312" calcext:value-type="float">
            <text:p>6,377,31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H$2:H$6,$B$2:$B$6,LAMBDA(value,column,column&amp;&quot;&quot;='&quot;&quot;&amp;value&amp;&quot;&quot;'&quot;&quot;)),LAMBDA(acc,val,acc&amp;&quot;&quot; AND &quot;&quot;&amp;val))&amp;&quot;&quot;)&quot;&quot;)&quot;);6376784)" office:value-type="float" office:value="6376784" calcext:value-type="float">
            <text:p>6,376,7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I$2:I$6,$B$2:$B$6,LAMBDA(value,column,column&amp;&quot;&quot;='&quot;&quot;&amp;value&amp;&quot;&quot;'&quot;&quot;)),LAMBDA(acc,val,acc&amp;&quot;&quot; AND &quot;&quot;&amp;val))&amp;&quot;&quot;)&quot;&quot;)&quot;);2867584)" office:value-type="float" office:value="2867584" calcext:value-type="float">
            <text:p>2,867,5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J$2:J$6,$B$2:$B$6,LAMBDA(value,column,column&amp;&quot;&quot;='&quot;&quot;&amp;value&amp;&quot;&quot;'&quot;&quot;)),LAMBDA(acc,val,acc&amp;&quot;&quot; AND &quot;&quot;&amp;val))&amp;&quot;&quot;)&quot;&quot;)&quot;);2882544)" office:value-type="float" office:value="2882544" calcext:value-type="float">
            <text:p>2,882,54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K$2:K$6,$B$2:$B$6,LAMBDA(value,column,column&amp;&quot;&quot;='&quot;&quot;&amp;value&amp;&quot;&quot;'&quot;&quot;)),LAMBDA(acc,val,acc&amp;&quot;&quot; AND &quot;&quot;&amp;val))&amp;&quot;&quot;)&quot;&quot;)&quot;);2882544)" office:value-type="float" office:value="2882544" calcext:value-type="float">
            <text:p>2,882,54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L$2:L$6,$B$2:$B$6,LAMBDA(value,column,column&amp;&quot;&quot;='&quot;&quot;&amp;value&amp;&quot;&quot;'&quot;&quot;)),LAMBDA(acc,val,acc&amp;&quot;&quot; AND &quot;&quot;&amp;val))&amp;&quot;&quot;)&quot;&quot;)&quot;);2879360)" office:value-type="float" office:value="2879360" calcext:value-type="float">
            <text:p>2,879,36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M$2:M$6,$B$2:$B$6,LAMBDA(value,column,column&amp;&quot;&quot;='&quot;&quot;&amp;value&amp;&quot;&quot;'&quot;&quot;)),LAMBDA(acc,val,acc&amp;&quot;&quot; AND &quot;&quot;&amp;val))&amp;&quot;&quot;)&quot;&quot;)&quot;);2879360)" office:value-type="float" office:value="2879360" calcext:value-type="float">
            <text:p>2,879,36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2&amp;&quot;&quot;'&quot;&quot;,MAP(N$2:N$6,$B$2:$B$6,LAMBDA(value,column,column&amp;&quot;&quot;='&quot;&quot;&amp;value&amp;&quot;&quot;'&quot;&quot;)),LAMBDA(acc,val,acc&amp;&quot;&quot; AND &quot;&quot;&amp;val))&amp;&quot;&quot;)&quot;&quot;)&quot;);2978400)" office:value-type="float" office:value="2978400" calcext:value-type="float">
            <text:p>2,978,400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2&amp;&quot;&quot;'&quot;&quot;,MAP(O$2:O$6,$B$2:$B$6,LAMBDA(value,column,column&amp;&quot;&quot;='&quot;&quot;&amp;value&amp;&quot;&quot;'&quot;&quot;)),LAMBDA(acc,val,acc&amp;&quot;&quot; AND &quot;&quot;&amp;val))&amp;&quot;&quot;)&quot;&quot;)&quot;);529)" office:value-type="float" office:value="529" calcext:value-type="float">
            <text:p>529</text:p>
          </table:table-cell>
          <table:table-cell table:style-name="ce24" table:formula="of:=[.O12]*1000/[.M12]" office:value-type="float" office:value="0.183721382529451" calcext:value-type="float">
            <text:p>0.1837</text:p>
          </table:table-cell>
          <table:table-cell table:style-name="ce5" table:formula="of:=([.D12]-[.C12])/[.C12]" office:value-type="percentage" office:value="-0.0000113214382755185" calcext:value-type="percentage">
            <text:p>0.00%</text:p>
          </table:table-cell>
          <table:table-cell table:style-name="ce29" table:formula="of:=([.E12]-[.D12])/[.D12]" office:value-type="percentage" office:value="1.25628629977244" calcext:value-type="percentage">
            <text:p>125.63%</text:p>
          </table:table-cell>
          <table:table-cell table:style-name="ce34" table:formula="of:=([.F12]-[.E12])/[.E12]" office:value-type="percentage" office:value="-0.0000827935029680216" calcext:value-type="percentage">
            <text:p>-0.01%</text:p>
          </table:table-cell>
          <table:table-cell table:style-name="ce5" table:formula="of:=([.G12]-[.D12])/[.D12]" office:value-type="percentage" office:value="1.25628629977244" calcext:value-type="percentage">
            <text:p>125.63%</text:p>
          </table:table-cell>
          <table:table-cell table:style-name="ce5" table:formula="of:=([.H12]-[.G12])/[.G12]" office:value-type="percentage" office:value="-0.0000827935029680216" calcext:value-type="percentage">
            <text:p>-0.01%</text:p>
          </table:table-cell>
          <table:table-cell table:style-name="ce29" table:formula="of:=([.I12]-[.D12])/[.D12]" office:value-type="percentage" office:value="0.0145482128907356" calcext:value-type="percentage">
            <text:p>1.45%</text:p>
          </table:table-cell>
          <table:table-cell table:style-name="ce40" table:formula="of:=([.J12]-[.I12])/[.I12]" office:value-type="percentage" office:value="0.00521693523188859" calcext:value-type="percentage">
            <text:p>0.52%</text:p>
          </table:table-cell>
          <table:table-cell table:style-name="ce34" table:formula="of:=([.K12]-[.J12])/[.J12]" office:value-type="percentage" office:value="0" calcext:value-type="percentage">
            <text:p>0.00%</text:p>
          </table:table-cell>
          <table:table-cell table:style-name="ce5" table:formula="of:=([.L12]-[.I12])/[.I12]" office:value-type="percentage" office:value="0.00410659286702674" calcext:value-type="percentage">
            <text:p>0.41%</text:p>
          </table:table-cell>
          <table:table-cell table:style-name="ce5" table:formula="of:=([.M12]-[.I12])/[.I12]" office:value-type="percentage" office:value="0.00410659286702674" calcext:value-type="percentage">
            <text:p>0.41%</text:p>
          </table:table-cell>
          <table:table-cell table:style-name="ce45" table:formula="of:=([.N12]-[.M12])/[.M12]" office:value-type="percentage" office:value="0.0343965325627917" calcext:value-type="percentage">
            <text:p>3.44%</text:p>
          </table:table-cell>
          <table:table-cell table:number-columns-repeated="997"/>
        </table:table-row>
        <table:table-row table:style-name="ro1">
          <table:table-cell table:style-name="ce1" table:formula="of:=IFERROR(__xludf.dummyfunction(&quot;&quot;&quot;COMPUTED_VALUE&quot;&quot;&quot;);&quot;random-callstack-ubench-0.5&quot;)" office:value-type="string" office:string-value="random-callstack-ubench-0.5" calcext:value-type="string">
            <text:p>random-callstack-ubench-0.5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C$2:C$6,$B$2:$B$6,LAMBDA(value,column,column&amp;&quot;&quot;='&quot;&quot;&amp;value&amp;&quot;&quot;'&quot;&quot;)),LAMBDA(acc,val,acc&amp;&quot;&quot; AND &quot;&quot;&amp;val))&amp;&quot;&quot;)&quot;&quot;)&quot;);2826496)" office:value-type="float" office:value="2826496" calcext:value-type="float">
            <text:p>2,826,4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D$2:D$6,$B$2:$B$6,LAMBDA(value,column,column&amp;&quot;&quot;='&quot;&quot;&amp;value&amp;&quot;&quot;'&quot;&quot;)),LAMBDA(acc,val,acc&amp;&quot;&quot; AND &quot;&quot;&amp;val))&amp;&quot;&quot;)&quot;&quot;)&quot;);2826464)" office:value-type="float" office:value="2826464" calcext:value-type="float">
            <text:p>2,826,4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E$2:E$6,$B$2:$B$6,LAMBDA(value,column,column&amp;&quot;&quot;='&quot;&quot;&amp;value&amp;&quot;&quot;'&quot;&quot;)),LAMBDA(acc,val,acc&amp;&quot;&quot; AND &quot;&quot;&amp;val))&amp;&quot;&quot;)&quot;&quot;)&quot;);22384720)" office:value-type="float" office:value="22384720" calcext:value-type="float">
            <text:p>22,384,7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F$2:F$6,$B$2:$B$6,LAMBDA(value,column,column&amp;&quot;&quot;='&quot;&quot;&amp;value&amp;&quot;&quot;'&quot;&quot;)),LAMBDA(acc,val,acc&amp;&quot;&quot; AND &quot;&quot;&amp;val))&amp;&quot;&quot;)&quot;&quot;)&quot;);22384336)" office:value-type="float" office:value="22384336" calcext:value-type="float">
            <text:p>22,384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G$2:G$6,$B$2:$B$6,LAMBDA(value,column,column&amp;&quot;&quot;='&quot;&quot;&amp;value&amp;&quot;&quot;'&quot;&quot;)),LAMBDA(acc,val,acc&amp;&quot;&quot; AND &quot;&quot;&amp;val))&amp;&quot;&quot;)&quot;&quot;)&quot;);22384720)" office:value-type="float" office:value="22384720" calcext:value-type="float">
            <text:p>22,384,72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H$2:H$6,$B$2:$B$6,LAMBDA(value,column,column&amp;&quot;&quot;='&quot;&quot;&amp;value&amp;&quot;&quot;'&quot;&quot;)),LAMBDA(acc,val,acc&amp;&quot;&quot; AND &quot;&quot;&amp;val))&amp;&quot;&quot;)&quot;&quot;)&quot;);22384336)" office:value-type="float" office:value="22384336" calcext:value-type="float">
            <text:p>22,384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I$2:I$6,$B$2:$B$6,LAMBDA(value,column,column&amp;&quot;&quot;='&quot;&quot;&amp;value&amp;&quot;&quot;'&quot;&quot;)),LAMBDA(acc,val,acc&amp;&quot;&quot; AND &quot;&quot;&amp;val))&amp;&quot;&quot;)&quot;&quot;)&quot;);2867584)" office:value-type="float" office:value="2867584" calcext:value-type="float">
            <text:p>2,867,5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J$2:J$6,$B$2:$B$6,LAMBDA(value,column,column&amp;&quot;&quot;='&quot;&quot;&amp;value&amp;&quot;&quot;'&quot;&quot;)),LAMBDA(acc,val,acc&amp;&quot;&quot; AND &quot;&quot;&amp;val))&amp;&quot;&quot;)&quot;&quot;)&quot;);3041872)" office:value-type="float" office:value="3041872" calcext:value-type="float">
            <text:p>3,041,87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K$2:K$6,$B$2:$B$6,LAMBDA(value,column,column&amp;&quot;&quot;='&quot;&quot;&amp;value&amp;&quot;&quot;'&quot;&quot;)),LAMBDA(acc,val,acc&amp;&quot;&quot; AND &quot;&quot;&amp;val))&amp;&quot;&quot;)&quot;&quot;)&quot;);3041872)" office:value-type="float" office:value="3041872" calcext:value-type="float">
            <text:p>3,041,87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L$2:L$6,$B$2:$B$6,LAMBDA(value,column,column&amp;&quot;&quot;='&quot;&quot;&amp;value&amp;&quot;&quot;'&quot;&quot;)),LAMBDA(acc,val,acc&amp;&quot;&quot; AND &quot;&quot;&amp;val))&amp;&quot;&quot;)&quot;&quot;)&quot;);3008384)" office:value-type="float" office:value="3008384" calcext:value-type="float">
            <text:p>3,008,3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M$2:M$6,$B$2:$B$6,LAMBDA(value,column,column&amp;&quot;&quot;='&quot;&quot;&amp;value&amp;&quot;&quot;'&quot;&quot;)),LAMBDA(acc,val,acc&amp;&quot;&quot; AND &quot;&quot;&amp;val))&amp;&quot;&quot;)&quot;&quot;)&quot;);3008384)" office:value-type="float" office:value="3008384" calcext:value-type="float">
            <text:p>3,008,3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3&amp;&quot;&quot;'&quot;&quot;,MAP(N$2:N$6,$B$2:$B$6,LAMBDA(value,column,column&amp;&quot;&quot;='&quot;&quot;&amp;value&amp;&quot;&quot;'&quot;&quot;)),LAMBDA(acc,val,acc&amp;&quot;&quot; AND &quot;&quot;&amp;val))&amp;&quot;&quot;)&quot;&quot;)&quot;);3495488)" office:value-type="float" office:value="3495488" calcext:value-type="float">
            <text:p>3,495,488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3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table:formula="of:=[.O13]*1000/[.M13]" office:value-type="float" office:value="0.834002574139472" calcext:value-type="float">
            <text:p>0.8340</text:p>
          </table:table-cell>
          <table:table-cell table:style-name="ce5" table:formula="of:=([.D13]-[.C13])/[.C13]" office:value-type="percentage" office:value="-0.0000113214382755185" calcext:value-type="percentage">
            <text:p>0.00%</text:p>
          </table:table-cell>
          <table:table-cell table:style-name="ce29" table:formula="of:=([.E13]-[.D13])/[.D13]" office:value-type="percentage" office:value="6.9196904683732" calcext:value-type="percentage">
            <text:p>691.97%</text:p>
          </table:table-cell>
          <table:table-cell table:style-name="ce34" table:formula="of:=([.F13]-[.E13])/[.E13]" office:value-type="percentage" office:value="-0.0000171545590027483" calcext:value-type="percentage">
            <text:p>0.00%</text:p>
          </table:table-cell>
          <table:table-cell table:style-name="ce5" table:formula="of:=([.G13]-[.D13])/[.D13]" office:value-type="percentage" office:value="6.9196904683732" calcext:value-type="percentage">
            <text:p>691.97%</text:p>
          </table:table-cell>
          <table:table-cell table:style-name="ce5" table:formula="of:=([.H13]-[.G13])/[.G13]" office:value-type="percentage" office:value="-0.0000171545590027483" calcext:value-type="percentage">
            <text:p>0.00%</text:p>
          </table:table-cell>
          <table:table-cell table:style-name="ce29" table:formula="of:=([.I13]-[.D13])/[.D13]" office:value-type="percentage" office:value="0.0145482128907356" calcext:value-type="percentage">
            <text:p>1.45%</text:p>
          </table:table-cell>
          <table:table-cell table:style-name="ce40" table:formula="of:=([.J13]-[.I13])/[.I13]" office:value-type="percentage" office:value="0.0607786903539705" calcext:value-type="percentage">
            <text:p>6.08%</text:p>
          </table:table-cell>
          <table:table-cell table:style-name="ce34" table:formula="of:=([.K13]-[.J13])/[.J13]" office:value-type="percentage" office:value="0" calcext:value-type="percentage">
            <text:p>0.00%</text:p>
          </table:table-cell>
          <table:table-cell table:style-name="ce5" table:formula="of:=([.L13]-[.I13])/[.I13]" office:value-type="percentage" office:value="0.0491005668883632" calcext:value-type="percentage">
            <text:p>4.91%</text:p>
          </table:table-cell>
          <table:table-cell table:style-name="ce5" table:formula="of:=([.M13]-[.I13])/[.I13]" office:value-type="percentage" office:value="0.0491005668883632" calcext:value-type="percentage">
            <text:p>4.91%</text:p>
          </table:table-cell>
          <table:table-cell table:style-name="ce45" table:formula="of:=([.N13]-[.M13])/[.M13]" office:value-type="percentage" office:value="0.161915500148917" calcext:value-type="percentage">
            <text:p>16.19%</text:p>
          </table:table-cell>
          <table:table-cell table:number-columns-repeated="997"/>
        </table:table-row>
        <table:table-row table:style-name="ro1">
          <table:table-cell table:style-name="ce1" table:formula="of:=IFERROR(__xludf.dummyfunction(&quot;&quot;&quot;COMPUTED_VALUE&quot;&quot;&quot;);&quot;random-callstack-ubench-0.9&quot;)" office:value-type="string" office:string-value="random-callstack-ubench-0.9" calcext:value-type="string">
            <text:p>random-callstack-ubench-0.9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C$2:C$6,$B$2:$B$6,LAMBDA(value,column,column&amp;&quot;&quot;='&quot;&quot;&amp;value&amp;&quot;&quot;'&quot;&quot;)),LAMBDA(acc,val,acc&amp;&quot;&quot; AND &quot;&quot;&amp;val))&amp;&quot;&quot;)&quot;&quot;)&quot;);2826496)" office:value-type="float" office:value="2826496" calcext:value-type="float">
            <text:p>2,826,4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D$2:D$6,$B$2:$B$6,LAMBDA(value,column,column&amp;&quot;&quot;='&quot;&quot;&amp;value&amp;&quot;&quot;'&quot;&quot;)),LAMBDA(acc,val,acc&amp;&quot;&quot; AND &quot;&quot;&amp;val))&amp;&quot;&quot;)&quot;&quot;)&quot;);2826464)" office:value-type="float" office:value="2826464" calcext:value-type="float">
            <text:p>2,826,4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E$2:E$6,$B$2:$B$6,LAMBDA(value,column,column&amp;&quot;&quot;='&quot;&quot;&amp;value&amp;&quot;&quot;'&quot;&quot;)),LAMBDA(acc,val,acc&amp;&quot;&quot; AND &quot;&quot;&amp;val))&amp;&quot;&quot;)&quot;&quot;)&quot;);38689296)" office:value-type="float" office:value="38689296" calcext:value-type="float">
            <text:p>38,689,2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F$2:F$6,$B$2:$B$6,LAMBDA(value,column,column&amp;&quot;&quot;='&quot;&quot;&amp;value&amp;&quot;&quot;'&quot;&quot;)),LAMBDA(acc,val,acc&amp;&quot;&quot; AND &quot;&quot;&amp;val))&amp;&quot;&quot;)&quot;&quot;)&quot;);38688864)" office:value-type="float" office:value="38688864" calcext:value-type="float">
            <text:p>38,688,8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G$2:G$6,$B$2:$B$6,LAMBDA(value,column,column&amp;&quot;&quot;='&quot;&quot;&amp;value&amp;&quot;&quot;'&quot;&quot;)),LAMBDA(acc,val,acc&amp;&quot;&quot; AND &quot;&quot;&amp;val))&amp;&quot;&quot;)&quot;&quot;)&quot;);38689296)" office:value-type="float" office:value="38689296" calcext:value-type="float">
            <text:p>38,689,2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H$2:H$6,$B$2:$B$6,LAMBDA(value,column,column&amp;&quot;&quot;='&quot;&quot;&amp;value&amp;&quot;&quot;'&quot;&quot;)),LAMBDA(acc,val,acc&amp;&quot;&quot; AND &quot;&quot;&amp;val))&amp;&quot;&quot;)&quot;&quot;)&quot;);38688864)" office:value-type="float" office:value="38688864" calcext:value-type="float">
            <text:p>38,688,8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I$2:I$6,$B$2:$B$6,LAMBDA(value,column,column&amp;&quot;&quot;='&quot;&quot;&amp;value&amp;&quot;&quot;'&quot;&quot;)),LAMBDA(acc,val,acc&amp;&quot;&quot; AND &quot;&quot;&amp;val))&amp;&quot;&quot;)&quot;&quot;)&quot;);2867584)" office:value-type="float" office:value="2867584" calcext:value-type="float">
            <text:p>2,867,58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J$2:J$6,$B$2:$B$6,LAMBDA(value,column,column&amp;&quot;&quot;='&quot;&quot;&amp;value&amp;&quot;&quot;'&quot;&quot;)),LAMBDA(acc,val,acc&amp;&quot;&quot; AND &quot;&quot;&amp;val))&amp;&quot;&quot;)&quot;&quot;)&quot;);3202672)" office:value-type="float" office:value="3202672" calcext:value-type="float">
            <text:p>3,202,67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K$2:K$6,$B$2:$B$6,LAMBDA(value,column,column&amp;&quot;&quot;='&quot;&quot;&amp;value&amp;&quot;&quot;'&quot;&quot;)),LAMBDA(acc,val,acc&amp;&quot;&quot; AND &quot;&quot;&amp;val))&amp;&quot;&quot;)&quot;&quot;)&quot;);3202672)" office:value-type="float" office:value="3202672" calcext:value-type="float">
            <text:p>3,202,67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L$2:L$6,$B$2:$B$6,LAMBDA(value,column,column&amp;&quot;&quot;='&quot;&quot;&amp;value&amp;&quot;&quot;'&quot;&quot;)),LAMBDA(acc,val,acc&amp;&quot;&quot; AND &quot;&quot;&amp;val))&amp;&quot;&quot;)&quot;&quot;)&quot;);3137056)" office:value-type="float" office:value="3137056" calcext:value-type="float">
            <text:p>3,137,05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M$2:M$6,$B$2:$B$6,LAMBDA(value,column,column&amp;&quot;&quot;='&quot;&quot;&amp;value&amp;&quot;&quot;'&quot;&quot;)),LAMBDA(acc,val,acc&amp;&quot;&quot; AND &quot;&quot;&amp;val))&amp;&quot;&quot;)&quot;&quot;)&quot;);3137056)" office:value-type="float" office:value="3137056" calcext:value-type="float">
            <text:p>3,137,05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4&amp;&quot;&quot;'&quot;&quot;,MAP(N$2:N$6,$B$2:$B$6,LAMBDA(value,column,column&amp;&quot;&quot;='&quot;&quot;&amp;value&amp;&quot;&quot;'&quot;&quot;)),LAMBDA(acc,val,acc&amp;&quot;&quot; AND &quot;&quot;&amp;val))&amp;&quot;&quot;)&quot;&quot;)&quot;);4023104)" office:value-type="float" office:value="4023104" calcext:value-type="float">
            <text:p>4,023,104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4&amp;&quot;&quot;'&quot;&quot;,MAP(O$2:O$6,$B$2:$B$6,LAMBDA(value,column,column&amp;&quot;&quot;='&quot;&quot;&amp;value&amp;&quot;&quot;'&quot;&quot;)),LAMBDA(acc,val,acc&amp;&quot;&quot; AND &quot;&quot;&amp;val))&amp;&quot;&quot;)&quot;&quot;)&quot;);4499)" office:value-type="float" office:value="4499" calcext:value-type="float">
            <text:p>4,499</text:p>
          </table:table-cell>
          <table:table-cell table:style-name="ce24" table:formula="of:=[.O14]*1000/[.M14]" office:value-type="float" office:value="1.43414717493089" calcext:value-type="float">
            <text:p>1.4341</text:p>
          </table:table-cell>
          <table:table-cell table:style-name="ce5" table:formula="of:=([.D14]-[.C14])/[.C14]" office:value-type="percentage" office:value="-0.0000113214382755185" calcext:value-type="percentage">
            <text:p>0.00%</text:p>
          </table:table-cell>
          <table:table-cell table:style-name="ce29" table:formula="of:=([.E14]-[.D14])/[.D14]" office:value-type="percentage" office:value="12.6882323638299" calcext:value-type="percentage">
            <text:p>1268.82%</text:p>
          </table:table-cell>
          <table:table-cell table:style-name="ce34" table:formula="of:=([.F14]-[.E14])/[.E14]" office:value-type="percentage" office:value="-0.000011165879058642" calcext:value-type="percentage">
            <text:p>0.00%</text:p>
          </table:table-cell>
          <table:table-cell table:style-name="ce5" table:formula="of:=([.G14]-[.D14])/[.D14]" office:value-type="percentage" office:value="12.6882323638299" calcext:value-type="percentage">
            <text:p>1268.82%</text:p>
          </table:table-cell>
          <table:table-cell table:style-name="ce5" table:formula="of:=([.H14]-[.G14])/[.G14]" office:value-type="percentage" office:value="-0.000011165879058642" calcext:value-type="percentage">
            <text:p>0.00%</text:p>
          </table:table-cell>
          <table:table-cell table:style-name="ce29" table:formula="of:=([.I14]-[.D14])/[.D14]" office:value-type="percentage" office:value="0.0145482128907356" calcext:value-type="percentage">
            <text:p>1.45%</text:p>
          </table:table-cell>
          <table:table-cell table:style-name="ce40" table:formula="of:=([.J14]-[.I14])/[.I14]" office:value-type="percentage" office:value="0.116853769584431" calcext:value-type="percentage">
            <text:p>11.69%</text:p>
          </table:table-cell>
          <table:table-cell table:style-name="ce34" table:formula="of:=([.K14]-[.J14])/[.J14]" office:value-type="percentage" office:value="0" calcext:value-type="percentage">
            <text:p>0.00%</text:p>
          </table:table-cell>
          <table:table-cell table:style-name="ce5" table:formula="of:=([.L14]-[.I14])/[.I14]" office:value-type="percentage" office:value="0.0939717894924787" calcext:value-type="percentage">
            <text:p>9.40%</text:p>
          </table:table-cell>
          <table:table-cell table:style-name="ce5" table:formula="of:=([.M14]-[.I14])/[.I14]" office:value-type="percentage" office:value="0.0939717894924787" calcext:value-type="percentage">
            <text:p>9.40%</text:p>
          </table:table-cell>
          <table:table-cell table:style-name="ce45" table:formula="of:=([.N14]-[.M14])/[.M14]" office:value-type="percentage" office:value="0.282445707057827" calcext:value-type="percentage">
            <text:p>28.24%</text:p>
          </table:table-cell>
          <table:table-cell table:number-columns-repeated="997"/>
        </table:table-row>
        <table:table-row table:style-name="ro1">
          <table:table-cell table:style-name="ce1" table:formula="of:=IFERROR(__xludf.dummyfunction(&quot;&quot;&quot;COMPUTED_VALUE&quot;&quot;&quot;);&quot;random-callstack-ubench+large-alloc-0.5&quot;)" office:value-type="string" office:string-value="random-callstack-ubench+large-alloc-0.5" calcext:value-type="string">
            <text:p>random-callstack-ubench+large-alloc-0.5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C$2:C$6,$B$2:$B$6,LAMBDA(value,column,column&amp;&quot;&quot;='&quot;&quot;&amp;value&amp;&quot;&quot;'&quot;&quot;)),LAMBDA(acc,val,acc&amp;&quot;&quot; AND &quot;&quot;&amp;val))&amp;&quot;&quot;)&quot;&quot;)&quot;);3630336)" office:value-type="float" office:value="3630336" calcext:value-type="float">
            <text:p>3,630,33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D$2:D$6,$B$2:$B$6,LAMBDA(value,column,column&amp;&quot;&quot;='&quot;&quot;&amp;value&amp;&quot;&quot;'&quot;&quot;)),LAMBDA(acc,val,acc&amp;&quot;&quot; AND &quot;&quot;&amp;val))&amp;&quot;&quot;)&quot;&quot;)&quot;);3630304)" office:value-type="float" office:value="3630304" calcext:value-type="float">
            <text:p>3,630,30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E$2:E$6,$B$2:$B$6,LAMBDA(value,column,column&amp;&quot;&quot;='&quot;&quot;&amp;value&amp;&quot;&quot;'&quot;&quot;)),LAMBDA(acc,val,acc&amp;&quot;&quot; AND &quot;&quot;&amp;val))&amp;&quot;&quot;)&quot;&quot;)&quot;);22404080)" office:value-type="float" office:value="22404080" calcext:value-type="float">
            <text:p>22,404,0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F$2:F$6,$B$2:$B$6,LAMBDA(value,column,column&amp;&quot;&quot;='&quot;&quot;&amp;value&amp;&quot;&quot;'&quot;&quot;)),LAMBDA(acc,val,acc&amp;&quot;&quot; AND &quot;&quot;&amp;val))&amp;&quot;&quot;)&quot;&quot;)&quot;);22403696)" office:value-type="float" office:value="22403696" calcext:value-type="float">
            <text:p>22,403,6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G$2:G$6,$B$2:$B$6,LAMBDA(value,column,column&amp;&quot;&quot;='&quot;&quot;&amp;value&amp;&quot;&quot;'&quot;&quot;)),LAMBDA(acc,val,acc&amp;&quot;&quot; AND &quot;&quot;&amp;val))&amp;&quot;&quot;)&quot;&quot;)&quot;);22404080)" office:value-type="float" office:value="22404080" calcext:value-type="float">
            <text:p>22,404,08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H$2:H$6,$B$2:$B$6,LAMBDA(value,column,column&amp;&quot;&quot;='&quot;&quot;&amp;value&amp;&quot;&quot;'&quot;&quot;)),LAMBDA(acc,val,acc&amp;&quot;&quot; AND &quot;&quot;&amp;val))&amp;&quot;&quot;)&quot;&quot;)&quot;);22403696)" office:value-type="float" office:value="22403696" calcext:value-type="float">
            <text:p>22,403,69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I$2:I$6,$B$2:$B$6,LAMBDA(value,column,column&amp;&quot;&quot;='&quot;&quot;&amp;value&amp;&quot;&quot;'&quot;&quot;)),LAMBDA(acc,val,acc&amp;&quot;&quot; AND &quot;&quot;&amp;val))&amp;&quot;&quot;)&quot;&quot;)&quot;);3671392)" office:value-type="float" office:value="3671392" calcext:value-type="float">
            <text:p>3,671,3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J$2:J$6,$B$2:$B$6,LAMBDA(value,column,column&amp;&quot;&quot;='&quot;&quot;&amp;value&amp;&quot;&quot;'&quot;&quot;)),LAMBDA(acc,val,acc&amp;&quot;&quot; AND &quot;&quot;&amp;val))&amp;&quot;&quot;)&quot;&quot;)&quot;);3864752)" office:value-type="float" office:value="3864752" calcext:value-type="float">
            <text:p>3,864,75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K$2:K$6,$B$2:$B$6,LAMBDA(value,column,column&amp;&quot;&quot;='&quot;&quot;&amp;value&amp;&quot;&quot;'&quot;&quot;)),LAMBDA(acc,val,acc&amp;&quot;&quot; AND &quot;&quot;&amp;val))&amp;&quot;&quot;)&quot;&quot;)&quot;);3864752)" office:value-type="float" office:value="3864752" calcext:value-type="float">
            <text:p>3,864,75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L$2:L$6,$B$2:$B$6,LAMBDA(value,column,column&amp;&quot;&quot;='&quot;&quot;&amp;value&amp;&quot;&quot;'&quot;&quot;)),LAMBDA(acc,val,acc&amp;&quot;&quot; AND &quot;&quot;&amp;val))&amp;&quot;&quot;)&quot;&quot;)&quot;);3846464)" office:value-type="float" office:value="3846464" calcext:value-type="float">
            <text:p>3,846,4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M$2:M$6,$B$2:$B$6,LAMBDA(value,column,column&amp;&quot;&quot;='&quot;&quot;&amp;value&amp;&quot;&quot;'&quot;&quot;)),LAMBDA(acc,val,acc&amp;&quot;&quot; AND &quot;&quot;&amp;val))&amp;&quot;&quot;)&quot;&quot;)&quot;);3846464)" office:value-type="float" office:value="3846464" calcext:value-type="float">
            <text:p>3,846,464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5&amp;&quot;&quot;'&quot;&quot;,MAP(N$2:N$6,$B$2:$B$6,LAMBDA(value,column,column&amp;&quot;&quot;='&quot;&quot;&amp;value&amp;&quot;&quot;'&quot;&quot;)),LAMBDA(acc,val,acc&amp;&quot;&quot; AND &quot;&quot;&amp;val))&amp;&quot;&quot;)&quot;&quot;)&quot;);4322080)" office:value-type="float" office:value="4322080" calcext:value-type="float">
            <text:p>4,322,080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5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table:formula="of:=[.O15]*1000/[.M15]" office:value-type="float" office:value="0.652287399544101" calcext:value-type="float">
            <text:p>0.6523</text:p>
          </table:table-cell>
          <table:table-cell table:style-name="ce5" table:formula="of:=([.D15]-[.C15])/[.C15]" office:value-type="percentage" office:value="-0.0000088146110993583" calcext:value-type="percentage">
            <text:p>0.00%</text:p>
          </table:table-cell>
          <table:table-cell table:style-name="ce29" table:formula="of:=([.E15]-[.D15])/[.D15]" office:value-type="percentage" office:value="5.17140603101008" calcext:value-type="percentage">
            <text:p>517.14%</text:p>
          </table:table-cell>
          <table:table-cell table:style-name="ce34" table:formula="of:=([.F15]-[.E15])/[.E15]" office:value-type="percentage" office:value="-0.0000171397352625058" calcext:value-type="percentage">
            <text:p>0.00%</text:p>
          </table:table-cell>
          <table:table-cell table:style-name="ce5" table:formula="of:=([.G15]-[.D15])/[.D15]" office:value-type="percentage" office:value="5.17140603101008" calcext:value-type="percentage">
            <text:p>517.14%</text:p>
          </table:table-cell>
          <table:table-cell table:style-name="ce5" table:formula="of:=([.H15]-[.G15])/[.G15]" office:value-type="percentage" office:value="-0.0000171397352625058" calcext:value-type="percentage">
            <text:p>0.00%</text:p>
          </table:table-cell>
          <table:table-cell table:style-name="ce29" table:formula="of:=([.I15]-[.D15])/[.D15]" office:value-type="percentage" office:value="0.011318060415877" calcext:value-type="percentage">
            <text:p>1.13%</text:p>
          </table:table-cell>
          <table:table-cell table:style-name="ce40" table:formula="of:=([.J15]-[.I15])/[.I15]" office:value-type="percentage" office:value="0.0526666724773601" calcext:value-type="percentage">
            <text:p>5.27%</text:p>
          </table:table-cell>
          <table:table-cell table:style-name="ce34" table:formula="of:=([.K15]-[.J15])/[.J15]" office:value-type="percentage" office:value="0" calcext:value-type="percentage">
            <text:p>0.00%</text:p>
          </table:table-cell>
          <table:table-cell table:style-name="ce5" table:formula="of:=([.L15]-[.I15])/[.I15]" office:value-type="percentage" office:value="0.0476854555438373" calcext:value-type="percentage">
            <text:p>4.77%</text:p>
          </table:table-cell>
          <table:table-cell table:style-name="ce5" table:formula="of:=([.M15]-[.I15])/[.I15]" office:value-type="percentage" office:value="0.0476854555438373" calcext:value-type="percentage">
            <text:p>4.77%</text:p>
          </table:table-cell>
          <table:table-cell table:style-name="ce45" table:formula="of:=([.N15]-[.M15])/[.M15]" office:value-type="percentage" office:value="0.123650188848771" calcext:value-type="percentage">
            <text:p>12.37%</text:p>
          </table:table-cell>
          <table:table-cell table:number-columns-repeated="997"/>
        </table:table-row>
        <table:table-row table:style-name="ro1">
          <table:table-cell table:style-name="ce1" table:formula="of:=IFERROR(__xludf.dummyfunction(&quot;&quot;&quot;COMPUTED_VALUE&quot;&quot;&quot;);&quot;random-callstack-ubench+small-alloc-0.5&quot;)" office:value-type="string" office:string-value="random-callstack-ubench+small-alloc-0.5" calcext:value-type="string">
            <text:p>random-callstack-ubench+small-alloc-0.5</text:p>
          </table:table-cell>
          <table:table-cell table:style-name="ce10"/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C$2:C$6,$B$2:$B$6,LAMBDA(value,column,column&amp;&quot;&quot;='&quot;&quot;&amp;value&amp;&quot;&quot;'&quot;&quot;)),LAMBDA(acc,val,acc&amp;&quot;&quot; AND &quot;&quot;&amp;val))&amp;&quot;&quot;)&quot;&quot;)&quot;);2504960)" office:value-type="float" office:value="2504960" calcext:value-type="float">
            <text:p>2,504,960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D$2:D$6,$B$2:$B$6,LAMBDA(value,column,column&amp;&quot;&quot;='&quot;&quot;&amp;value&amp;&quot;&quot;'&quot;&quot;)),LAMBDA(acc,val,acc&amp;&quot;&quot; AND &quot;&quot;&amp;val))&amp;&quot;&quot;)&quot;&quot;)&quot;);2504928)" office:value-type="float" office:value="2504928" calcext:value-type="float">
            <text:p>2,504,928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E$2:E$6,$B$2:$B$6,LAMBDA(value,column,column&amp;&quot;&quot;='&quot;&quot;&amp;value&amp;&quot;&quot;'&quot;&quot;)),LAMBDA(acc,val,acc&amp;&quot;&quot; AND &quot;&quot;&amp;val))&amp;&quot;&quot;)&quot;&quot;)&quot;);22376976)" office:value-type="float" office:value="22376976" calcext:value-type="float">
            <text:p>22,376,97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F$2:F$6,$B$2:$B$6,LAMBDA(value,column,column&amp;&quot;&quot;='&quot;&quot;&amp;value&amp;&quot;&quot;'&quot;&quot;)),LAMBDA(acc,val,acc&amp;&quot;&quot; AND &quot;&quot;&amp;val))&amp;&quot;&quot;)&quot;&quot;)&quot;);22376592)" office:value-type="float" office:value="22376592" calcext:value-type="float">
            <text:p>22,376,5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G$2:G$6,$B$2:$B$6,LAMBDA(value,column,column&amp;&quot;&quot;='&quot;&quot;&amp;value&amp;&quot;&quot;'&quot;&quot;)),LAMBDA(acc,val,acc&amp;&quot;&quot; AND &quot;&quot;&amp;val))&amp;&quot;&quot;)&quot;&quot;)&quot;);22376976)" office:value-type="float" office:value="22376976" calcext:value-type="float">
            <text:p>22,376,976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H$2:H$6,$B$2:$B$6,LAMBDA(value,column,column&amp;&quot;&quot;='&quot;&quot;&amp;value&amp;&quot;&quot;'&quot;&quot;)),LAMBDA(acc,val,acc&amp;&quot;&quot; AND &quot;&quot;&amp;val))&amp;&quot;&quot;)&quot;&quot;)&quot;);22376592)" office:value-type="float" office:value="22376592" calcext:value-type="float">
            <text:p>22,376,5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I$2:I$6,$B$2:$B$6,LAMBDA(value,column,column&amp;&quot;&quot;='&quot;&quot;&amp;value&amp;&quot;&quot;'&quot;&quot;)),LAMBDA(acc,val,acc&amp;&quot;&quot; AND &quot;&quot;&amp;val))&amp;&quot;&quot;)&quot;&quot;)&quot;);2512352)" office:value-type="float" office:value="2512352" calcext:value-type="float">
            <text:p>2,512,35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J$2:J$6,$B$2:$B$6,LAMBDA(value,column,column&amp;&quot;&quot;='&quot;&quot;&amp;value&amp;&quot;&quot;'&quot;&quot;)),LAMBDA(acc,val,acc&amp;&quot;&quot; AND &quot;&quot;&amp;val))&amp;&quot;&quot;)&quot;&quot;)&quot;);2721392)" office:value-type="float" office:value="2721392" calcext:value-type="float">
            <text:p>2,721,3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K$2:K$6,$B$2:$B$6,LAMBDA(value,column,column&amp;&quot;&quot;='&quot;&quot;&amp;value&amp;&quot;&quot;'&quot;&quot;)),LAMBDA(acc,val,acc&amp;&quot;&quot; AND &quot;&quot;&amp;val))&amp;&quot;&quot;)&quot;&quot;)&quot;);2721392)" office:value-type="float" office:value="2721392" calcext:value-type="float">
            <text:p>2,721,39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L$2:L$6,$B$2:$B$6,LAMBDA(value,column,column&amp;&quot;&quot;='&quot;&quot;&amp;value&amp;&quot;&quot;'&quot;&quot;)),LAMBDA(acc,val,acc&amp;&quot;&quot; AND &quot;&quot;&amp;val))&amp;&quot;&quot;)&quot;&quot;)&quot;);2679552)" office:value-type="float" office:value="2679552" calcext:value-type="float">
            <text:p>2,679,55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M$2:M$6,$B$2:$B$6,LAMBDA(value,column,column&amp;&quot;&quot;='&quot;&quot;&amp;value&amp;&quot;&quot;'&quot;&quot;)),LAMBDA(acc,val,acc&amp;&quot;&quot; AND &quot;&quot;&amp;val))&amp;&quot;&quot;)&quot;&quot;)&quot;);2679552)" office:value-type="float" office:value="2679552" calcext:value-type="float">
            <text:p>2,679,552</text:p>
          </table:table-cell>
          <table:table-cell table:style-name="ce22" table:formula="of:=IFERROR(__xludf.dummyfunction(&quot;QUERY(INDIRECT($D$22),&quot;&quot;SELECT &quot;&quot;&amp;$D$24&amp;&quot;&quot; WHERE (&quot;&quot;&amp;REDUCE($B$7&amp;&quot;&quot;='&quot;&quot;&amp;$A16&amp;&quot;&quot;'&quot;&quot;,MAP(N$2:N$6,$B$2:$B$6,LAMBDA(value,column,column&amp;&quot;&quot;='&quot;&quot;&amp;value&amp;&quot;&quot;'&quot;&quot;)),LAMBDA(acc,val,acc&amp;&quot;&quot; AND &quot;&quot;&amp;val))&amp;&quot;&quot;)&quot;&quot;)&quot;);3158464)" office:value-type="float" office:value="3158464" calcext:value-type="float">
            <text:p>3,158,464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6&amp;&quot;&quot;'&quot;&quot;,MAP(O$2:O$6,$B$2:$B$6,LAMBDA(value,column,column&amp;&quot;&quot;='&quot;&quot;&amp;value&amp;&quot;&quot;'&quot;&quot;)),LAMBDA(acc,val,acc&amp;&quot;&quot; AND &quot;&quot;&amp;val))&amp;&quot;&quot;)&quot;&quot;)&quot;);2509)" office:value-type="float" office:value="2509" calcext:value-type="float">
            <text:p>2,509</text:p>
          </table:table-cell>
          <table:table-cell table:style-name="ce24" table:formula="of:=[.O16]*1000/[.M16]" office:value-type="float" office:value="0.93635055412248" calcext:value-type="float">
            <text:p>0.9364</text:p>
          </table:table-cell>
          <table:table-cell table:style-name="ce5" table:formula="of:=([.D16]-[.C16])/[.C16]" office:value-type="percentage" office:value="-0.0000127746550843127" calcext:value-type="percentage">
            <text:p>0.00%</text:p>
          </table:table-cell>
          <table:table-cell table:style-name="ce29" table:formula="of:=([.E16]-[.D16])/[.D16]" office:value-type="percentage" office:value="7.93318131299582" calcext:value-type="percentage">
            <text:p>793.32%</text:p>
          </table:table-cell>
          <table:table-cell table:style-name="ce34" table:formula="of:=([.F16]-[.E16])/[.E16]" office:value-type="percentage" office:value="-0.0000171604956809177" calcext:value-type="percentage">
            <text:p>0.00%</text:p>
          </table:table-cell>
          <table:table-cell table:style-name="ce5" table:formula="of:=([.G16]-[.D16])/[.D16]" office:value-type="percentage" office:value="7.93318131299582" calcext:value-type="percentage">
            <text:p>793.32%</text:p>
          </table:table-cell>
          <table:table-cell table:style-name="ce5" table:formula="of:=([.H16]-[.G16])/[.G16]" office:value-type="percentage" office:value="-0.0000171604956809177" calcext:value-type="percentage">
            <text:p>0.00%</text:p>
          </table:table-cell>
          <table:table-cell table:style-name="ce29" table:formula="of:=([.I16]-[.D16])/[.D16]" office:value-type="percentage" office:value="0.00296375784054472" calcext:value-type="percentage">
            <text:p>0.30%</text:p>
          </table:table-cell>
          <table:table-cell table:style-name="ce40" table:formula="of:=([.J16]-[.I16])/[.I16]" office:value-type="percentage" office:value="0.0832049012240323" calcext:value-type="percentage">
            <text:p>8.32%</text:p>
          </table:table-cell>
          <table:table-cell table:style-name="ce34" table:formula="of:=([.K16]-[.J16])/[.J16]" office:value-type="percentage" office:value="0" calcext:value-type="percentage">
            <text:p>0.00%</text:p>
          </table:table-cell>
          <table:table-cell table:style-name="ce5" table:formula="of:=([.L16]-[.I16])/[.I16]" office:value-type="percentage" office:value="0.0665511839105348" calcext:value-type="percentage">
            <text:p>6.66%</text:p>
          </table:table-cell>
          <table:table-cell table:style-name="ce5" table:formula="of:=([.M16]-[.I16])/[.I16]" office:value-type="percentage" office:value="0.0665511839105348" calcext:value-type="percentage">
            <text:p>6.66%</text:p>
          </table:table-cell>
          <table:table-cell table:style-name="ce45" table:formula="of:=([.N16]-[.M16])/[.M16]" office:value-type="percentage" office:value="0.178728384446355" calcext:value-type="percentage">
            <text:p>17.87%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C$2:C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D$2:D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E$2:E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F$2:F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G$2:G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H$2:H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I$2:I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J$2:J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K$2:K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L$2:L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M$2:M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7&amp;&quot;&quot;'&quot;&quot;,MAP(N$2:N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7&amp;&quot;&quot;'&quot;&quot;,MAP(O$2:O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4" table:formula="of:=[.O17]*1000/[.M17]" office:value-type="string" office:string-value="" calcext:value-type="error">
            <text:p>#VALUE!</text:p>
          </table:table-cell>
          <table:table-cell table:style-name="ce5" table:formula="of:=([.D17]-[.C17])/[.C17]" office:value-type="string" office:string-value="" calcext:value-type="error">
            <text:p>#VALUE!</text:p>
          </table:table-cell>
          <table:table-cell table:style-name="ce29" table:formula="of:=([.E17]-[.D17])/[.D17]" office:value-type="string" office:string-value="" calcext:value-type="error">
            <text:p>#VALUE!</text:p>
          </table:table-cell>
          <table:table-cell table:style-name="ce34" table:formula="of:=([.F17]-[.E17])/[.E17]" office:value-type="string" office:string-value="" calcext:value-type="error">
            <text:p>#VALUE!</text:p>
          </table:table-cell>
          <table:table-cell table:style-name="ce5" table:formula="of:=([.G17]-[.D17])/[.D17]" office:value-type="string" office:string-value="" calcext:value-type="error">
            <text:p>#VALUE!</text:p>
          </table:table-cell>
          <table:table-cell table:style-name="ce5" table:formula="of:=([.H17]-[.G17])/[.G17]" office:value-type="string" office:string-value="" calcext:value-type="error">
            <text:p>#VALUE!</text:p>
          </table:table-cell>
          <table:table-cell table:style-name="ce29" table:formula="of:=([.I17]-[.D17])/[.D17]" office:value-type="string" office:string-value="" calcext:value-type="error">
            <text:p>#VALUE!</text:p>
          </table:table-cell>
          <table:table-cell table:style-name="ce40" table:formula="of:=([.J17]-[.I17])/[.I17]" office:value-type="string" office:string-value="" calcext:value-type="error">
            <text:p>#VALUE!</text:p>
          </table:table-cell>
          <table:table-cell table:style-name="ce34" table:formula="of:=([.K17]-[.J17])/[.J17]" office:value-type="string" office:string-value="" calcext:value-type="error">
            <text:p>#VALUE!</text:p>
          </table:table-cell>
          <table:table-cell table:style-name="ce5" table:formula="of:=([.L17]-[.I17])/[.I17]" office:value-type="string" office:string-value="" calcext:value-type="error">
            <text:p>#VALUE!</text:p>
          </table:table-cell>
          <table:table-cell table:style-name="ce5" table:formula="of:=([.M17]-[.I17])/[.I17]" office:value-type="string" office:string-value="" calcext:value-type="error">
            <text:p>#VALUE!</text:p>
          </table:table-cell>
          <table:table-cell table:style-name="ce45" table:formula="of:=([.N17]-[.M17])/[.M17]" office:value-type="string" office:string-value="" calcext:value-type="error">
            <text:p>#VALUE!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10"/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C$2:C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D$2:D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E$2:E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F$2:F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G$2:G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H$2:H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I$2:I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J$2:J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K$2:K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L$2:L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M$2:M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46" table:formula="of:=IFERROR(__xludf.dummyfunction(&quot;QUERY(INDIRECT($D$22),&quot;&quot;SELECT &quot;&quot;&amp;$D$24&amp;&quot;&quot; WHERE (&quot;&quot;&amp;REDUCE($B$7&amp;&quot;&quot;='&quot;&quot;&amp;$A18&amp;&quot;&quot;'&quot;&quot;,MAP(N$2:N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2" table:formula="of:=IFERROR(__xludf.dummyfunction(&quot;QUERY(INDIRECT($D$22),&quot;&quot;SELECT &quot;&quot;&amp;$D$25&amp;&quot;&quot; WHERE (&quot;&quot;&amp;REDUCE($B$7&amp;&quot;&quot;='&quot;&quot;&amp;$A18&amp;&quot;&quot;'&quot;&quot;,MAP(O$2:O$6,$B$2:$B$6,LAMBDA(value,column,column&amp;&quot;&quot;='&quot;&quot;&amp;value&amp;&quot;&quot;'&quot;&quot;)),LAMBDA(acc,val,acc&amp;&quot;&quot; AND &quot;&quot;&amp;val))&amp;&quot;&quot;)&quot;&quot;)&quot;);&quot;#N/A&quot;)" office:value-type="string" office:string-value="#N/A" calcext:value-type="string">
            <text:p>#N/A</text:p>
          </table:table-cell>
          <table:table-cell table:style-name="ce24" table:formula="of:=[.O18]*1000/[.M18]" office:value-type="string" office:string-value="" calcext:value-type="error">
            <text:p>#VALUE!</text:p>
          </table:table-cell>
          <table:table-cell table:style-name="ce5" table:formula="of:=([.D18]-[.C18])/[.C18]" office:value-type="string" office:string-value="" calcext:value-type="error">
            <text:p>#VALUE!</text:p>
          </table:table-cell>
          <table:table-cell table:style-name="ce29" table:formula="of:=([.E18]-[.D18])/[.D18]" office:value-type="string" office:string-value="" calcext:value-type="error">
            <text:p>#VALUE!</text:p>
          </table:table-cell>
          <table:table-cell table:style-name="ce34" table:formula="of:=([.F18]-[.E18])/[.E18]" office:value-type="string" office:string-value="" calcext:value-type="error">
            <text:p>#VALUE!</text:p>
          </table:table-cell>
          <table:table-cell table:style-name="ce5" table:formula="of:=([.G18]-[.D18])/[.D18]" office:value-type="string" office:string-value="" calcext:value-type="error">
            <text:p>#VALUE!</text:p>
          </table:table-cell>
          <table:table-cell table:style-name="ce5" table:formula="of:=([.H18]-[.G18])/[.G18]" office:value-type="string" office:string-value="" calcext:value-type="error">
            <text:p>#VALUE!</text:p>
          </table:table-cell>
          <table:table-cell table:style-name="ce29" table:formula="of:=([.I18]-[.D18])/[.D18]" office:value-type="string" office:string-value="" calcext:value-type="error">
            <text:p>#VALUE!</text:p>
          </table:table-cell>
          <table:table-cell table:style-name="ce40" table:formula="of:=([.J18]-[.I18])/[.I18]" office:value-type="string" office:string-value="" calcext:value-type="error">
            <text:p>#VALUE!</text:p>
          </table:table-cell>
          <table:table-cell table:style-name="ce34" table:formula="of:=([.K18]-[.J18])/[.J18]" office:value-type="string" office:string-value="" calcext:value-type="error">
            <text:p>#VALUE!</text:p>
          </table:table-cell>
          <table:table-cell table:style-name="ce5" table:formula="of:=([.L18]-[.I18])/[.I18]" office:value-type="string" office:string-value="" calcext:value-type="error">
            <text:p>#VALUE!</text:p>
          </table:table-cell>
          <table:table-cell table:style-name="ce5" table:formula="of:=([.M18]-[.I18])/[.I18]" office:value-type="string" office:string-value="" calcext:value-type="error">
            <text:p>#VALUE!</text:p>
          </table:table-cell>
          <table:table-cell table:style-name="ce45" table:formula="of:=([.N18]-[.M18])/[.M18]" office:value-type="string" office:string-value="" calcext:value-type="error">
            <text:p>#VALUE!</text:p>
          </table:table-cell>
          <table:table-cell table:number-columns-repeated="997"/>
        </table:table-row>
        <table:table-row table:style-name="ro1">
          <table:table-cell/>
          <table:table-cell table:style-name="ce8" table:number-columns-repeated="14"/>
          <table:table-cell table:style-name="ce2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Config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Data range</text:p>
          </table:table-cell>
          <table:table-cell table:style-name="ce17" office:value-type="string" calcext:value-type="string">
            <text:p>Data!A2:O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14" office:value-type="string" calcext:value-type="string">
            <text:p>Benchmarks column</text:p>
          </table:table-cell>
          <table:table-cell table:style-name="ce18" office:value-type="string" calcext:value-type="string">
            <text:p>Data!D2:D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Data column</text:p>
          </table:table-cell>
          <table:table-cell table:style-name="ce19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gures" table:style-name="ta9">
        <table:table-column table:style-name="co33" table:default-cell-style-name="Default"/>
        <table:table-column table:style-name="co15" table:number-columns-repeated="1023" table:default-cell-style-name="Default"/>
        <table:table-row table:style-name="ro1">
          <table:table-cell table:style-name="ce1" office:value-type="string" calcext:value-type="string">
            <text:p>Stack Revocation Overhead</text:p>
          </table:table-cell>
          <table:table-cell table:style-name="ce1" office:value-type="string" calcext:value-type="string">
            <text:p>Gem5 Cycles</text:p>
          </table:table-cell>
          <table:table-cell table:style-name="ce1" office:value-type="string" calcext:value-type="string">
            <text:p>Instructions</text:p>
          </table:table-cell>
          <table:table-cell table:number-columns-repeated="1021"/>
        </table:table-row>
        <table:table-row table:style-name="ro1">
          <table:table-cell table:style-name="ce4" table:number-matrix-columns-spanned="1" table:number-matrix-rows-spanned="4" table:formula="of:=[$'Gem5 cycles'.$A$8:.$A$11]" office:value-type="string" office:string-value="coremark" calcext:value-type="string">
            <text:p>coremark</text:p>
          </table:table-cell>
          <table:table-cell table:style-name="ce5" table:number-matrix-columns-spanned="1" table:number-matrix-rows-spanned="4" table:formula="of:=[$'Gem5 cycles'.Q8:.Q11]" office:value-type="percentage" office:value="-0.00131186502401716" calcext:value-type="percentage">
            <text:p>-0.13%</text:p>
          </table:table-cell>
          <table:table-cell table:style-name="ce4" table:number-matrix-columns-spanned="1" table:number-matrix-rows-spanned="1" table:formula="of:=[$Instructions.L5:.L8]" office:value-type="string" office:string-value="noclear" calcext:value-type="string">
            <text:p>noclear</text:p>
          </table:table-cell>
          <table:table-cell table:number-columns-repeated="1021"/>
        </table:table-row>
        <table:table-row table:style-name="ro1">
          <table:table-cell table:style-name="ce4" office:value-type="string" office:string-value="libc-bench_malloc" calcext:value-type="string">
            <text:p>libc-bench_malloc</text:p>
          </table:table-cell>
          <table:table-cell table:style-name="ce5" office:value-type="percentage" office:value="0.079953106393017" calcext:value-type="percentage">
            <text:p>8.00%</text:p>
          </table:table-cell>
          <table:table-cell table:number-columns-repeated="5"/>
          <table:table-cell>
            <draw:frame table:end-cell-address="Figures.M18" table:end-x="64.74pt" table:end-y="8.99pt" draw:z-index="0" draw:name="Chart 2" draw:style-name="gr1" draw:text-style-name="P1" svg:width="405.72pt" svg:height="245.23pt" svg:x="9.75pt" svg:y="0pt">
              <draw:object draw:notify-on-update-of-ranges="Figures.A2:Figures.A7 Figures.B1:Figures.B1 Figures.B2:Figures.B7 Figures.C1:Figures.C1 Figures.C2:Figures.C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4" office:value-type="string" office:string-value="libc-bench_string" calcext:value-type="string">
            <text:p>libc-bench_string</text:p>
          </table:table-cell>
          <table:table-cell table:style-name="ce5" office:value-type="percentage" office:value="0.0387910686988185" calcext:value-type="percentage">
            <text:p>3.88%</text:p>
          </table:table-cell>
          <table:table-cell table:number-columns-repeated="1022"/>
        </table:table-row>
        <table:table-row table:style-name="ro1">
          <table:table-cell table:style-name="ce4" office:value-type="string" office:string-value="libc-bench_regex" calcext:value-type="string">
            <text:p>libc-bench_regex</text:p>
          </table:table-cell>
          <table:table-cell table:style-name="ce5" office:value-type="percentage" office:value="0.141069058145976" calcext:value-type="percentage">
            <text:p>14.11%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Encapsulation Overhead Per Call</text:p>
          </table:table-cell>
          <table:table-cell table:style-name="ce1" office:value-type="string" calcext:value-type="string">
            <text:p>Gem5 Cycles</text:p>
          </table:table-cell>
          <table:table-cell/>
          <table:table-cell table:style-name="ce1" office:value-type="string" calcext:value-type="string">
            <text:p>Instructions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Indirect Sentry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Indirect Sentry</text:p>
          </table:table-cell>
          <table:table-cell table:number-columns-repeated="1019"/>
        </table:table-row>
        <table:table-row table:style-name="ro1">
          <table:table-cell table:style-name="ce4" table:number-matrix-columns-spanned="1" table:number-matrix-rows-spanned="4" table:formula="of:=[$'Gem5 cycles'.$A$8:.$A$11]" office:value-type="string" office:string-value="coremark" calcext:value-type="string">
            <text:p>coremark</text:p>
          </table:table-cell>
          <table:table-cell table:style-name="ce5" table:number-matrix-columns-spanned="1" table:number-matrix-rows-spanned="4" table:formula="of:=[$'Gem5 cycles'.$S8:.$S11]" office:value-type="percentage" office:value="-0.00388748565244574" calcext:value-type="percentage">
            <text:p>-0.39%</text:p>
          </table:table-cell>
          <table:table-cell table:style-name="ce5" table:number-matrix-columns-spanned="1" table:number-matrix-rows-spanned="4" table:formula="of:=[$'Gem5 cycles'.$U8:.$U11]" office:value-type="percentage" office:value="-0.0120514712964205" calcext:value-type="percentage">
            <text:p>-1.21%</text:p>
          </table:table-cell>
          <table:table-cell table:style-name="ce4" table:number-matrix-columns-spanned="1" table:number-matrix-rows-spanned="1" table:formula="of:=[$Instructions.$N5:.$N8]" office:value-type="string" office:string-value="clear" calcext:value-type="string">
            <text:p>clear</text:p>
          </table:table-cell>
          <table:table-cell table:style-name="ce4" table:number-matrix-columns-spanned="1" table:number-matrix-rows-spanned="1" table:formula="of:=[$Instructions.$P5:.$P8]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4" office:value-type="string" office:string-value="libc-bench_malloc" calcext:value-type="string">
            <text:p>libc-bench_malloc</text:p>
          </table:table-cell>
          <table:table-cell table:style-name="ce5" office:value-type="percentage" office:value="-0.00549800792196247" calcext:value-type="percentage">
            <text:p>-0.55%</text:p>
          </table:table-cell>
          <table:table-cell table:style-name="ce5" office:value-type="percentage" office:value="-0.00380062029779412" calcext:value-type="percentage">
            <text:p>-0.38%</text:p>
          </table:table-cell>
          <table:table-cell table:number-columns-repeated="1021"/>
        </table:table-row>
        <table:table-row table:style-name="ro1">
          <table:table-cell table:style-name="ce4" office:value-type="string" office:string-value="libc-bench_string" calcext:value-type="string">
            <text:p>libc-bench_string</text:p>
          </table:table-cell>
          <table:table-cell table:style-name="ce5" office:value-type="percentage" office:value="-0.0396017942749047" calcext:value-type="percentage">
            <text:p>-3.96%</text:p>
          </table:table-cell>
          <table:table-cell table:style-name="ce5" office:value-type="percentage" office:value="-0.0217058412770497" calcext:value-type="percentage">
            <text:p>-2.17%</text:p>
          </table:table-cell>
          <table:table-cell table:number-columns-repeated="1021"/>
        </table:table-row>
        <table:table-row table:style-name="ro1">
          <table:table-cell table:style-name="ce4" office:value-type="string" office:string-value="libc-bench_regex" calcext:value-type="string">
            <text:p>libc-bench_regex</text:p>
          </table:table-cell>
          <table:table-cell table:style-name="ce5" office:value-type="percentage" office:value="0.000315323674471305" calcext:value-type="percentage">
            <text:p>0.03%</text:p>
          </table:table-cell>
          <table:table-cell table:style-name="ce5" office:value-type="percentage" office:value="0.00296913011287227" calcext:value-type="percentage">
            <text:p>0.30%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7"/>
          <table:table-cell>
            <draw:frame table:end-cell-address="Figures.N37" table:end-x="38.83pt" table:end-y="7.48pt" draw:z-index="1" draw:name="Chart 3" draw:style-name="gr1" draw:text-style-name="P1" svg:width="449.97pt" svg:height="278.22pt" svg:x="9.75pt" svg:y="12.76pt">
              <draw:object draw:notify-on-update-of-ranges="Figures.A11:Figures.A15 Figures.B9:Figures.B10 Figures.B11:Figures.B15 Figures.C9:Figures.C10 Figures.C11:Figures.C15 Figures.D9:Figures.D10 Figures.D11:Figures.D15 Figures.E9:Figures.E10 Figures.E11:Figures.E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e size table" table:style-name="ta10">
        <table:table-column table:style-name="co15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Uninitialized stack</text:p>
          </table:table-cell>
          <table:table-cell table:style-name="ce1" office:value-type="string" calcext:value-type="string">
            <text:p>Trampoline</text:p>
          </table:table-cell>
          <table:table-cell table:style-name="ce1" office:value-type="string" calcext:value-type="string">
            <text:p>Indirect Sentr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5" table:formula="of:=[$'Code size data'.H3]" office:value-type="percentage" office:value="0" calcext:value-type="percentage">
            <text:p>0.00%</text:p>
          </table:table-cell>
          <table:table-cell table:style-name="ce5" table:formula="of:=[$'Code size data'.H5]" office:value-type="percentage" office:value="0" calcext:value-type="percentage">
            <text:p>0.00%</text:p>
          </table:table-cell>
          <table:table-cell table:style-name="ce5" table:formula="of:=[$'Code size data'.H7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bc-bench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AVERAGE([.B2:.B3])" office:value-type="string" office:string-value="" calcext:value-type="error">
            <text:p>#REF!</text:p>
          </table:table-cell>
          <table:table-cell table:style-name="ce4" table:formula="of:=AVERAGE([.C2:.C3])" office:value-type="string" office:string-value="" calcext:value-type="error">
            <text:p>#REF!</text:p>
          </table:table-cell>
          <table:table-cell table:style-name="ce4" table:formula="of:=AVERAGE([.D2:.D3]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ycles export" table:style-name="ta11">
        <table:table-column table:style-name="co34" table:default-cell-style-name="Default"/>
        <table:table-column table:style-name="co15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encap</text:p>
          </table:table-cell>
          <table:table-cell table:style-name="ce1" office:value-type="string" calcext:value-type="string">
            <text:p>revoc_ovh</text:p>
          </table:table-cell>
          <table:table-cell table:style-name="ce1" office:value-type="string" calcext:value-type="string">
            <text:p>clear_ovh</text:p>
          </table:table-cell>
          <table:table-cell table:style-name="ce1" office:value-type="string" calcext:value-type="string">
            <text:p>encap_ov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2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];[$'Gem5 cycles'.A$8:.A$16];[$'Gem5 cycles'.S$8:.S$16])-xlookup([.A2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3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];[$'Gem5 cycles'.A$8:.A$16];[$'Gem5 cycles'.U$8:.U$16])-xlookup([.A3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4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];[$'Gem5 cycles'.A$8:.A$16];[$'Gem5 cycles'.Z$8:.Z$16])-xlookup([.A4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5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5];[$'Gem5 cycles'.A$8:.A$16];[$'Gem5 cycles'.AC$8:.AC$16])-xlookup([.A5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5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6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6];[$'Gem5 cycles'.A$8:.A$16];[$'Gem5 cycles'.S$8:.S$16])-xlookup([.A6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6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7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7];[$'Gem5 cycles'.A$8:.A$16];[$'Gem5 cycles'.U$8:.U$16])-xlookup([.A7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7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8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8];[$'Gem5 cycles'.A$8:.A$16];[$'Gem5 cycles'.Z$8:.Z$16])-xlookup([.A8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8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9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9];[$'Gem5 cycles'.A$8:.A$16];[$'Gem5 cycles'.AC$8:.AC$16])-xlookup([.A9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9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10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0];[$'Gem5 cycles'.A$8:.A$16];[$'Gem5 cycles'.S$8:.S$16])-xlookup([.A10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0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11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1];[$'Gem5 cycles'.A$8:.A$16];[$'Gem5 cycles'.U$8:.U$16])-xlookup([.A11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1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12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2];[$'Gem5 cycles'.A$8:.A$16];[$'Gem5 cycles'.Z$8:.Z$16])-xlookup([.A12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2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13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3];[$'Gem5 cycles'.A$8:.A$16];[$'Gem5 cycles'.AC$8:.AC$16])-xlookup([.A13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3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14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4];[$'Gem5 cycles'.A$8:.A$16];[$'Gem5 cycles'.S$8:.S$16])-xlookup([.A14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4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15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5];[$'Gem5 cycles'.A$8:.A$16];[$'Gem5 cycles'.U$8:.U$16])-xlookup([.A15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5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16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6];[$'Gem5 cycles'.A$8:.A$16];[$'Gem5 cycles'.Z$8:.Z$16])-xlookup([.A16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6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17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7];[$'Gem5 cycles'.A$8:.A$16];[$'Gem5 cycles'.AC$8:.AC$16])-xlookup([.A17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7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01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18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8];[$'Gem5 cycles'.A$8:.A$16];[$'Gem5 cycles'.S$8:.S$16])-xlookup([.A18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8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01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19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9];[$'Gem5 cycles'.A$8:.A$16];[$'Gem5 cycles'.U$8:.U$16])-xlookup([.A19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19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01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20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0];[$'Gem5 cycles'.A$8:.A$16];[$'Gem5 cycles'.Z$8:.Z$16])-xlookup([.A20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0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01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21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1];[$'Gem5 cycles'.A$8:.A$16];[$'Gem5 cycles'.AC$8:.AC$16])-xlookup([.A21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1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1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22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2];[$'Gem5 cycles'.A$8:.A$16];[$'Gem5 cycles'.S$8:.S$16])-xlookup([.A22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2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1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23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3];[$'Gem5 cycles'.A$8:.A$16];[$'Gem5 cycles'.U$8:.U$16])-xlookup([.A23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3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1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24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4];[$'Gem5 cycles'.A$8:.A$16];[$'Gem5 cycles'.Z$8:.Z$16])-xlookup([.A24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4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1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25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5];[$'Gem5 cycles'.A$8:.A$16];[$'Gem5 cycles'.AC$8:.AC$16])-xlookup([.A25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5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2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26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6];[$'Gem5 cycles'.A$8:.A$16];[$'Gem5 cycles'.S$8:.S$16])-xlookup([.A26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6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2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27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7];[$'Gem5 cycles'.A$8:.A$16];[$'Gem5 cycles'.U$8:.U$16])-xlookup([.A27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7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2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28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8];[$'Gem5 cycles'.A$8:.A$16];[$'Gem5 cycles'.Z$8:.Z$16])-xlookup([.A28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8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2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29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9];[$'Gem5 cycles'.A$8:.A$16];[$'Gem5 cycles'.AC$8:.AC$16])-xlookup([.A29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29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5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30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0];[$'Gem5 cycles'.A$8:.A$16];[$'Gem5 cycles'.S$8:.S$16])-xlookup([.A30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0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5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31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1];[$'Gem5 cycles'.A$8:.A$16];[$'Gem5 cycles'.U$8:.U$16])-xlookup([.A31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1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5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32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2];[$'Gem5 cycles'.A$8:.A$16];[$'Gem5 cycles'.Z$8:.Z$16])-xlookup([.A32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2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5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33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3];[$'Gem5 cycles'.A$8:.A$16];[$'Gem5 cycles'.AC$8:.AC$16])-xlookup([.A33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3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8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34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4];[$'Gem5 cycles'.A$8:.A$16];[$'Gem5 cycles'.S$8:.S$16])-xlookup([.A34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4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8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35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5];[$'Gem5 cycles'.A$8:.A$16];[$'Gem5 cycles'.U$8:.U$16])-xlookup([.A35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5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8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36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6];[$'Gem5 cycles'.A$8:.A$16];[$'Gem5 cycles'.Z$8:.Z$16])-xlookup([.A36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6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8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37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7];[$'Gem5 cycles'.A$8:.A$16];[$'Gem5 cycles'.AC$8:.AC$16])-xlookup([.A37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7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9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38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8];[$'Gem5 cycles'.A$8:.A$16];[$'Gem5 cycles'.S$8:.S$16])-xlookup([.A38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8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9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39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9];[$'Gem5 cycles'.A$8:.A$16];[$'Gem5 cycles'.U$8:.U$16])-xlookup([.A39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39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9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40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0];[$'Gem5 cycles'.A$8:.A$16];[$'Gem5 cycles'.Z$8:.Z$16])-xlookup([.A40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0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9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41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1];[$'Gem5 cycles'.A$8:.A$16];[$'Gem5 cycles'.AC$8:.AC$16])-xlookup([.A41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1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99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42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2];[$'Gem5 cycles'.A$8:.A$16];[$'Gem5 cycles'.S$8:.S$16])-xlookup([.A42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2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99</text:p>
          </table:table-cell>
          <table:table-cell table:style-name="ce1" office:value-type="string" calcext:value-type="string">
            <text:p>uninit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43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3];[$'Gem5 cycles'.A$8:.A$16];[$'Gem5 cycles'.U$8:.U$16])-xlookup([.A43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3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99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trampoline</text:p>
          </table:table-cell>
          <table:table-cell table:style-name="ce48" table:number-matrix-columns-spanned="1" table:number-matrix-rows-spanned="1" table:formula="of:=xlookup([.A44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4];[$'Gem5 cycles'.A$8:.A$16];[$'Gem5 cycles'.Z$8:.Z$16])-xlookup([.A44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4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ndom-callstack-ubench_0.99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48" table:number-matrix-columns-spanned="1" table:number-matrix-rows-spanned="1" table:formula="of:=xlookup([.A45];[$'Gem5 cycles'.A$8:.A$16];[$'Gem5 cycles'.Q$8:.Q$16]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5];[$'Gem5 cycles'.A$8:.A$16];[$'Gem5 cycles'.AC$8:.AC$16])-xlookup([.A45];[$'Gem5 cycles'.A$8:.A$16];#REF!)" office:value-type="string" office:string-value="" calcext:value-type="error">
            <text:p>#NAME?</text:p>
          </table:table-cell>
          <table:table-cell table:style-name="ce48" table:number-matrix-columns-spanned="1" table:number-matrix-rows-spanned="1" table:formula="of:=xlookup([.A45];[$'Gem5 cycles'.A$8:.A$16];#REF!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ycles ideal" table:style-name="ta12">
        <table:table-column table:style-name="co34" table:default-cell-style-name="Default"/>
        <table:table-column table:style-name="co15" table:number-columns-repeated="1023" table:default-cell-style-name="Default"/>
        <table:table-row table:style-name="ro1">
          <table:table-cell table:style-name="ce1" office:value-type="string" calcext:value-type="string">
            <text:p>benchmark_key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encap</text:p>
          </table:table-cell>
          <table:table-cell table:style-name="ce1" office:value-type="string" calcext:value-type="string">
            <text:p>Stack Revocation</text:p>
          </table:table-cell>
          <table:table-cell table:style-name="ce1" office:value-type="string" calcext:value-type="string">
            <text:p>Reserve Stack</text:p>
          </table:table-cell>
          <table:table-cell table:style-name="ce1" office:value-type="string" calcext:value-type="string">
            <text:p>Encapsulation</text:p>
          </table:table-cell>
          <table:table-cell table:style-name="ce1" office:value-type="string" calcext:value-type="string">
            <text:p>Register Cleari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8:A16</text:p>
          </table:table-cell>
          <table:table-cell table:style-name="ce1" table:number-columns-repeated="3"/>
          <table:table-cell table:style-name="ce1" office:value-type="string" calcext:value-type="string">
            <text:p>Q8:Q16</text:p>
          </table:table-cell>
          <table:table-cell table:style-name="ce1" office:value-type="string" calcext:value-type="string">
            <text:p>V8:V16</text:p>
          </table:table-cell>
          <table:table-cell table:style-name="ce1" office:value-type="string" calcext:value-type="string">
            <text:p>Y8:Y16</text:p>
          </table:table-cell>
          <table:table-cell table:style-name="ce1" office:value-type="string" calcext:value-type="string">
            <text:p>Z8:Z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" table:formula="of:=xlookup([.$A3];INDIRECT([.$N$3]&amp;&quot;!&quot;&amp;[.$A$2]);INDIRECT([.$N$3]&amp;&quot;!&quot;&amp;[.E$2]))" office:value-type="string" office:string-value="" calcext:value-type="error">
            <text:p>#REF!</text:p>
          </table:table-cell>
          <table:table-cell table:style-name="ce5" table:formula="of:=xlookup([.$A3];INDIRECT([.$N$3]&amp;&quot;!&quot;&amp;[.$A$2]);INDIRECT([.$N$3]&amp;&quot;!&quot;&amp;[.F$2]))" office:value-type="string" office:string-value="" calcext:value-type="error">
            <text:p>#REF!</text:p>
          </table:table-cell>
          <table:table-cell table:style-name="ce5" table:formula="of:=xlookup([.$A3];INDIRECT([.$N$3]&amp;&quot;!&quot;&amp;[.$A$2]);INDIRECT([.$N$3]&amp;&quot;!&quot;&amp;[.G$2]))" office:value-type="string" office:string-value="" calcext:value-type="error">
            <text:p>#REF!</text:p>
          </table:table-cell>
          <table:table-cell table:style-name="ce5" table:formula="of:=xlookup([.$A3];INDIRECT([.$N$3]&amp;&quot;!&quot;&amp;[.$A$2]);INDIRECT([.$N$3]&amp;&quot;!&quot;&amp;[.H$2]))" office:value-type="string" office:string-value="" calcext:value-type="error">
            <text:p>#REF!</text:p>
          </table:table-cell>
          <table:table-cell table:number-columns-repeated="4"/>
          <table:table-cell table:style-name="ce49" office:value-type="string" calcext:value-type="string">
            <text:p>Sheet</text:p>
          </table:table-cell>
          <table:table-cell table:style-name="ce50" office:value-type="string" calcext:value-type="string">
            <text:p>Gem5 cycles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Libc-bench Malloc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" table:formula="of:=xlookup([.$A4];INDIRECT([.$N$3]&amp;&quot;!&quot;&amp;[.$A$2]);INDIRECT([.$N$3]&amp;&quot;!&quot;&amp;[.E$2]))" office:value-type="string" office:string-value="" calcext:value-type="error">
            <text:p>#REF!</text:p>
          </table:table-cell>
          <table:table-cell table:style-name="ce5" table:formula="of:=xlookup([.$A4];INDIRECT([.$N$3]&amp;&quot;!&quot;&amp;[.$A$2]);INDIRECT([.$N$3]&amp;&quot;!&quot;&amp;[.F$2]))" office:value-type="string" office:string-value="" calcext:value-type="error">
            <text:p>#REF!</text:p>
          </table:table-cell>
          <table:table-cell table:style-name="ce5" table:formula="of:=xlookup([.$A4];INDIRECT([.$N$3]&amp;&quot;!&quot;&amp;[.$A$2]);INDIRECT([.$N$3]&amp;&quot;!&quot;&amp;[.G$2]))" office:value-type="string" office:string-value="" calcext:value-type="error">
            <text:p>#REF!</text:p>
          </table:table-cell>
          <table:table-cell table:style-name="ce5" table:formula="of:=xlookup([.$A4];INDIRECT([.$N$3]&amp;&quot;!&quot;&amp;[.$A$2]);INDIRECT([.$N$3]&amp;&quot;!&quot;&amp;[.H$2])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Libc-bench String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" table:formula="of:=xlookup([.$A5];INDIRECT([.$N$3]&amp;&quot;!&quot;&amp;[.$A$2]);INDIRECT([.$N$3]&amp;&quot;!&quot;&amp;[.E$2]))" office:value-type="string" office:string-value="" calcext:value-type="error">
            <text:p>#REF!</text:p>
          </table:table-cell>
          <table:table-cell table:style-name="ce5" table:formula="of:=xlookup([.$A5];INDIRECT([.$N$3]&amp;&quot;!&quot;&amp;[.$A$2]);INDIRECT([.$N$3]&amp;&quot;!&quot;&amp;[.F$2]))" office:value-type="string" office:string-value="" calcext:value-type="error">
            <text:p>#REF!</text:p>
          </table:table-cell>
          <table:table-cell table:style-name="ce5" table:formula="of:=xlookup([.$A5];INDIRECT([.$N$3]&amp;&quot;!&quot;&amp;[.$A$2]);INDIRECT([.$N$3]&amp;&quot;!&quot;&amp;[.G$2]))" office:value-type="string" office:string-value="" calcext:value-type="error">
            <text:p>#REF!</text:p>
          </table:table-cell>
          <table:table-cell table:style-name="ce5" table:formula="of:=xlookup([.$A5];INDIRECT([.$N$3]&amp;&quot;!&quot;&amp;[.$A$2]);INDIRECT([.$N$3]&amp;&quot;!&quot;&amp;[.H$2])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Libc-bench Regex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" table:formula="of:=xlookup([.$A6];INDIRECT([.$N$3]&amp;&quot;!&quot;&amp;[.$A$2]);INDIRECT([.$N$3]&amp;&quot;!&quot;&amp;[.E$2]))" office:value-type="string" office:string-value="" calcext:value-type="error">
            <text:p>#REF!</text:p>
          </table:table-cell>
          <table:table-cell table:style-name="ce5" table:formula="of:=xlookup([.$A6];INDIRECT([.$N$3]&amp;&quot;!&quot;&amp;[.$A$2]);INDIRECT([.$N$3]&amp;&quot;!&quot;&amp;[.F$2]))" office:value-type="string" office:string-value="" calcext:value-type="error">
            <text:p>#REF!</text:p>
          </table:table-cell>
          <table:table-cell table:style-name="ce5" table:formula="of:=xlookup([.$A6];INDIRECT([.$N$3]&amp;&quot;!&quot;&amp;[.$A$2]);INDIRECT([.$N$3]&amp;&quot;!&quot;&amp;[.G$2]))" office:value-type="string" office:string-value="" calcext:value-type="error">
            <text:p>#REF!</text:p>
          </table:table-cell>
          <table:table-cell table:style-name="ce5" table:formula="of:=xlookup([.$A6];INDIRECT([.$N$3]&amp;&quot;!&quot;&amp;[.$A$2]);INDIRECT([.$N$3]&amp;&quot;!&quot;&amp;[.H$2])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ndom-callstack-ubench-0.1</text:p>
          </table:table-cell>
          <table:table-cell table:style-name="ce1" office:value-type="string" calcext:value-type="string">
            <text:p>μbench 1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" table:formula="of:=xlookup([.$A7];INDIRECT([.$N$3]&amp;&quot;!&quot;&amp;[.$A$2]);INDIRECT([.$N$3]&amp;&quot;!&quot;&amp;[.E$2]))" office:value-type="string" office:string-value="" calcext:value-type="error">
            <text:p>#REF!</text:p>
          </table:table-cell>
          <table:table-cell table:style-name="ce5" table:formula="of:=xlookup([.$A7];INDIRECT([.$N$3]&amp;&quot;!&quot;&amp;[.$A$2]);INDIRECT([.$N$3]&amp;&quot;!&quot;&amp;[.F$2]))" office:value-type="string" office:string-value="" calcext:value-type="error">
            <text:p>#REF!</text:p>
          </table:table-cell>
          <table:table-cell table:style-name="ce5" table:formula="of:=xlookup([.$A7];INDIRECT([.$N$3]&amp;&quot;!&quot;&amp;[.$A$2]);INDIRECT([.$N$3]&amp;&quot;!&quot;&amp;[.G$2]))" office:value-type="string" office:string-value="" calcext:value-type="error">
            <text:p>#REF!</text:p>
          </table:table-cell>
          <table:table-cell table:style-name="ce5" table:formula="of:=xlookup([.$A7];INDIRECT([.$N$3]&amp;&quot;!&quot;&amp;[.$A$2]);INDIRECT([.$N$3]&amp;&quot;!&quot;&amp;[.H$2])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ndom-callstack-ubench-0.5</text:p>
          </table:table-cell>
          <table:table-cell table:style-name="ce1" office:value-type="string" calcext:value-type="string">
            <text:p>μbench 5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" table:formula="of:=xlookup([.$A8];INDIRECT([.$N$3]&amp;&quot;!&quot;&amp;[.$A$2]);INDIRECT([.$N$3]&amp;&quot;!&quot;&amp;[.E$2]))" office:value-type="string" office:string-value="" calcext:value-type="error">
            <text:p>#REF!</text:p>
          </table:table-cell>
          <table:table-cell table:style-name="ce5" table:formula="of:=xlookup([.$A8];INDIRECT([.$N$3]&amp;&quot;!&quot;&amp;[.$A$2]);INDIRECT([.$N$3]&amp;&quot;!&quot;&amp;[.F$2]))" office:value-type="string" office:string-value="" calcext:value-type="error">
            <text:p>#REF!</text:p>
          </table:table-cell>
          <table:table-cell table:style-name="ce5" table:formula="of:=xlookup([.$A8];INDIRECT([.$N$3]&amp;&quot;!&quot;&amp;[.$A$2]);INDIRECT([.$N$3]&amp;&quot;!&quot;&amp;[.G$2]))" office:value-type="string" office:string-value="" calcext:value-type="error">
            <text:p>#REF!</text:p>
          </table:table-cell>
          <table:table-cell table:style-name="ce5" table:formula="of:=xlookup([.$A8];INDIRECT([.$N$3]&amp;&quot;!&quot;&amp;[.$A$2]);INDIRECT([.$N$3]&amp;&quot;!&quot;&amp;[.H$2])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ndom-callstack-ubench-0.9</text:p>
          </table:table-cell>
          <table:table-cell table:style-name="ce1" office:value-type="string" calcext:value-type="string">
            <text:p>μbench 9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" table:formula="of:=xlookup([.$A9];INDIRECT([.$N$3]&amp;&quot;!&quot;&amp;[.$A$2]);INDIRECT([.$N$3]&amp;&quot;!&quot;&amp;[.E$2]))" office:value-type="string" office:string-value="" calcext:value-type="error">
            <text:p>#REF!</text:p>
          </table:table-cell>
          <table:table-cell table:style-name="ce5" table:formula="of:=xlookup([.$A9];INDIRECT([.$N$3]&amp;&quot;!&quot;&amp;[.$A$2]);INDIRECT([.$N$3]&amp;&quot;!&quot;&amp;[.F$2]))" office:value-type="string" office:string-value="" calcext:value-type="error">
            <text:p>#REF!</text:p>
          </table:table-cell>
          <table:table-cell table:style-name="ce5" table:formula="of:=xlookup([.$A9];INDIRECT([.$N$3]&amp;&quot;!&quot;&amp;[.$A$2]);INDIRECT([.$N$3]&amp;&quot;!&quot;&amp;[.G$2]))" office:value-type="string" office:string-value="" calcext:value-type="error">
            <text:p>#REF!</text:p>
          </table:table-cell>
          <table:table-cell table:style-name="ce5" table:formula="of:=xlookup([.$A9];INDIRECT([.$N$3]&amp;&quot;!&quot;&amp;[.$A$2]);INDIRECT([.$N$3]&amp;&quot;!&quot;&amp;[.H$2])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Cycles ideal'.E28" table:end-x="26.33pt" table:end-y="15.76pt" draw:z-index="0" draw:name="Chart 4" draw:style-name="gr1" draw:text-style-name="P1" svg:width="374.97pt" svg:height="269.23pt" svg:x="0pt" svg:y="14.26pt">
              <draw:object draw:notify-on-update-of-ranges="'Cycles ideal'.B2:'Cycles ideal'.B9 'Cycles ideal'.E1:'Cycles ideal'.E1 'Cycles ideal'.E2:'Cycles ideal'.E9 'Cycles ideal'.F1:'Cycles ideal'.F1 'Cycles ideal'.F2:'Cycles ideal'.F9 'Cycles ideal'.G1:'Cycles ideal'.G1 'Cycles ideal'.G2:'Cycles ideal'.G9 'Cycles ideal'.H1:'Cycles ideal'.H1 'Cycles ideal'.H2:'Cycles ideal'.H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ructions ideal" table:style-name="ta13">
        <table:table-column table:style-name="co34" table:default-cell-style-name="Default"/>
        <table:table-column table:style-name="co15" table:number-columns-repeated="1023" table:default-cell-style-name="Default"/>
        <table:table-row table:style-name="ro1">
          <table:table-cell table:style-name="ce1" office:value-type="string" calcext:value-type="string">
            <text:p>benchmark_key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encap</text:p>
          </table:table-cell>
          <table:table-cell table:style-name="ce1" office:value-type="string" calcext:value-type="string">
            <text:p>Stack Revocation</text:p>
          </table:table-cell>
          <table:table-cell table:style-name="ce1" office:value-type="string" calcext:value-type="string">
            <text:p>Reserve Stack</text:p>
          </table:table-cell>
          <table:table-cell table:style-name="ce1" office:value-type="string" calcext:value-type="string">
            <text:p>Encapsulation</text:p>
          </table:table-cell>
          <table:table-cell table:style-name="ce1" office:value-type="string" calcext:value-type="string">
            <text:p>Register Cleari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8:A16</text:p>
          </table:table-cell>
          <table:table-cell table:style-name="ce1" table:number-columns-repeated="3"/>
          <table:table-cell table:style-name="ce1" office:value-type="string" calcext:value-type="string">
            <text:p>Q8:Q16</text:p>
          </table:table-cell>
          <table:table-cell table:style-name="ce1" office:value-type="string" calcext:value-type="string">
            <text:p>V8:V16</text:p>
          </table:table-cell>
          <table:table-cell table:style-name="ce1" office:value-type="string" calcext:value-type="string">
            <text:p>Y8:Y16</text:p>
          </table:table-cell>
          <table:table-cell table:style-name="ce1" office:value-type="string" calcext:value-type="string">
            <text:p>Z8:Z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3];INDIRECT([.$N$3]&amp;&quot;!&quot;&amp;[.$A$2]);INDIRECT([.$N$3]&amp;&quot;!&quot;&amp;[.E$2]))" office:value-type="string" office:string-value="" calcext:value-type="error">
            <text:p>#NAME?</text:p>
          </table:table-cell>
          <table:table-cell table:style-name="ce51" table:formula="of:=xlookup([.$A3];INDIRECT([.$N$3]&amp;&quot;!&quot;&amp;[.$A$2]);INDIRECT([.$N$3]&amp;&quot;!&quot;&amp;[.F$2]))" office:value-type="string" office:string-value="" calcext:value-type="error">
            <text:p>#NAME?</text:p>
          </table:table-cell>
          <table:table-cell table:style-name="ce51" table:formula="of:=xlookup([.$A3];INDIRECT([.$N$3]&amp;&quot;!&quot;&amp;[.$A$2]);INDIRECT([.$N$3]&amp;&quot;!&quot;&amp;[.G$2]))" office:value-type="string" office:string-value="" calcext:value-type="error">
            <text:p>#NAME?</text:p>
          </table:table-cell>
          <table:table-cell table:style-name="ce51" table:formula="of:=xlookup([.$A3];INDIRECT([.$N$3]&amp;&quot;!&quot;&amp;[.$A$2]);INDIRECT([.$N$3]&amp;&quot;!&quot;&amp;[.H$2]))" office:value-type="string" office:string-value="" calcext:value-type="error">
            <text:p>#NAME?</text:p>
          </table:table-cell>
          <table:table-cell table:number-columns-repeated="4"/>
          <table:table-cell table:style-name="ce49" office:value-type="string" calcext:value-type="string">
            <text:p>Sheet</text:p>
          </table:table-cell>
          <table:table-cell table:style-name="ce50" office:value-type="string" calcext:value-type="string">
            <text:p>Instructions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Libc-bench Malloc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4];INDIRECT([.$N$3]&amp;&quot;!&quot;&amp;[.$A$2]);INDIRECT([.$N$3]&amp;&quot;!&quot;&amp;[.E$2]))" office:value-type="string" office:string-value="" calcext:value-type="error">
            <text:p>#NAME?</text:p>
          </table:table-cell>
          <table:table-cell table:style-name="ce51" table:formula="of:=xlookup([.$A4];INDIRECT([.$N$3]&amp;&quot;!&quot;&amp;[.$A$2]);INDIRECT([.$N$3]&amp;&quot;!&quot;&amp;[.F$2]))" office:value-type="string" office:string-value="" calcext:value-type="error">
            <text:p>#NAME?</text:p>
          </table:table-cell>
          <table:table-cell table:style-name="ce51" table:formula="of:=xlookup([.$A4];INDIRECT([.$N$3]&amp;&quot;!&quot;&amp;[.$A$2]);INDIRECT([.$N$3]&amp;&quot;!&quot;&amp;[.G$2]))" office:value-type="string" office:string-value="" calcext:value-type="error">
            <text:p>#NAME?</text:p>
          </table:table-cell>
          <table:table-cell table:style-name="ce51" table:formula="of:=xlookup([.$A4];INDIRECT([.$N$3]&amp;&quot;!&quot;&amp;[.$A$2]);INDIRECT([.$N$3]&amp;&quot;!&quot;&amp;[.H$2]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Libc-bench String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5];INDIRECT([.$N$3]&amp;&quot;!&quot;&amp;[.$A$2]);INDIRECT([.$N$3]&amp;&quot;!&quot;&amp;[.E$2]))" office:value-type="string" office:string-value="" calcext:value-type="error">
            <text:p>#NAME?</text:p>
          </table:table-cell>
          <table:table-cell table:style-name="ce51" table:formula="of:=xlookup([.$A5];INDIRECT([.$N$3]&amp;&quot;!&quot;&amp;[.$A$2]);INDIRECT([.$N$3]&amp;&quot;!&quot;&amp;[.F$2]))" office:value-type="string" office:string-value="" calcext:value-type="error">
            <text:p>#NAME?</text:p>
          </table:table-cell>
          <table:table-cell table:style-name="ce51" table:formula="of:=xlookup([.$A5];INDIRECT([.$N$3]&amp;&quot;!&quot;&amp;[.$A$2]);INDIRECT([.$N$3]&amp;&quot;!&quot;&amp;[.G$2]))" office:value-type="string" office:string-value="" calcext:value-type="error">
            <text:p>#NAME?</text:p>
          </table:table-cell>
          <table:table-cell table:style-name="ce51" table:formula="of:=xlookup([.$A5];INDIRECT([.$N$3]&amp;&quot;!&quot;&amp;[.$A$2]);INDIRECT([.$N$3]&amp;&quot;!&quot;&amp;[.H$2]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Libc-bench Regex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6];INDIRECT([.$N$3]&amp;&quot;!&quot;&amp;[.$A$2]);INDIRECT([.$N$3]&amp;&quot;!&quot;&amp;[.E$2]))" office:value-type="string" office:string-value="" calcext:value-type="error">
            <text:p>#NAME?</text:p>
          </table:table-cell>
          <table:table-cell table:style-name="ce51" table:formula="of:=xlookup([.$A6];INDIRECT([.$N$3]&amp;&quot;!&quot;&amp;[.$A$2]);INDIRECT([.$N$3]&amp;&quot;!&quot;&amp;[.F$2]))" office:value-type="string" office:string-value="" calcext:value-type="error">
            <text:p>#NAME?</text:p>
          </table:table-cell>
          <table:table-cell table:style-name="ce51" table:formula="of:=xlookup([.$A6];INDIRECT([.$N$3]&amp;&quot;!&quot;&amp;[.$A$2]);INDIRECT([.$N$3]&amp;&quot;!&quot;&amp;[.G$2]))" office:value-type="string" office:string-value="" calcext:value-type="error">
            <text:p>#NAME?</text:p>
          </table:table-cell>
          <table:table-cell table:style-name="ce51" table:formula="of:=xlookup([.$A6];INDIRECT([.$N$3]&amp;&quot;!&quot;&amp;[.$A$2]);INDIRECT([.$N$3]&amp;&quot;!&quot;&amp;[.H$2]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ndom-callstack-ubench-0.1</text:p>
          </table:table-cell>
          <table:table-cell table:style-name="ce1" office:value-type="string" calcext:value-type="string">
            <text:p>μbench 1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7];INDIRECT([.$N$3]&amp;&quot;!&quot;&amp;[.$A$2]);INDIRECT([.$N$3]&amp;&quot;!&quot;&amp;[.E$2]))" office:value-type="string" office:string-value="" calcext:value-type="error">
            <text:p>#NAME?</text:p>
          </table:table-cell>
          <table:table-cell table:style-name="ce51" table:formula="of:=xlookup([.$A7];INDIRECT([.$N$3]&amp;&quot;!&quot;&amp;[.$A$2]);INDIRECT([.$N$3]&amp;&quot;!&quot;&amp;[.F$2]))" office:value-type="string" office:string-value="" calcext:value-type="error">
            <text:p>#NAME?</text:p>
          </table:table-cell>
          <table:table-cell table:style-name="ce51" table:formula="of:=xlookup([.$A7];INDIRECT([.$N$3]&amp;&quot;!&quot;&amp;[.$A$2]);INDIRECT([.$N$3]&amp;&quot;!&quot;&amp;[.G$2]))" office:value-type="string" office:string-value="" calcext:value-type="error">
            <text:p>#NAME?</text:p>
          </table:table-cell>
          <table:table-cell table:style-name="ce51" table:formula="of:=xlookup([.$A7];INDIRECT([.$N$3]&amp;&quot;!&quot;&amp;[.$A$2]);INDIRECT([.$N$3]&amp;&quot;!&quot;&amp;[.H$2]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ndom-callstack-ubench-0.5</text:p>
          </table:table-cell>
          <table:table-cell table:style-name="ce1" office:value-type="string" calcext:value-type="string">
            <text:p>μbench 5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8];INDIRECT([.$N$3]&amp;&quot;!&quot;&amp;[.$A$2]);INDIRECT([.$N$3]&amp;&quot;!&quot;&amp;[.E$2]))" office:value-type="string" office:string-value="" calcext:value-type="error">
            <text:p>#NAME?</text:p>
          </table:table-cell>
          <table:table-cell table:style-name="ce51" table:formula="of:=xlookup([.$A8];INDIRECT([.$N$3]&amp;&quot;!&quot;&amp;[.$A$2]);INDIRECT([.$N$3]&amp;&quot;!&quot;&amp;[.F$2]))" office:value-type="string" office:string-value="" calcext:value-type="error">
            <text:p>#NAME?</text:p>
          </table:table-cell>
          <table:table-cell table:style-name="ce51" table:formula="of:=xlookup([.$A8];INDIRECT([.$N$3]&amp;&quot;!&quot;&amp;[.$A$2]);INDIRECT([.$N$3]&amp;&quot;!&quot;&amp;[.G$2]))" office:value-type="string" office:string-value="" calcext:value-type="error">
            <text:p>#NAME?</text:p>
          </table:table-cell>
          <table:table-cell table:style-name="ce51" table:formula="of:=xlookup([.$A8];INDIRECT([.$N$3]&amp;&quot;!&quot;&amp;[.$A$2]);INDIRECT([.$N$3]&amp;&quot;!&quot;&amp;[.H$2]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ndom-callstack-ubench-0.9</text:p>
          </table:table-cell>
          <table:table-cell table:style-name="ce1" office:value-type="string" calcext:value-type="string">
            <text:p>μbench 9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9];INDIRECT([.$N$3]&amp;&quot;!&quot;&amp;[.$A$2]);INDIRECT([.$N$3]&amp;&quot;!&quot;&amp;[.E$2]))" office:value-type="string" office:string-value="" calcext:value-type="error">
            <text:p>#NAME?</text:p>
          </table:table-cell>
          <table:table-cell table:style-name="ce51" table:formula="of:=xlookup([.$A9];INDIRECT([.$N$3]&amp;&quot;!&quot;&amp;[.$A$2]);INDIRECT([.$N$3]&amp;&quot;!&quot;&amp;[.F$2]))" office:value-type="string" office:string-value="" calcext:value-type="error">
            <text:p>#NAME?</text:p>
          </table:table-cell>
          <table:table-cell table:style-name="ce51" table:formula="of:=xlookup([.$A9];INDIRECT([.$N$3]&amp;&quot;!&quot;&amp;[.$A$2]);INDIRECT([.$N$3]&amp;&quot;!&quot;&amp;[.G$2]))" office:value-type="string" office:string-value="" calcext:value-type="error">
            <text:p>#NAME?</text:p>
          </table:table-cell>
          <table:table-cell table:style-name="ce51" table:formula="of:=xlookup([.$A9];INDIRECT([.$N$3]&amp;&quot;!&quot;&amp;[.$A$2]);INDIRECT([.$N$3]&amp;&quot;!&quot;&amp;[.H$2]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Instructions ideal'.H26" table:end-x="7.91pt" table:end-y="4.48pt" draw:z-index="0" draw:name="Chart 5" draw:style-name="gr1" draw:text-style-name="P1" svg:width="566.99pt" svg:height="226.46pt" svg:x="0pt" svg:y="14.26pt">
              <draw:object draw:notify-on-update-of-ranges="'Instructions ideal'.B2:'Instructions ideal'.B9 'Instructions ideal'.E1:'Instructions ideal'.E1 'Instructions ideal'.E2:'Instructions ideal'.E9 'Instructions ideal'.F1:'Instructions ideal'.F1 'Instructions ideal'.F2:'Instructions ideal'.F9 'Instructions ideal'.G1:'Instructions ideal'.G1 'Instructions ideal'.G2:'Instructions ideal'.G9 'Instructions ideal'.H1:'Instructions ideal'.H1 'Instructions ideal'.H2:'Instructions ideal'.H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ck ideal" table:style-name="ta14">
        <table:table-column table:style-name="co34" table:default-cell-style-name="Default"/>
        <table:table-column table:style-name="co15" table:number-columns-repeated="1023" table:default-cell-style-name="Default"/>
        <table:table-row table:style-name="ro1">
          <table:table-cell table:style-name="ce1" office:value-type="string" calcext:value-type="string">
            <text:p>benchmark_key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encap</text:p>
          </table:table-cell>
          <table:table-cell table:style-name="ce1" office:value-type="string" calcext:value-type="string">
            <text:p>Reserve Stack</text:p>
          </table:table-cell>
          <table:table-cell table:style-name="ce1" office:value-type="string" calcext:value-type="string">
            <text:p>Encapsulation</text:p>
          </table:table-cell>
          <table:table-cell table:style-name="ce1" office:value-type="string" calcext:value-type="string">
            <text:p>Register Cleari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8:A16</text:p>
          </table:table-cell>
          <table:table-cell table:style-name="ce1" table:number-columns-repeated="3"/>
          <table:table-cell table:style-name="ce1" office:value-type="string" calcext:value-type="string">
            <text:p>V8:V16</text:p>
          </table:table-cell>
          <table:table-cell table:style-name="ce1" office:value-type="string" calcext:value-type="string">
            <text:p>Y8:Y16</text:p>
          </table:table-cell>
          <table:table-cell table:style-name="ce1" office:value-type="string" calcext:value-type="string">
            <text:p>Z8:Z16</text:p>
          </table:table-cell>
          <table:table-cell table:number-columns-repeated="3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3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3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3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4"/>
          <table:table-cell table:style-name="ce49" office:value-type="string" calcext:value-type="string">
            <text:p>Sheet</text:p>
          </table:table-cell>
          <table:table-cell table:style-name="ce50" office:value-type="string" calcext:value-type="string">
            <text:p>Stack Pressure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Libc-bench Malloc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4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4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4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Libc-bench String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5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5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5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Libc-bench Regex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6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6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6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ndom-callstack-ubench-0.1</text:p>
          </table:table-cell>
          <table:table-cell table:style-name="ce1" office:value-type="string" calcext:value-type="string">
            <text:p>μbench 1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7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7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7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ndom-callstack-ubench-0.5</text:p>
          </table:table-cell>
          <table:table-cell table:style-name="ce1" office:value-type="string" calcext:value-type="string">
            <text:p>μbench 5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8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8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8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ndom-callstack-ubench-0.9</text:p>
          </table:table-cell>
          <table:table-cell table:style-name="ce1" office:value-type="string" calcext:value-type="string">
            <text:p>μbench 9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9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9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9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2">
          <table:table-cell>
            <draw:frame table:end-cell-address="'Stack ideal'.E23" table:end-x="27.1pt" table:end-y="15.73pt" draw:z-index="0" draw:name="Chart 6" draw:style-name="gr1" draw:text-style-name="P1" svg:width="375.73pt" svg:height="206.99pt" svg:x="0pt" svg:y="13.49pt">
              <draw:object draw:notify-on-update-of-ranges="'Stack ideal'.B2:'Stack ideal'.B9 'Stack ideal'.E1:'Stack ideal'.E1 'Stack ideal'.E2:'Stack ideal'.E9 'Stack ideal'.F1:'Stack ideal'.F1 'Stack ideal'.F2:'Stack ideal'.F9 'Stack ideal'.G1:'Stack ideal'.G1 'Stack ideal'.G2:'Stack ideal'.G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ck Allocation ideal" table:style-name="ta15">
        <table:table-column table:style-name="co34" table:default-cell-style-name="Default"/>
        <table:table-column table:style-name="co15" table:number-columns-repeated="1023" table:default-cell-style-name="Default"/>
        <table:table-row table:style-name="ro1">
          <table:table-cell table:style-name="ce1" office:value-type="string" calcext:value-type="string">
            <text:p>benchmark_key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encap</text:p>
          </table:table-cell>
          <table:table-cell table:style-name="ce1" office:value-type="string" calcext:value-type="string">
            <text:p>Reserve Stack</text:p>
          </table:table-cell>
          <table:table-cell table:style-name="ce1" office:value-type="string" calcext:value-type="string">
            <text:p>Encapsulation</text:p>
          </table:table-cell>
          <table:table-cell table:style-name="ce1" office:value-type="string" calcext:value-type="string">
            <text:p>Register Cleari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8:A16</text:p>
          </table:table-cell>
          <table:table-cell table:style-name="ce1" table:number-columns-repeated="3"/>
          <table:table-cell table:style-name="ce1" office:value-type="string" calcext:value-type="string">
            <text:p>V8:V16</text:p>
          </table:table-cell>
          <table:table-cell table:style-name="ce1" office:value-type="string" calcext:value-type="string">
            <text:p>Y8:Y16</text:p>
          </table:table-cell>
          <table:table-cell table:style-name="ce1" office:value-type="string" calcext:value-type="string">
            <text:p>Z8:Z16</text:p>
          </table:table-cell>
          <table:table-cell table:number-columns-repeated="3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3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3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3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4"/>
          <table:table-cell table:style-name="ce49" office:value-type="string" calcext:value-type="string">
            <text:p>Sheet</text:p>
          </table:table-cell>
          <table:table-cell table:style-name="ce50" office:value-type="string" calcext:value-type="string">
            <text:p>Stack Allocation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Libc-bench Malloc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4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4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4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Libc-bench String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5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5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5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Libc-bench Regex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6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6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6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ndom-callstack-ubench-0.1</text:p>
          </table:table-cell>
          <table:table-cell table:style-name="ce1" office:value-type="string" calcext:value-type="string">
            <text:p>μbench 1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7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7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7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ndom-callstack-ubench-0.5</text:p>
          </table:table-cell>
          <table:table-cell table:style-name="ce1" office:value-type="string" calcext:value-type="string">
            <text:p>μbench 5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8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8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8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ndom-callstack-ubench-0.9</text:p>
          </table:table-cell>
          <table:table-cell table:style-name="ce1" office:value-type="string" calcext:value-type="string">
            <text:p>μbench 9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9];INDIRECT([.$M$3]&amp;&quot;!&quot;&amp;[.$A$2]);INDIRECT([.$M$3]&amp;&quot;!&quot;&amp;[.E$2]))" office:value-type="string" office:string-value="" calcext:value-type="error">
            <text:p>#REF!</text:p>
          </table:table-cell>
          <table:table-cell table:style-name="ce51" table:formula="of:=xlookup([.$A9];INDIRECT([.$M$3]&amp;&quot;!&quot;&amp;[.$A$2]);INDIRECT([.$M$3]&amp;&quot;!&quot;&amp;[.F$2]))" office:value-type="string" office:string-value="" calcext:value-type="error">
            <text:p>#REF!</text:p>
          </table:table-cell>
          <table:table-cell table:style-name="ce51" table:formula="of:=xlookup([.$A9];INDIRECT([.$M$3]&amp;&quot;!&quot;&amp;[.$A$2]);INDIRECT([.$M$3]&amp;&quot;!&quot;&amp;[.G$2])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2">
          <table:table-cell>
            <draw:frame table:end-cell-address="'Stack Allocation ideal'.E22" table:end-x="27.1pt" table:end-y="15.7pt" draw:z-index="0" draw:name="Chart 7" draw:style-name="gr1" draw:text-style-name="P1" svg:width="375.73pt" svg:height="191.23pt" svg:x="0pt" svg:y="13.49pt">
              <draw:object draw:notify-on-update-of-ranges="'Stack Allocation ideal'.B2:'Stack Allocation ideal'.B9 'Stack Allocation ideal'.E1:'Stack Allocation ideal'.E1 'Stack Allocation ideal'.E2:'Stack Allocation ideal'.E9 'Stack Allocation ideal'.F1:'Stack Allocation ideal'.F1 'Stack Allocation ideal'.F2:'Stack Allocation ideal'.F9 'Stack Allocation ideal'.G1:'Stack Allocation ideal'.G1 'Stack Allocation ideal'.G2:'Stack Allocation ideal'.G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erve Stack" table:style-name="ta16">
        <table:table-column table:style-name="co3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1019" table:default-cell-style-name="Default"/>
        <table:table-row table:style-name="ro1">
          <table:table-cell table:style-name="ce1" office:value-type="string" calcext:value-type="string">
            <text:p>benchmark_key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revoc</text:p>
          </table:table-cell>
          <table:table-cell table:style-name="ce1" office:value-type="string" calcext:value-type="string">
            <text:p>encap</text:p>
          </table:table-cell>
          <table:table-cell table:style-name="ce1" office:value-type="string" calcext:value-type="string">
            <text:p>Reserve Stack Off</text:p>
          </table:table-cell>
          <table:table-cell table:style-name="ce1" office:value-type="string" calcext:value-type="string">
            <text:p>Reserve Stack 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8:A16</text:p>
          </table:table-cell>
          <table:table-cell table:style-name="ce1" table:number-columns-repeated="3"/>
          <table:table-cell table:style-name="ce1" office:value-type="string" calcext:value-type="string">
            <text:p>AC8:AC16</text:p>
          </table:table-cell>
          <table:table-cell table:style-name="ce1" office:value-type="string" calcext:value-type="string">
            <text:p>AD8:AD16</text:p>
          </table:table-cell>
          <table:table-cell table:number-columns-repeated="3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3];INDIRECT([.$L$3]&amp;&quot;!&quot;&amp;[.$A$2]);INDIRECT([.$L$3]&amp;&quot;!&quot;&amp;[.E$2]))" office:value-type="string" office:string-value="" calcext:value-type="error">
            <text:p>#REF!</text:p>
          </table:table-cell>
          <table:table-cell table:style-name="ce51" table:formula="of:=xlookup([.$A3];INDIRECT([.$L$3]&amp;&quot;!&quot;&amp;[.$A$2]);INDIRECT([.$L$3]&amp;&quot;!&quot;&amp;[.F$2]))" office:value-type="string" office:string-value="" calcext:value-type="error">
            <text:p>#REF!</text:p>
          </table:table-cell>
          <table:table-cell table:number-columns-repeated="4"/>
          <table:table-cell table:style-name="ce49" office:value-type="string" calcext:value-type="string">
            <text:p>Sheet</text:p>
          </table:table-cell>
          <table:table-cell table:style-name="ce50" office:value-type="string" calcext:value-type="string">
            <text:p>Stack Pressur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Libc-bench Malloc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4];INDIRECT([.$L$3]&amp;&quot;!&quot;&amp;[.$A$2]);INDIRECT([.$L$3]&amp;&quot;!&quot;&amp;[.E$2]))" office:value-type="string" office:string-value="" calcext:value-type="error">
            <text:p>#REF!</text:p>
          </table:table-cell>
          <table:table-cell table:style-name="ce51" table:formula="of:=xlookup([.$A4];INDIRECT([.$L$3]&amp;&quot;!&quot;&amp;[.$A$2]);INDIRECT([.$L$3]&amp;&quot;!&quot;&amp;[.F$2])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Libc-bench String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5];INDIRECT([.$L$3]&amp;&quot;!&quot;&amp;[.$A$2]);INDIRECT([.$L$3]&amp;&quot;!&quot;&amp;[.E$2]))" office:value-type="string" office:string-value="" calcext:value-type="error">
            <text:p>#REF!</text:p>
          </table:table-cell>
          <table:table-cell table:style-name="ce51" table:formula="of:=xlookup([.$A5];INDIRECT([.$L$3]&amp;&quot;!&quot;&amp;[.$A$2]);INDIRECT([.$L$3]&amp;&quot;!&quot;&amp;[.F$2])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Libc-bench Regex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6];INDIRECT([.$L$3]&amp;&quot;!&quot;&amp;[.$A$2]);INDIRECT([.$L$3]&amp;&quot;!&quot;&amp;[.E$2]))" office:value-type="string" office:string-value="" calcext:value-type="error">
            <text:p>#REF!</text:p>
          </table:table-cell>
          <table:table-cell table:style-name="ce51" table:formula="of:=xlookup([.$A6];INDIRECT([.$L$3]&amp;&quot;!&quot;&amp;[.$A$2]);INDIRECT([.$L$3]&amp;&quot;!&quot;&amp;[.F$2])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1</text:p>
          </table:table-cell>
          <table:table-cell table:style-name="ce1" office:value-type="string" calcext:value-type="string">
            <text:p>μbench 1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7];INDIRECT([.$L$3]&amp;&quot;!&quot;&amp;[.$A$2]);INDIRECT([.$L$3]&amp;&quot;!&quot;&amp;[.E$2]))" office:value-type="string" office:string-value="" calcext:value-type="error">
            <text:p>#REF!</text:p>
          </table:table-cell>
          <table:table-cell table:style-name="ce51" table:formula="of:=xlookup([.$A7];INDIRECT([.$L$3]&amp;&quot;!&quot;&amp;[.$A$2]);INDIRECT([.$L$3]&amp;&quot;!&quot;&amp;[.F$2])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5</text:p>
          </table:table-cell>
          <table:table-cell table:style-name="ce1" office:value-type="string" calcext:value-type="string">
            <text:p>μbench 5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8];INDIRECT([.$L$3]&amp;&quot;!&quot;&amp;[.$A$2]);INDIRECT([.$L$3]&amp;&quot;!&quot;&amp;[.E$2]))" office:value-type="string" office:string-value="" calcext:value-type="error">
            <text:p>#REF!</text:p>
          </table:table-cell>
          <table:table-cell table:style-name="ce51" table:formula="of:=xlookup([.$A8];INDIRECT([.$L$3]&amp;&quot;!&quot;&amp;[.$A$2]);INDIRECT([.$L$3]&amp;&quot;!&quot;&amp;[.F$2])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9</text:p>
          </table:table-cell>
          <table:table-cell table:style-name="ce1" office:value-type="string" calcext:value-type="string">
            <text:p>μbench 90%</text:p>
          </table:table-cell>
          <table:table-cell table:style-name="ce1" office:value-type="string" calcext:value-type="string">
            <text:p>uninitreserve</text:p>
          </table:table-cell>
          <table:table-cell table:style-name="ce1" office:value-type="string" calcext:value-type="string">
            <text:p>isentry</text:p>
          </table:table-cell>
          <table:table-cell table:style-name="ce51" table:formula="of:=xlookup([.$A9];INDIRECT([.$L$3]&amp;&quot;!&quot;&amp;[.$A$2]);INDIRECT([.$L$3]&amp;&quot;!&quot;&amp;[.E$2]))" office:value-type="string" office:string-value="" calcext:value-type="error">
            <text:p>#REF!</text:p>
          </table:table-cell>
          <table:table-cell table:style-name="ce51" table:formula="of:=xlookup([.$A9];INDIRECT([.$L$3]&amp;&quot;!&quot;&amp;[.$A$2]);INDIRECT([.$L$3]&amp;&quot;!&quot;&amp;[.F$2])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2">
          <table:table-cell>
            <draw:frame table:end-cell-address="'Reserve Stack'.E25" table:end-x="26.33pt" table:end-y="14.2pt" draw:z-index="0" draw:name="Chart 8" draw:style-name="gr1" draw:text-style-name="P1" svg:width="374.97pt" svg:height="236.98pt" svg:x="0pt" svg:y="13.49pt">
              <draw:object draw:notify-on-update-of-ranges="'Reserve Stack'.B2:'Reserve Stack'.B9 'Reserve Stack'.E1:'Reserve Stack'.E1 'Reserve Stack'.E2:'Reserve Stack'.E9 'Reserve Stack'.F1:'Reserve Stack'.F1 'Reserve Stack'.F2:'Reserve Stack'.F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capsulation Comparison" table:style-name="ta17">
        <table:table-column table:style-name="co34" table:default-cell-style-name="Default"/>
        <table:table-column table:style-name="co15" table:number-columns-repeated="1023" table:default-cell-style-name="Default"/>
        <table:table-row table:style-name="ro1">
          <table:table-cell table:style-name="ce1" office:value-type="string" calcext:value-type="string">
            <text:p>benchmark_key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Stack Pressur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8:A16</text:p>
          </table:table-cell>
          <table:table-cell table:style-name="ce1"/>
          <table:table-cell table:style-name="ce1" office:value-type="string" calcext:value-type="string">
            <text:p>AC8:AC16</text:p>
          </table:table-cell>
          <table:table-cell table:style-name="ce1" office:value-type="string" calcext:value-type="string">
            <text:p>AE8:AE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Coremark</text:p>
          </table:table-cell>
          <table:table-cell table:style-name="ce5" table:formula="of:=xlookup([.$A3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xlookup([.$A3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4"/>
          <table:table-cell table:style-name="ce49" office:value-type="string" calcext:value-type="string">
            <text:p>Sheet</text:p>
          </table:table-cell>
          <table:table-cell table:style-name="ce50" office:value-type="string" calcext:value-type="string">
            <text:p>Gem5 cycle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Libc-bench Malloc</text:p>
          </table:table-cell>
          <table:table-cell table:style-name="ce5" table:formula="of:=xlookup([.$A4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xlookup([.$A4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5"/>
          <table:table-cell table:style-name="ce1" office:value-type="string" calcext:value-type="string">
            <text:p>Stack Pressur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Libc-bench String</text:p>
          </table:table-cell>
          <table:table-cell table:style-name="ce5" table:formula="of:=xlookup([.$A5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xlookup([.$A5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Libc-bench Regex</text:p>
          </table:table-cell>
          <table:table-cell table:style-name="ce5" table:formula="of:=xlookup([.$A6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xlookup([.$A6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1</text:p>
          </table:table-cell>
          <table:table-cell table:style-name="ce1" office:value-type="string" calcext:value-type="string">
            <text:p>μbench 10%</text:p>
          </table:table-cell>
          <table:table-cell table:style-name="ce5" table:formula="of:=xlookup([.$A7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xlookup([.$A7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5</text:p>
          </table:table-cell>
          <table:table-cell table:style-name="ce1" office:value-type="string" calcext:value-type="string">
            <text:p>μbench 50%</text:p>
          </table:table-cell>
          <table:table-cell table:style-name="ce5" table:formula="of:=xlookup([.$A8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xlookup([.$A8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9</text:p>
          </table:table-cell>
          <table:table-cell table:style-name="ce1" office:value-type="string" calcext:value-type="string">
            <text:p>μbench 90%</text:p>
          </table:table-cell>
          <table:table-cell table:style-name="ce5" table:formula="of:=xlookup([.$A9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xlookup([.$A9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>
            <draw:frame table:end-cell-address="'Encapsulation Comparison'.F29" table:end-x="3.43pt" table:end-y="14.2pt" draw:z-index="0" draw:name="Chart 9" draw:style-name="gr1" draw:text-style-name="P1" svg:width="422.22pt" svg:height="299.96pt" svg:x="0pt" svg:y="13.49pt">
              <draw:object draw:notify-on-update-of-ranges="'Encapsulation Comparison'.B2:'Encapsulation Comparison'.B9 'Encapsulation Comparison'.C1:'Encapsulation Comparison'.C1 'Encapsulation Comparison'.C2:'Encapsulation Comparison'.C9 'Encapsulation Comparison'.D1:'Encapsulation Comparison'.D1 'Encapsulation Comparison'.D2:'Encapsulation Comparison'.D9 'Encapsulation Comparison'.E1:'Encapsulation Comparison'.E1 'Encapsulation Comparison'.E2:'Encapsulation Comparison'.E9 'Encapsulation Comparison'.F1:'Encapsulation Comparison'.F1 'Encapsulation Comparison'.F2:'Encapsulation Comparison'.F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lee-saved regs" table:style-name="ta18">
        <table:table-column table:style-name="co34" table:default-cell-style-name="Default"/>
        <table:table-column table:style-name="co15" table:number-columns-repeated="1023" table:default-cell-style-name="Default"/>
        <table:table-row table:style-name="ro1">
          <table:table-cell table:style-name="ce1" office:value-type="string" calcext:value-type="string">
            <text:p>benchmark_key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Stack Pressur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8:A16</text:p>
          </table:table-cell>
          <table:table-cell table:style-name="ce1"/>
          <table:table-cell table:number-columns-repeated="2" table:style-name="ce1" office:value-type="string" calcext:value-type="string">
            <text:p>AA8:AA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Coremark</text:p>
          </table:table-cell>
          <table:table-cell table:style-name="ce5" table:formula="of:=-xlookup([.$A3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-xlookup([.$A3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4"/>
          <table:table-cell table:style-name="ce49" office:value-type="string" calcext:value-type="string">
            <text:p>Sheet</text:p>
          </table:table-cell>
          <table:table-cell table:style-name="ce50" office:value-type="string" calcext:value-type="string">
            <text:p>Gem5 cycle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Libc-bench Malloc</text:p>
          </table:table-cell>
          <table:table-cell table:style-name="ce5" table:formula="of:=-xlookup([.$A4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-xlookup([.$A4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5"/>
          <table:table-cell table:style-name="ce1" office:value-type="string" calcext:value-type="string">
            <text:p>Stack Pressur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Libc-bench String</text:p>
          </table:table-cell>
          <table:table-cell table:style-name="ce5" table:formula="of:=-xlookup([.$A5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-xlookup([.$A5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Libc-bench Regex</text:p>
          </table:table-cell>
          <table:table-cell table:style-name="ce5" table:formula="of:=-xlookup([.$A6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-xlookup([.$A6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1</text:p>
          </table:table-cell>
          <table:table-cell table:style-name="ce1" office:value-type="string" calcext:value-type="string">
            <text:p>μbench 10%</text:p>
          </table:table-cell>
          <table:table-cell table:style-name="ce5" table:formula="of:=-xlookup([.$A7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-xlookup([.$A7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+small-alloc-0.5</text:p>
          </table:table-cell>
          <table:table-cell table:style-name="ce1" office:value-type="string" calcext:value-type="string">
            <text:p>μbench small stack 50%</text:p>
          </table:table-cell>
          <table:table-cell table:style-name="ce5" table:formula="of:=-xlookup([.$A8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-xlookup([.$A8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5</text:p>
          </table:table-cell>
          <table:table-cell table:style-name="ce1" office:value-type="string" calcext:value-type="string">
            <text:p>μbench 50%</text:p>
          </table:table-cell>
          <table:table-cell table:style-name="ce5" table:formula="of:=-xlookup([.$A9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-xlookup([.$A9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+large-alloc-0.5</text:p>
          </table:table-cell>
          <table:table-cell table:style-name="ce1" office:value-type="string" calcext:value-type="string">
            <text:p>μbench large stack 50%</text:p>
          </table:table-cell>
          <table:table-cell table:style-name="ce5" table:formula="of:=-xlookup([.$A10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-xlookup([.$A10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9</text:p>
          </table:table-cell>
          <table:table-cell table:style-name="ce1" office:value-type="string" calcext:value-type="string">
            <text:p>μbench 90%</text:p>
          </table:table-cell>
          <table:table-cell table:style-name="ce5" table:formula="of:=-xlookup([.$A11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" table:formula="of:=-xlookup([.$A11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>
            <draw:frame table:end-cell-address="'Callee-saved regs'.E31" table:end-x="59.33pt" table:end-y="7.46pt" draw:z-index="0" draw:name="Chart 10" draw:style-name="gr1" draw:text-style-name="P1" svg:width="407.96pt" svg:height="293.22pt" svg:x="0pt" svg:y="13.49pt">
              <draw:object draw:notify-on-update-of-ranges="'Callee-saved regs'.B2:'Callee-saved regs'.B11 'Callee-saved regs'.C1:'Callee-saved regs'.C1 'Callee-saved regs'.C2:'Callee-saved regs'.C11 'Callee-saved regs'.D1:'Callee-saved regs'.D1 'Callee-saved regs'.D2:'Callee-saved regs'.D11 'Callee-saved regs'.E1:'Callee-saved regs'.E1 'Callee-saved regs'.E2:'Callee-saved regs'.E11 'Callee-saved regs'.F1:'Callee-saved regs'.F1 'Callee-saved regs'.F2:'Callee-saved regs'.F1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ck Revocation Overhead" table:style-name="ta19"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5" table:number-columns-repeated="1020" table:default-cell-style-name="Default"/>
        <table:table-row table:style-name="ro1">
          <table:table-cell table:style-name="ce1" office:value-type="string" calcext:value-type="string">
            <text:p>benchmark_key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tack Revocation Cycle Overhead</text:p>
          </table:table-cell>
          <table:table-cell table:style-name="ce1" office:value-type="string" calcext:value-type="string">
            <text:p>Total Stack Alloca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8:A16</text:p>
          </table:table-cell>
          <table:table-cell table:style-name="ce1"/>
          <table:table-cell table:style-name="ce1" office:value-type="string" calcext:value-type="string">
            <text:p>Q8:Q16</text:p>
          </table:table-cell>
          <table:table-cell table:style-name="ce1" office:value-type="string" calcext:value-type="string">
            <text:p>D8:D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emark</text:p>
          </table:table-cell>
          <table:table-cell table:style-name="ce1" office:value-type="string" calcext:value-type="string">
            <text:p>Coremark</text:p>
          </table:table-cell>
          <table:table-cell table:style-name="ce5" table:formula="of:=xlookup([.$A3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2" table:formula="of:=xlookup([.$A3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4"/>
          <table:table-cell table:style-name="ce49" office:value-type="string" calcext:value-type="string">
            <text:p>Sheet</text:p>
          </table:table-cell>
          <table:table-cell table:style-name="ce50" office:value-type="string" calcext:value-type="string">
            <text:p>Gem5 cycle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bc-bench_malloc</text:p>
          </table:table-cell>
          <table:table-cell table:style-name="ce1" office:value-type="string" calcext:value-type="string">
            <text:p>Libc-bench Malloc</text:p>
          </table:table-cell>
          <table:table-cell table:style-name="ce5" table:formula="of:=xlookup([.$A4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2" table:formula="of:=xlookup([.$A4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5"/>
          <table:table-cell table:style-name="ce1" office:value-type="string" calcext:value-type="string">
            <text:p>Stack Allocation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bc-bench_string</text:p>
          </table:table-cell>
          <table:table-cell table:style-name="ce1" office:value-type="string" calcext:value-type="string">
            <text:p>Libc-bench String</text:p>
          </table:table-cell>
          <table:table-cell table:style-name="ce5" table:formula="of:=xlookup([.$A5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2" table:formula="of:=xlookup([.$A5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libc-bench_regex</text:p>
          </table:table-cell>
          <table:table-cell table:style-name="ce1" office:value-type="string" calcext:value-type="string">
            <text:p>Libc-bench Regex</text:p>
          </table:table-cell>
          <table:table-cell table:style-name="ce5" table:formula="of:=xlookup([.$A6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2" table:formula="of:=xlookup([.$A6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1</text:p>
          </table:table-cell>
          <table:table-cell table:style-name="ce1" office:value-type="string" calcext:value-type="string">
            <text:p>μbench 10%</text:p>
          </table:table-cell>
          <table:table-cell table:style-name="ce5" table:formula="of:=xlookup([.$A7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2" table:formula="of:=xlookup([.$A7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+small-alloc-0.5</text:p>
          </table:table-cell>
          <table:table-cell table:style-name="ce1" office:value-type="string" calcext:value-type="string">
            <text:p>μbench small stack 50%</text:p>
          </table:table-cell>
          <table:table-cell table:style-name="ce5" table:formula="of:=xlookup([.$A8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2" table:formula="of:=xlookup([.$A8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5</text:p>
          </table:table-cell>
          <table:table-cell table:style-name="ce1" office:value-type="string" calcext:value-type="string">
            <text:p>μbench 50%</text:p>
          </table:table-cell>
          <table:table-cell table:style-name="ce5" table:formula="of:=xlookup([.$A9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2" table:formula="of:=xlookup([.$A9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+large-alloc-0.5</text:p>
          </table:table-cell>
          <table:table-cell table:style-name="ce1" office:value-type="string" calcext:value-type="string">
            <text:p>μbench large stack 50%</text:p>
          </table:table-cell>
          <table:table-cell table:style-name="ce5" table:formula="of:=xlookup([.$A10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2" table:formula="of:=xlookup([.$A10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ndom-callstack-ubench-0.9</text:p>
          </table:table-cell>
          <table:table-cell table:style-name="ce1" office:value-type="string" calcext:value-type="string">
            <text:p>μbench 90%</text:p>
          </table:table-cell>
          <table:table-cell table:style-name="ce5" table:formula="of:=xlookup([.$A11];INDIRECT([.$L$3]&amp;&quot;!&quot;&amp;[.$A$2]);INDIRECT([.$L$3]&amp;&quot;!&quot;&amp;[.C$2]))" office:value-type="string" office:string-value="" calcext:value-type="error">
            <text:p>#REF!</text:p>
          </table:table-cell>
          <table:table-cell table:style-name="ce52" table:formula="of:=xlookup([.$A11];INDIRECT([.$L$4]&amp;&quot;!&quot;&amp;[.$A$2]);INDIRECT([.$L$4]&amp;&quot;!&quot;&amp;[.D$2]))" office:value-type="string" office:string-value="" calcext:value-type="error">
            <text:p>#REF!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Stack Revocation Overhead'.D35" table:end-x="73.02pt" table:end-y="11.96pt" draw:z-index="0" draw:name="Chart 11" draw:style-name="gr1" draw:text-style-name="P1" svg:width="414.71pt" svg:height="358.47pt" svg:x="0pt" svg:y="0pt">
              <draw:object draw:notify-on-update-of-ranges="'Stack Revocation Overhead'.B2:'Stack Revocation Overhead'.B11 'Stack Revocation Overhead'.C1:'Stack Revocation Overhead'.C1 'Stack Revocation Overhead'.C2:'Stack Revocation Overhead'.C11 'Stack Revocation Overhead'.E1:'Stack Revocation Overhead'.E1 'Stack Revocation Overhead'.E2:'Stack Revocation Overhead'.E11 'Stack Revocation Overhead'.F1:'Stack Revocation Overhead'.F1 'Stack Revocation Overhead'.F2:'Stack Revocation Overhead'.F11 'Stack Revocation Overhead'.D1:'Stack Revocation Overhead'.D1 'Stack Revocation Overhead'.D2:'Stack Revocation Overhead'.D11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percentage-style style:name="N129">
      <number:number number:decimal-places="3" loext:min-decimal-places="3" number:min-integer-digits="1"/>
      <number:text>%</number:text>
    </number:percentage-style>
    <number:number-style style:name="N130P0" style:volatile="true">
      <number:number number:decimal-places="2" loext:min-decimal-places="2" number:min-integer-digits="1" number:grouping="true" number:display-factor="1000000000000"/>
      <number:text> TB </number:text>
    </number:number-style>
    <number:number-style style:name="N130P1" style:volatile="true">
      <number:number number:decimal-places="2" loext:min-decimal-places="2" number:min-integer-digits="1" number:grouping="true" number:display-factor="1000000000"/>
      <number:text> GB </number:text>
    </number:number-style>
    <number:number-style style:name="N130">
      <number:number number:decimal-places="2" loext:min-decimal-places="2" number:min-integer-digits="1" number:grouping="true" number:display-factor="1000000"/>
      <number:text> MB</number:text>
      <style:map style:condition="value()&gt;1000000000000" style:apply-style-name="N130P0"/>
      <style:map style:condition="value()&gt;1000000000" style:apply-style-name="N130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_20_size_20_data" style:display-name="PageStyle_Code siz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5f_data_5f_8M_5f_stack" style:display-name="PageStyle_raw_data_8M_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5f_data_5f_16K_5f_stack" style:display-name="PageStyle_raw_data_16K_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m5_20_cycles" style:display-name="PageStyle_Gem5 cy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ck_20_Pressure" style:display-name="PageStyle_Stack Press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ck_20_Allocation" style:display-name="PageStyle_Stack Allo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ures" style:display-name="PageStyle_Fig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_20_size_20_table" style:display-name="PageStyle_Code size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s_20_export" style:display-name="PageStyle_Cycles ex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s_20_ideal" style:display-name="PageStyle_Cycles ide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_20_ideal" style:display-name="PageStyle_Instructions ide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ck_20_ideal" style:display-name="PageStyle_Stack ide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ck_20_Allocation_20_ideal" style:display-name="PageStyle_Stack Allocation ide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rve_20_Stack" style:display-name="PageStyle_Reserve 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apsulation_20_Comparison" style:display-name="PageStyle_Encapsulation 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lee-saved_20_regs" style:display-name="PageStyle_Callee-saved re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ck_20_Revocation_20_Overhead" style:display-name="PageStyle_Stack Revocation Overhe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cell-count="4546" meta:object-count="1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0.05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4.288cm" svg:height="4.815cm" xlink:href=".." xlink:type="simple" chart:class="chart:bar" chart:style-name="ch1">
        <chart:legend chart:legend-position="end" svg:x="10.808cm" svg:y="1.361cm" style:legend-expansion="high" chart:style-name="ch2"/>
        <chart:plot-area chart:style-name="ch3" table:cell-range-address="'Code size data'.A14:'Code size data'.G18" chart:data-source-has-labels="both" svg:x="0.285cm" svg:y="0.096cm" svg:width="10.238cm" svg:height="4.623cm">
          <chartooo:coordinate-region svg:x="0.378cm" svg:y="0.096cm" svg:width="5.161cm" svg:height="4.126cm"/>
          <chart:axis chart:dimension="x" chart:name="primary-x" chart:style-name="ch4" chartooo:axis-type="text">
            <chart:categories table:cell-range-address="'Code size data'.B14:'Code size data'.G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de size data'.B15:'Code size data'.G15" chart:label-cell-address="'Code size data'.A15:'Code size data'.A15" chart:class="chart:bar">
            <chart:data-point chart:repeated="6"/>
          </chart:series>
          <chart:series chart:style-name="ch8" chart:values-cell-range-address="'Code size data'.B16:'Code size data'.G16" chart:label-cell-address="'Code size data'.A16:'Code size data'.A16" chart:class="chart:bar">
            <chart:data-point chart:repeated="6"/>
          </chart:series>
          <chart:series chart:style-name="ch9" chart:values-cell-range-address="'Code size data'.B17:'Code size data'.G17" chart:label-cell-address="'Code size data'.A17:'Code size data'.A17" chart:class="chart:bar">
            <chart:data-point chart:repeated="6"/>
          </chart:series>
          <chart:series chart:style-name="ch10" chart:values-cell-range-address="'Code size data'.B18:'Code size data'.G18" chart:label-cell-address="'Code size data'.A18:'Code size data'.A1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Code size data'.B14:'Code size data'.G1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remark</text:p>
              </table:table-cell>
              <table:table-cell office:value-type="string">
                <text:p>Libc-bench</text:p>
              </table:table-cell>
              <table:table-cell office:value-type="string">
                <text:p>Random callstack μbenchmark</text:p>
              </table:table-cell>
            </table:table-row>
          </table:table-header-rows>
          <table:table-rows>
            <table:table-row>
              <table:table-cell office:value-type="string">
                <text:p>Stack Revocation</text:p>
                <draw:g>
                  <svg:desc>'Code size data'.A15:'Code size data'.A15</svg:desc>
                </draw:g>
              </table:table-cell>
              <table:table-cell office:value-type="float" office:value="NaN">
                <text:p>NaN</text:p>
                <draw:g>
                  <svg:desc>'Code size data'.B15:'Code size data'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188762747739">
                <text:p>0.127188762747739</text:p>
              </table:table-cell>
              <table:table-cell office:value-type="float" office:value="0.147031983796657">
                <text:p>0.147031983796657</text:p>
              </table:table-cell>
              <table:table-cell office:value-type="float" office:value="0.134755898915623">
                <text:p>0.134755898915623</text:p>
              </table:table-cell>
            </table:table-row>
            <table:table-row>
              <table:table-cell office:value-type="string">
                <text:p>Reserve Stack</text:p>
                <draw:g>
                  <svg:desc>'Code size data'.A16:'Code size data'.A16</svg:desc>
                </draw:g>
              </table:table-cell>
              <table:table-cell office:value-type="float" office:value="NaN">
                <text:p>NaN</text:p>
                <draw:g>
                  <svg:desc>'Code size data'.B16:'Code size data'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6029361556845">
                <text:p>0.0466029361556845</text:p>
              </table:table-cell>
              <table:table-cell office:value-type="float" office:value="0.0507616183176482">
                <text:p>0.0507616183176482</text:p>
              </table:table-cell>
              <table:table-cell office:value-type="float" office:value="0.0488260022557162">
                <text:p>0.0488260022557162</text:p>
              </table:table-cell>
            </table:table-row>
            <table:table-row>
              <table:table-cell office:value-type="string">
                <text:p>Encapsulation</text:p>
                <draw:g>
                  <svg:desc>'Code size data'.A17:'Code size data'.A17</svg:desc>
                </draw:g>
              </table:table-cell>
              <table:table-cell office:value-type="float" office:value="NaN">
                <text:p>NaN</text:p>
                <draw:g>
                  <svg:desc>'Code size data'.B17:'Code size data'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15527646387213">
                <text:p>0.00815527646387213</text:p>
              </table:table-cell>
              <table:table-cell office:value-type="float" office:value="0.0434341009399642">
                <text:p>0.0434341009399642</text:p>
              </table:table-cell>
              <table:table-cell office:value-type="float" office:value="0.00101669729793141">
                <text:p>0.00101669729793141</text:p>
              </table:table-cell>
            </table:table-row>
            <table:table-row>
              <table:table-cell office:value-type="string">
                <text:p>Register Clearing</text:p>
                <draw:g>
                  <svg:desc>'Code size data'.A18:'Code size data'.A18</svg:desc>
                </draw:g>
              </table:table-cell>
              <table:table-cell office:value-type="float" office:value="NaN">
                <text:p>NaN</text:p>
                <draw:g>
                  <svg:desc>'Code size data'.B18:'Code size data'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5929461252225">
                <text:p>0.00355929461252225</text:p>
              </table:table-cell>
              <table:table-cell office:value-type="float" office:value="0.0179105534219422">
                <text:p>0.0179105534219422</text:p>
              </table:table-cell>
              <table:table-cell office:value-type="float" office:value="0.00101566467440134">
                <text:p>0.00101566467440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2pt" style:font-family-asian="Arial" style:font-size-asian="12pt" style:font-family-complex="Arial" style:font-size-complex="12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0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393cm" svg:height="10.345cm" xlink:href=".." xlink:type="simple" chart:class="chart:bar" chart:style-name="ch1">
        <chart:legend chart:legend-position="end" svg:x="10.691cm" svg:y="4.02cm" style:legend-expansion="high" chart:style-name="ch2"/>
        <chart:plot-area chart:style-name="ch3" table:cell-range-address="'Callee-saved regs'.B1:'Callee-saved regs'.F11" chart:data-source-has-labels="both" svg:x="1.442cm" svg:y="0.206cm" svg:width="8.962cm" svg:height="8.808cm">
          <chartooo:coordinate-region svg:x="1.627cm" svg:y="0.206cm" svg:width="8.656cm" svg:height="8.258cm"/>
          <chart:axis chart:dimension="x" chart:name="primary-x" chart:style-name="ch4" chartooo:axis-type="text">
            <chart:title svg:x="0.451cm" svg:y="5.758cm" chart:style-name="ch5">
              <text:p>Benchmark</text:p>
            </chart:title>
            <chart:categories table:cell-range-address="'Callee-saved regs'.B2:'Callee-saved regs'.B11"/>
          </chart:axis>
          <chart:axis chart:dimension="y" chart:name="primary-y" chart:style-name="ch6">
            <chart:title svg:x="0cm" svg:y="9.22cm" chart:style-name="ch7">
              <text:p>Relative overhead of reducing the amount of callee-saved registers</text:p>
            </chart:title>
            <chart:grid chart:style-name="ch8" chart:class="major"/>
          </chart:axis>
          <chart:series chart:style-name="ch9" chart:values-cell-range-address="'Callee-saved regs'.C2:'Callee-saved regs'.C11" chart:label-cell-address="'Callee-saved regs'.C1:'Callee-saved regs'.C1" chart:class="chart:bar">
            <chart:data-point chart:repeated="10"/>
          </chart:series>
          <chart:series chart:style-name="ch10" chart:values-cell-range-address="'Callee-saved regs'.D2:'Callee-saved regs'.D11" chart:label-cell-address="'Callee-saved regs'.D1:'Callee-saved regs'.D1" chart:class="chart:bar">
            <chart:data-point chart:repeated="10"/>
          </chart:series>
          <chart:series chart:style-name="ch11" chart:values-cell-range-address="'Callee-saved regs'.E2:'Callee-saved regs'.E11" chart:label-cell-address="'Callee-saved regs'.E1:'Callee-saved regs'.E1" chart:class="chart:bar">
            <chart:data-point chart:repeated="10"/>
          </chart:series>
          <chart:series chart:style-name="ch12" chart:values-cell-range-address="'Callee-saved regs'.F2:'Callee-saved regs'.F11" chart:label-cell-address="'Callee-saved regs'.F1:'Callee-saved regs'.F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</text:p>
                <draw:g>
                  <svg:desc>'Callee-saved regs'.C1:'Callee-saved regs'.C1</svg:desc>
                </draw:g>
              </table:table-cell>
              <table:table-cell office:value-type="string">
                <text:p>Stack Pressure</text:p>
                <draw:g>
                  <svg:desc>'Callee-saved regs'.D1:'Callee-saved regs'.D1</svg:desc>
                </draw:g>
              </table:table-cell>
              <table:table-cell office:value-type="string">
                <text:p/>
                <draw:g>
                  <svg:desc>'Callee-saved regs'.E1:'Callee-saved regs'.E1</svg:desc>
                </draw:g>
              </table:table-cell>
              <table:table-cell office:value-type="string">
                <text:p/>
                <draw:g>
                  <svg:desc>'Callee-saved regs'.F1:'Callee-saved reg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llee-saved regs'.B2:'Callee-saved regs'.B11</svg:desc>
                </draw:g>
              </table:table-cell>
              <table:table-cell office:value-type="float" office:value="NaN">
                <text:p>NaN</text:p>
                <draw:g>
                  <svg:desc>'Callee-saved regs'.C2:'Callee-saved regs'.C11</svg:desc>
                </draw:g>
              </table:table-cell>
              <table:table-cell office:value-type="float" office:value="NaN">
                <text:p>NaN</text:p>
                <draw:g>
                  <svg:desc>'Callee-saved regs'.D2:'Callee-saved regs'.D11</svg:desc>
                </draw:g>
              </table:table-cell>
              <table:table-cell office:value-type="float" office:value="NaN">
                <text:p>NaN</text:p>
                <draw:g>
                  <svg:desc>'Callee-saved regs'.E2:'Callee-saved regs'.E11</svg:desc>
                </draw:g>
              </table:table-cell>
              <table:table-cell office:value-type="float" office:value="NaN">
                <text:p>NaN</text:p>
                <draw:g>
                  <svg:desc>'Callee-saved regs'.F2:'Callee-saved regs'.F11</svg:desc>
                </draw:g>
              </table:table-cell>
            </table:table-row>
            <table:table-row>
              <table:table-cell office:value-type="string">
                <text:p>Coremar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Mallo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Str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Reg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1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small stack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large stack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9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2pt" style:font-family-asian="Arial" style:font-size-asian="12pt" style:font-family-complex="Arial" style:font-size-complex="12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-0.1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6" style:family="chart">
      <style:chart-properties style:rotation-angle="9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tick-marks-major-inner="false" chart:tick-marks-major-outer="false" chart:logarithmic="false" chart:maximum="10000000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4.631cm" svg:height="12.647cm" xlink:href=".." xlink:type="simple" chart:class="chart:bar" chart:column-mapping="0 2 3 1" chart:style-name="ch1">
        <chart:legend chart:legend-position="end" svg:x="9.686cm" svg:y="4.946cm" style:legend-expansion="high" chart:style-name="ch2"/>
        <chart:plot-area chart:style-name="ch3" table:cell-range-address="'Stack Revocation Overhead'.B2:'Stack Revocation Overhead'.D11 'Stack Revocation Overhead'.B1:'Stack Revocation Overhead'.D1 'Stack Revocation Overhead'.E1:'Stack Revocation Overhead'.F11" chart:data-source-has-labels="both" svg:x="1.447cm" svg:y="0.252cm" svg:width="7.045cm" svg:height="12.143cm">
          <chartooo:coordinate-region svg:x="2.501cm" svg:y="0.478cm" svg:width="4.407cm" svg:height="11.692cm"/>
          <chart:axis chart:dimension="x" chart:name="primary-x" chart:style-name="ch4" chartooo:axis-type="text">
            <chart:categories table:cell-range-address="'Stack Revocation Overhead'.B2:'Stack Revocation Overhead'.B11"/>
          </chart:axis>
          <chart:axis chart:dimension="x" chart:name="secondary-x" chart:style-name="ch4"/>
          <chart:axis chart:dimension="y" chart:name="primary-y" chart:style-name="ch5">
            <chart:title svg:x="0.659cm" svg:y="1.37cm" chart:style-name="ch6">
              <text:p>Stack Revocaton Cycle Overhead</text:p>
            </chart:title>
            <chart:grid chart:style-name="ch7" chart:class="major"/>
          </chart:axis>
          <chart:axis chart:dimension="y" chart:name="secondary-y" chart:style-name="ch8">
            <chart:title svg:x="8.785cm" svg:y="8.081cm" chart:style-name="ch9">
              <text:p>Total Stack Allocation</text:p>
            </chart:title>
          </chart:axis>
          <chart:series chart:attached-axis="primary-y" chart:style-name="ch10" chart:values-cell-range-address="'Stack Revocation Overhead'.C2:'Stack Revocation Overhead'.C11" chart:label-cell-address="'Stack Revocation Overhead'.C1:'Stack Revocation Overhead'.C1" chart:class="chart:bar">
            <chart:data-point chart:repeated="10"/>
          </chart:series>
          <chart:series chart:attached-axis="primary-y" chart:style-name="ch11" chart:values-cell-range-address="'Stack Revocation Overhead'.E2:'Stack Revocation Overhead'.E11" chart:label-cell-address="'Stack Revocation Overhead'.E1:'Stack Revocation Overhead'.E1" chart:class="chart:bar">
            <chart:data-point chart:repeated="10"/>
          </chart:series>
          <chart:series chart:attached-axis="primary-y" chart:style-name="ch12" chart:values-cell-range-address="'Stack Revocation Overhead'.F2:'Stack Revocation Overhead'.F11" chart:label-cell-address="'Stack Revocation Overhead'.F1:'Stack Revocation Overhead'.F1" chart:class="chart:bar">
            <chart:data-point chart:repeated="10"/>
          </chart:series>
          <chart:series chart:attached-axis="secondary-y" chart:style-name="ch13" chart:values-cell-range-address="'Stack Revocation Overhead'.D2:'Stack Revocation Overhead'.D11" chart:label-cell-address="'Stack Revocation Overhead'.D1:'Stack Revocation Overhead'.D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ck Revocation Cycle Overhead</text:p>
                <draw:g>
                  <svg:desc>'Stack Revocation Overhead'.C1:'Stack Revocation Overhead'.C1</svg:desc>
                </draw:g>
              </table:table-cell>
              <table:table-cell office:value-type="string">
                <text:p/>
                <draw:g>
                  <svg:desc>'Stack Revocation Overhead'.E1:'Stack Revocation Overhead'.E1</svg:desc>
                </draw:g>
              </table:table-cell>
              <table:table-cell office:value-type="string">
                <text:p/>
                <draw:g>
                  <svg:desc>'Stack Revocation Overhead'.F1:'Stack Revocation Overhead'.F1</svg:desc>
                </draw:g>
              </table:table-cell>
              <table:table-cell office:value-type="string">
                <text:p>Total Stack Allocation</text:p>
                <draw:g>
                  <svg:desc>'Stack Revocation Overhead'.D1:'Stack Revocation Overhea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tack Revocation Overhead'.B2:'Stack Revocation Overhead'.B11</svg:desc>
                </draw:g>
              </table:table-cell>
              <table:table-cell office:value-type="float" office:value="NaN">
                <text:p>NaN</text:p>
                <draw:g>
                  <svg:desc>'Stack Revocation Overhead'.C2:'Stack Revocation Overhead'.C11</svg:desc>
                </draw:g>
              </table:table-cell>
              <table:table-cell office:value-type="float" office:value="NaN">
                <text:p>NaN</text:p>
                <draw:g>
                  <svg:desc>'Stack Revocation Overhead'.E2:'Stack Revocation Overhead'.E11</svg:desc>
                </draw:g>
              </table:table-cell>
              <table:table-cell office:value-type="float" office:value="NaN">
                <text:p>NaN</text:p>
                <draw:g>
                  <svg:desc>'Stack Revocation Overhead'.F2:'Stack Revocation Overhead'.F11</svg:desc>
                </draw:g>
              </table:table-cell>
              <table:table-cell office:value-type="float" office:value="NaN">
                <text:p>NaN</text:p>
                <draw:g>
                  <svg:desc>'Stack Revocation Overhead'.D2:'Stack Revocation Overhead'.D11</svg:desc>
                </draw:g>
              </table:table-cell>
            </table:table-row>
            <table:table-row>
              <table:table-cell office:value-type="string">
                <text:p>Coremar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Mallo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Str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Reg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1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small stack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large stack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9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314cm" svg:height="8.652cm" xlink:href=".." xlink:type="simple" chart:class="chart:bar" chart:style-name="ch1">
        <chart:legend chart:legend-position="end" svg:x="11.469cm" svg:y="3.778cm" style:legend-expansion="high" chart:style-name="ch2"/>
        <chart:plot-area chart:style-name="ch3" table:cell-range-address="Figures.A1:Figures.C7" chart:data-source-has-labels="both" svg:x="0.286cm" svg:y="0.173cm" svg:width="10.897cm" svg:height="8.306cm">
          <chartooo:coordinate-region svg:x="2.201cm" svg:y="0.173cm" svg:width="8.651cm" svg:height="7.809cm"/>
          <chart:axis chart:dimension="x" chart:name="primary-x" chart:style-name="ch4" chartooo:axis-type="text">
            <chart:categories table:cell-range-address="Figures.A2:Figure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gures.B2:Figures.B7" chart:label-cell-address="Figures.B1:Figures.B1" chart:class="chart:bar">
            <chart:data-point chart:repeated="6"/>
          </chart:series>
          <chart:series chart:style-name="ch8" chart:values-cell-range-address="Figures.C2:Figures.C7" chart:label-cell-address="Figures.C1:Figures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5 Cycles</text:p>
                <draw:g>
                  <svg:desc>Figures.B1:Figures.B1</svg:desc>
                </draw:g>
              </table:table-cell>
              <table:table-cell office:value-type="string">
                <text:p>Instructions</text:p>
                <draw:g>
                  <svg:desc>Figures.C1:Figur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mark</text:p>
                <draw:g>
                  <svg:desc>Figures.A2:Figures.A7</svg:desc>
                </draw:g>
              </table:table-cell>
              <table:table-cell office:value-type="float" office:value="-0.00131186502401716">
                <text:p>-0.00131186502401716</text:p>
                <draw:g>
                  <svg:desc>Figures.B2:Figures.B7</svg:desc>
                </draw:g>
              </table:table-cell>
              <table:table-cell office:value-type="float" office:value="NaN">
                <text:p>NaN</text:p>
                <draw:g>
                  <svg:desc>Figures.C2:Figures.C7</svg:desc>
                </draw:g>
              </table:table-cell>
            </table:table-row>
            <table:table-row>
              <table:table-cell office:value-type="string">
                <text:p>libc-bench_malloc</text:p>
              </table:table-cell>
              <table:table-cell office:value-type="float" office:value="0.079953106393017">
                <text:p>0.079953106393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_string</text:p>
              </table:table-cell>
              <table:table-cell office:value-type="float" office:value="0.0387910686988185">
                <text:p>0.0387910686988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_regex</text:p>
              </table:table-cell>
              <table:table-cell office:value-type="float" office:value="0.141069058145976">
                <text:p>0.141069058145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231cm" svg:y="3.862cm" style:legend-expansion="high" chart:style-name="ch2"/>
        <chart:plot-area chart:style-name="ch3" table:cell-range-address="Figures.A9:Figures.E15" chart:data-source-has-labels="both" svg:x="1.377cm" svg:y="0.196cm" svg:width="9.537cm" svg:height="9.424cm">
          <chartooo:coordinate-region svg:x="1.761cm" svg:y="0.196cm" svg:width="8.822cm" svg:height="8.927cm"/>
          <chart:axis chart:dimension="x" chart:name="primary-x" chart:style-name="ch4" chartooo:axis-type="text">
            <chart:title svg:x="0.451cm" svg:y="8.068cm" chart:style-name="ch5">
              <text:p>Return Encapsulation Overhead Per Call</text:p>
            </chart:title>
            <chart:categories table:cell-range-address="Figures.A11:Figures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gures.B11:Figures.B15" chart:label-cell-address="Figures.B9:Figures.B10" chart:class="chart:bar">
            <chart:data-point chart:repeated="5"/>
          </chart:series>
          <chart:series chart:style-name="ch9" chart:values-cell-range-address="Figures.C11:Figures.C15" chart:label-cell-address="Figures.C9:Figures.C10" chart:class="chart:bar">
            <chart:data-point chart:repeated="5"/>
          </chart:series>
          <chart:series chart:style-name="ch10" chart:values-cell-range-address="Figures.D11:Figures.D15" chart:label-cell-address="Figures.D9:Figures.D10" chart:class="chart:bar">
            <chart:data-point chart:repeated="5"/>
          </chart:series>
          <chart:series chart:style-name="ch11" chart:values-cell-range-address="Figures.E11:Figures.E15" chart:label-cell-address="Figures.E9:Figures.E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5 Cycles Trampoline</text:p>
                <text:list>
                  <text:list-item>
                    <text:p>Gem5 Cycles</text:p>
                  </text:list-item>
                  <text:list-item>
                    <text:p>Trampoline</text:p>
                  </text:list-item>
                </text:list>
                <draw:g>
                  <svg:desc>Figures.B9:Figures.B10</svg:desc>
                </draw:g>
              </table:table-cell>
              <table:table-cell office:value-type="string">
                <text:p>Indirect Sentry</text:p>
                <text:list>
                  <text:list-item>
                    <text:p/>
                  </text:list-item>
                  <text:list-item>
                    <text:p>Indirect Sentry</text:p>
                  </text:list-item>
                </text:list>
                <draw:g>
                  <svg:desc>Figures.C9:Figures.C10</svg:desc>
                </draw:g>
              </table:table-cell>
              <table:table-cell office:value-type="string">
                <text:p>Instructions Trampoline</text:p>
                <text:list>
                  <text:list-item>
                    <text:p>Instructions</text:p>
                  </text:list-item>
                  <text:list-item>
                    <text:p>Trampoline</text:p>
                  </text:list-item>
                </text:list>
                <draw:g>
                  <svg:desc>Figures.D9:Figures.D10</svg:desc>
                </draw:g>
              </table:table-cell>
              <table:table-cell office:value-type="string">
                <text:p>Indirect Sentry</text:p>
                <text:list>
                  <text:list-item>
                    <text:p/>
                  </text:list-item>
                  <text:list-item>
                    <text:p>Indirect Sentry</text:p>
                  </text:list-item>
                </text:list>
                <draw:g>
                  <svg:desc>Figures.E9:Figures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mark</text:p>
                <draw:g>
                  <svg:desc>Figures.A11:Figures.A15</svg:desc>
                </draw:g>
              </table:table-cell>
              <table:table-cell office:value-type="float" office:value="-0.00388748565244574">
                <text:p>-0.00388748565244574</text:p>
                <draw:g>
                  <svg:desc>Figures.B11:Figures.B15</svg:desc>
                </draw:g>
              </table:table-cell>
              <table:table-cell office:value-type="float" office:value="-0.0120514712964205">
                <text:p>-0.0120514712964205</text:p>
                <draw:g>
                  <svg:desc>Figures.C11:Figures.C15</svg:desc>
                </draw:g>
              </table:table-cell>
              <table:table-cell office:value-type="float" office:value="NaN">
                <text:p>NaN</text:p>
                <draw:g>
                  <svg:desc>Figures.D11:Figures.D15</svg:desc>
                </draw:g>
              </table:table-cell>
              <table:table-cell office:value-type="float" office:value="0">
                <text:p>0</text:p>
                <draw:g>
                  <svg:desc>Figures.E11:Figures.E15</svg:desc>
                </draw:g>
              </table:table-cell>
            </table:table-row>
            <table:table-row>
              <table:table-cell office:value-type="string">
                <text:p>libc-bench_malloc</text:p>
              </table:table-cell>
              <table:table-cell office:value-type="float" office:value="-0.00549800792196247">
                <text:p>-0.00549800792196247</text:p>
              </table:table-cell>
              <table:table-cell office:value-type="float" office:value="-0.00380062029779412">
                <text:p>-0.0038006202977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_string</text:p>
              </table:table-cell>
              <table:table-cell office:value-type="float" office:value="-0.0396017942749047">
                <text:p>-0.0396017942749047</text:p>
              </table:table-cell>
              <table:table-cell office:value-type="float" office:value="-0.0217058412770497">
                <text:p>-0.021705841277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_regex</text:p>
              </table:table-cell>
              <table:table-cell office:value-type="float" office:value="0.000315323674471305">
                <text:p>0.000315323674471305</text:p>
              </table:table-cell>
              <table:table-cell office:value-type="float" office:value="0.00296913011287227">
                <text:p>0.0029691301128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2pt" style:font-family-asian="Arial" style:font-size-asian="12pt" style:font-family-complex="Arial" style:font-size-complex="12pt"/>
    </style:style>
    <style:style style:name="ch3" style:family="chart">
      <style:chart-properties chart:stacked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229cm" svg:height="9.499cm" xlink:href=".." xlink:type="simple" chart:class="chart:bar" chart:style-name="ch1">
        <chart:legend chart:legend-position="top" svg:x="2.672cm" svg:y="0.185cm" style:legend-expansion="wide" chart:style-name="ch2"/>
        <chart:plot-area chart:style-name="ch3" table:cell-range-address="'Cycles ideal'.B2:'Cycles ideal'.B9 'Cycles ideal'.E1:'Cycles ideal'.H9" chart:data-source-has-labels="both" svg:x="1.419cm" svg:y="1.576cm" svg:width="11.546cm" svg:height="6.609cm">
          <chartooo:coordinate-region svg:x="4.298cm" svg:y="1.576cm" svg:width="8.546cm" svg:height="6.059cm"/>
          <chart:axis chart:dimension="x" chart:name="primary-x" chart:style-name="ch4" chartooo:axis-type="text">
            <chart:title svg:x="0.451cm" svg:y="6.028cm" chart:style-name="ch5">
              <text:p>Benchmark</text:p>
            </chart:title>
            <chart:categories table:cell-range-address="'Cycles ideal'.B2:'Cycles ideal'.B9"/>
          </chart:axis>
          <chart:axis chart:dimension="y" chart:name="primary-y" chart:style-name="ch6">
            <chart:title svg:x="4.139cm" svg:y="8.374cm" chart:style-name="ch7">
              <text:p>Relative Gem5 Cycle Overhead</text:p>
            </chart:title>
            <chart:grid chart:style-name="ch8" chart:class="major"/>
          </chart:axis>
          <chart:series chart:style-name="ch9" chart:values-cell-range-address="'Cycles ideal'.E2:'Cycles ideal'.E9" chart:label-cell-address="'Cycles ideal'.E1:'Cycles ideal'.E1" chart:class="chart:bar">
            <chart:data-point chart:repeated="8"/>
          </chart:series>
          <chart:series chart:style-name="ch10" chart:values-cell-range-address="'Cycles ideal'.F2:'Cycles ideal'.F9" chart:label-cell-address="'Cycles ideal'.F1:'Cycles ideal'.F1" chart:class="chart:bar">
            <chart:data-point chart:repeated="8"/>
          </chart:series>
          <chart:series chart:style-name="ch11" chart:values-cell-range-address="'Cycles ideal'.G2:'Cycles ideal'.G9" chart:label-cell-address="'Cycles ideal'.G1:'Cycles ideal'.G1" chart:class="chart:bar">
            <chart:data-point chart:repeated="8"/>
          </chart:series>
          <chart:series chart:style-name="ch12" chart:values-cell-range-address="'Cycles ideal'.H2:'Cycles ideal'.H9" chart:label-cell-address="'Cycles ideal'.H1:'Cycles ideal'.H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ck Revocation</text:p>
                <draw:g>
                  <svg:desc>'Cycles ideal'.E1:'Cycles ideal'.E1</svg:desc>
                </draw:g>
              </table:table-cell>
              <table:table-cell office:value-type="string">
                <text:p>Reserve Stack</text:p>
                <draw:g>
                  <svg:desc>'Cycles ideal'.F1:'Cycles ideal'.F1</svg:desc>
                </draw:g>
              </table:table-cell>
              <table:table-cell office:value-type="string">
                <text:p>Encapsulation</text:p>
                <draw:g>
                  <svg:desc>'Cycles ideal'.G1:'Cycles ideal'.G1</svg:desc>
                </draw:g>
              </table:table-cell>
              <table:table-cell office:value-type="string">
                <text:p>Register Clearing</text:p>
                <draw:g>
                  <svg:desc>'Cycles ideal'.H1:'Cycles ideal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ycles ideal'.B2:'Cycles ideal'.B9</svg:desc>
                </draw:g>
              </table:table-cell>
              <table:table-cell office:value-type="float" office:value="NaN">
                <text:p>NaN</text:p>
                <draw:g>
                  <svg:desc>'Cycles ideal'.E2:'Cycles ideal'.E9</svg:desc>
                </draw:g>
              </table:table-cell>
              <table:table-cell office:value-type="float" office:value="NaN">
                <text:p>NaN</text:p>
                <draw:g>
                  <svg:desc>'Cycles ideal'.F2:'Cycles ideal'.F9</svg:desc>
                </draw:g>
              </table:table-cell>
              <table:table-cell office:value-type="float" office:value="NaN">
                <text:p>NaN</text:p>
                <draw:g>
                  <svg:desc>'Cycles ideal'.G2:'Cycles ideal'.G9</svg:desc>
                </draw:g>
              </table:table-cell>
              <table:table-cell office:value-type="float" office:value="NaN">
                <text:p>NaN</text:p>
                <draw:g>
                  <svg:desc>'Cycles ideal'.H2:'Cycles ideal'.H9</svg:desc>
                </draw:g>
              </table:table-cell>
            </table:table-row>
            <table:table-row>
              <table:table-cell office:value-type="string">
                <text:p>Coremar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Mallo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Str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Reg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1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9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11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03cm" svg:height="7.99cm" xlink:href=".." xlink:type="simple" chart:class="chart:bar" chart:style-name="ch1">
        <chart:legend chart:legend-position="end" svg:x="16.523cm" svg:y="2.949cm" style:legend-expansion="high" chart:style-name="ch2"/>
        <chart:plot-area chart:style-name="ch3" table:cell-range-address="'Instructions ideal'.B2:'Instructions ideal'.B9 'Instructions ideal'.E1:'Instructions ideal'.H9" chart:data-source-has-labels="both" svg:x="1.46cm" svg:y="0.159cm" svg:width="14.663cm" svg:height="7.672cm">
          <chartooo:coordinate-region svg:x="4.339cm" svg:y="0.159cm" svg:width="11.644cm" svg:height="6.338cm"/>
          <chart:axis chart:dimension="x" chart:name="primary-x" chart:style-name="ch4" chartooo:axis-type="text">
            <chart:title svg:x="0.451cm" svg:y="4.932cm" chart:style-name="ch5">
              <text:p>Benchmark</text:p>
            </chart:title>
            <chart:categories table:cell-range-address="'Instructions ideal'.B2:'Instructions ideal'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structions ideal'.E2:'Instructions ideal'.E9" chart:label-cell-address="'Instructions ideal'.E1:'Instructions ideal'.E1" chart:class="chart:bar">
            <chart:data-point chart:repeated="8"/>
          </chart:series>
          <chart:series chart:style-name="ch9" chart:values-cell-range-address="'Instructions ideal'.F2:'Instructions ideal'.F9" chart:label-cell-address="'Instructions ideal'.F1:'Instructions ideal'.F1" chart:class="chart:bar">
            <chart:data-point chart:repeated="8"/>
          </chart:series>
          <chart:series chart:style-name="ch10" chart:values-cell-range-address="'Instructions ideal'.G2:'Instructions ideal'.G9" chart:label-cell-address="'Instructions ideal'.G1:'Instructions ideal'.G1" chart:class="chart:bar">
            <chart:data-point chart:repeated="8"/>
          </chart:series>
          <chart:series chart:style-name="ch11" chart:values-cell-range-address="'Instructions ideal'.H2:'Instructions ideal'.H9" chart:label-cell-address="'Instructions ideal'.H1:'Instructions ideal'.H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ck Revocation</text:p>
                <draw:g>
                  <svg:desc>'Instructions ideal'.E1:'Instructions ideal'.E1</svg:desc>
                </draw:g>
              </table:table-cell>
              <table:table-cell office:value-type="string">
                <text:p>Reserve Stack</text:p>
                <draw:g>
                  <svg:desc>'Instructions ideal'.F1:'Instructions ideal'.F1</svg:desc>
                </draw:g>
              </table:table-cell>
              <table:table-cell office:value-type="string">
                <text:p>Encapsulation</text:p>
                <draw:g>
                  <svg:desc>'Instructions ideal'.G1:'Instructions ideal'.G1</svg:desc>
                </draw:g>
              </table:table-cell>
              <table:table-cell office:value-type="string">
                <text:p>Register Clearing</text:p>
                <draw:g>
                  <svg:desc>'Instructions ideal'.H1:'Instructions ideal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structions ideal'.B2:'Instructions ideal'.B9</svg:desc>
                </draw:g>
              </table:table-cell>
              <table:table-cell office:value-type="float" office:value="NaN">
                <text:p>NaN</text:p>
                <draw:g>
                  <svg:desc>'Instructions ideal'.E2:'Instructions ideal'.E9</svg:desc>
                </draw:g>
              </table:table-cell>
              <table:table-cell office:value-type="float" office:value="NaN">
                <text:p>NaN</text:p>
                <draw:g>
                  <svg:desc>'Instructions ideal'.F2:'Instructions ideal'.F9</svg:desc>
                </draw:g>
              </table:table-cell>
              <table:table-cell office:value-type="float" office:value="NaN">
                <text:p>NaN</text:p>
                <draw:g>
                  <svg:desc>'Instructions ideal'.G2:'Instructions ideal'.G9</svg:desc>
                </draw:g>
              </table:table-cell>
              <table:table-cell office:value-type="float" office:value="NaN">
                <text:p>NaN</text:p>
                <draw:g>
                  <svg:desc>'Instructions ideal'.H2:'Instructions ideal'.H9</svg:desc>
                </draw:g>
              </table:table-cell>
            </table:table-row>
            <table:table-row>
              <table:table-cell office:value-type="string">
                <text:p>Coremar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Mallo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Str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Reg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1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9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2pt" style:font-family-asian="Arial" style:font-size-asian="12pt" style:font-family-complex="Arial" style:font-size-complex="12pt"/>
    </style:style>
    <style:style style:name="ch3" style:family="chart">
      <style:chart-properties chart:stacked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256cm" svg:height="7.303cm" xlink:href=".." xlink:type="simple" chart:class="chart:bar" chart:style-name="ch1">
        <chart:legend chart:legend-position="end" svg:x="9.105cm" svg:y="2.774cm" style:legend-expansion="high" chart:style-name="ch2"/>
        <chart:plot-area chart:style-name="ch3" table:cell-range-address="'Stack ideal'.B2:'Stack ideal'.B9 'Stack ideal'.E1:'Stack ideal'.G9" chart:data-source-has-labels="both" svg:x="1.42cm" svg:y="0.146cm" svg:width="7.42cm" svg:height="5.886cm">
          <chartooo:coordinate-region svg:x="4.299cm" svg:y="0.146cm" svg:width="4.42cm" svg:height="5.336cm"/>
          <chart:axis chart:dimension="x" chart:name="primary-x" chart:style-name="ch4" chartooo:axis-type="text">
            <chart:title svg:x="0.451cm" svg:y="4.237cm" chart:style-name="ch5">
              <text:p>Benchmark</text:p>
            </chart:title>
            <chart:categories table:cell-range-address="'Stack ideal'.B2:'Stack ideal'.B9"/>
          </chart:axis>
          <chart:axis chart:dimension="y" chart:name="primary-y" chart:style-name="ch6">
            <chart:title svg:x="1.813cm" svg:y="6.178cm" chart:style-name="ch7">
              <text:p>Relative Stack Pressure Overhead</text:p>
            </chart:title>
            <chart:grid chart:style-name="ch8" chart:class="major"/>
          </chart:axis>
          <chart:series chart:style-name="ch9" chart:values-cell-range-address="'Stack ideal'.E2:'Stack ideal'.E9" chart:label-cell-address="'Stack ideal'.E1:'Stack ideal'.E1" chart:class="chart:bar">
            <chart:data-point chart:repeated="8"/>
          </chart:series>
          <chart:series chart:style-name="ch10" chart:values-cell-range-address="'Stack ideal'.F2:'Stack ideal'.F9" chart:label-cell-address="'Stack ideal'.F1:'Stack ideal'.F1" chart:class="chart:bar">
            <chart:data-point chart:repeated="8"/>
          </chart:series>
          <chart:series chart:style-name="ch11" chart:values-cell-range-address="'Stack ideal'.G2:'Stack ideal'.G9" chart:label-cell-address="'Stack ideal'.G1:'Stack ideal'.G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erve Stack</text:p>
                <draw:g>
                  <svg:desc>'Stack ideal'.E1:'Stack ideal'.E1</svg:desc>
                </draw:g>
              </table:table-cell>
              <table:table-cell office:value-type="string">
                <text:p>Encapsulation</text:p>
                <draw:g>
                  <svg:desc>'Stack ideal'.F1:'Stack ideal'.F1</svg:desc>
                </draw:g>
              </table:table-cell>
              <table:table-cell office:value-type="string">
                <text:p>Register Clearing</text:p>
                <draw:g>
                  <svg:desc>'Stack ideal'.G1:'Stack ideal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tack ideal'.B2:'Stack ideal'.B9</svg:desc>
                </draw:g>
              </table:table-cell>
              <table:table-cell office:value-type="float" office:value="NaN">
                <text:p>NaN</text:p>
                <draw:g>
                  <svg:desc>'Stack ideal'.E2:'Stack ideal'.E9</svg:desc>
                </draw:g>
              </table:table-cell>
              <table:table-cell office:value-type="float" office:value="NaN">
                <text:p>NaN</text:p>
                <draw:g>
                  <svg:desc>'Stack ideal'.F2:'Stack ideal'.F9</svg:desc>
                </draw:g>
              </table:table-cell>
              <table:table-cell office:value-type="float" office:value="NaN">
                <text:p>NaN</text:p>
                <draw:g>
                  <svg:desc>'Stack ideal'.G2:'Stack ideal'.G9</svg:desc>
                </draw:g>
              </table:table-cell>
            </table:table-row>
            <table:table-row>
              <table:table-cell office:value-type="string">
                <text:p>Coremar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Mallo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Str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Reg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1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9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2pt" style:font-family-asian="Arial" style:font-size-asian="12pt" style:font-family-complex="Arial" style:font-size-complex="12pt"/>
    </style:style>
    <style:style style:name="ch3" style:family="chart">
      <style:chart-properties chart:stacked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256cm" svg:height="6.747cm" xlink:href=".." xlink:type="simple" chart:class="chart:bar" chart:style-name="ch1">
        <chart:legend chart:legend-position="end" svg:x="9.105cm" svg:y="2.496cm" style:legend-expansion="high" chart:style-name="ch2"/>
        <chart:plot-area chart:style-name="ch3" table:cell-range-address="'Stack Allocation ideal'.B2:'Stack Allocation ideal'.B9 'Stack Allocation ideal'.E1:'Stack Allocation ideal'.G9" chart:data-source-has-labels="both" svg:x="1.42cm" svg:y="0.134cm" svg:width="7.42cm" svg:height="5.354cm">
          <chartooo:coordinate-region svg:x="4.299cm" svg:y="0.134cm" svg:width="4.42cm" svg:height="4.804cm"/>
          <chart:axis chart:dimension="x" chart:name="primary-x" chart:style-name="ch4" chartooo:axis-type="text">
            <chart:title svg:x="0.451cm" svg:y="3.959cm" chart:style-name="ch5">
              <text:p>Benchmark</text:p>
            </chart:title>
            <chart:categories table:cell-range-address="'Stack Allocation ideal'.B2:'Stack Allocation ideal'.B9"/>
          </chart:axis>
          <chart:axis chart:dimension="y" chart:name="primary-y" chart:style-name="ch6">
            <chart:title svg:x="1.72cm" svg:y="5.622cm" chart:style-name="ch7">
              <text:p>Relative Stack Allocation Overhead</text:p>
            </chart:title>
            <chart:grid chart:style-name="ch8" chart:class="major"/>
          </chart:axis>
          <chart:series chart:style-name="ch9" chart:values-cell-range-address="'Stack Allocation ideal'.E2:'Stack Allocation ideal'.E9" chart:label-cell-address="'Stack Allocation ideal'.E1:'Stack Allocation ideal'.E1" chart:class="chart:bar">
            <chart:data-point chart:repeated="8"/>
          </chart:series>
          <chart:series chart:style-name="ch10" chart:values-cell-range-address="'Stack Allocation ideal'.F2:'Stack Allocation ideal'.F9" chart:label-cell-address="'Stack Allocation ideal'.F1:'Stack Allocation ideal'.F1" chart:class="chart:bar">
            <chart:data-point chart:repeated="8"/>
          </chart:series>
          <chart:series chart:style-name="ch11" chart:values-cell-range-address="'Stack Allocation ideal'.G2:'Stack Allocation ideal'.G9" chart:label-cell-address="'Stack Allocation ideal'.G1:'Stack Allocation ideal'.G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erve Stack</text:p>
                <draw:g>
                  <svg:desc>'Stack Allocation ideal'.E1:'Stack Allocation ideal'.E1</svg:desc>
                </draw:g>
              </table:table-cell>
              <table:table-cell office:value-type="string">
                <text:p>Encapsulation</text:p>
                <draw:g>
                  <svg:desc>'Stack Allocation ideal'.F1:'Stack Allocation ideal'.F1</svg:desc>
                </draw:g>
              </table:table-cell>
              <table:table-cell office:value-type="string">
                <text:p>Register Clearing</text:p>
                <draw:g>
                  <svg:desc>'Stack Allocation ideal'.G1:'Stack Allocation ideal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tack Allocation ideal'.B2:'Stack Allocation ideal'.B9</svg:desc>
                </draw:g>
              </table:table-cell>
              <table:table-cell office:value-type="float" office:value="NaN">
                <text:p>NaN</text:p>
                <draw:g>
                  <svg:desc>'Stack Allocation ideal'.E2:'Stack Allocation ideal'.E9</svg:desc>
                </draw:g>
              </table:table-cell>
              <table:table-cell office:value-type="float" office:value="NaN">
                <text:p>NaN</text:p>
                <draw:g>
                  <svg:desc>'Stack Allocation ideal'.F2:'Stack Allocation ideal'.F9</svg:desc>
                </draw:g>
              </table:table-cell>
              <table:table-cell office:value-type="float" office:value="NaN">
                <text:p>NaN</text:p>
                <draw:g>
                  <svg:desc>'Stack Allocation ideal'.G2:'Stack Allocation ideal'.G9</svg:desc>
                </draw:g>
              </table:table-cell>
            </table:table-row>
            <table:table-row>
              <table:table-cell office:value-type="string">
                <text:p>Coremar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Mallo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Str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Reg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1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9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2pt" style:font-family-asian="Arial" style:font-size-asian="12pt" style:font-family-complex="Arial" style:font-size-complex="12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29cm" svg:height="8.361cm" xlink:href=".." xlink:type="simple" chart:class="chart:bar" chart:style-name="ch1">
        <chart:legend chart:legend-position="end" svg:x="8.972cm" svg:y="3.579cm" style:legend-expansion="high" chart:style-name="ch2"/>
        <chart:plot-area chart:style-name="ch3" table:cell-range-address="'Reserve Stack'.B2:'Reserve Stack'.B9 'Reserve Stack'.E1:'Reserve Stack'.F9" chart:data-source-has-labels="both" svg:x="1.419cm" svg:y="0.167cm" svg:width="7.289cm" svg:height="6.902cm">
          <chartooo:coordinate-region svg:x="4.298cm" svg:y="0.167cm" svg:width="4.289cm" svg:height="6.352cm"/>
          <chart:axis chart:dimension="x" chart:name="primary-x" chart:style-name="ch4" chartooo:axis-type="text">
            <chart:title svg:x="0.451cm" svg:y="4.766cm" chart:style-name="ch5">
              <text:p>Benchmark</text:p>
            </chart:title>
            <chart:categories table:cell-range-address="'Reserve Stack'.B2:'Reserve Stack'.B9"/>
          </chart:axis>
          <chart:axis chart:dimension="y" chart:name="primary-y" chart:style-name="ch6">
            <chart:title svg:x="1.746cm" svg:y="7.236cm" chart:style-name="ch7">
              <text:p>Relative Stack Pressure Overhead</text:p>
            </chart:title>
            <chart:grid chart:style-name="ch8" chart:class="major"/>
          </chart:axis>
          <chart:series chart:style-name="ch9" chart:values-cell-range-address="'Reserve Stack'.E2:'Reserve Stack'.E9" chart:label-cell-address="'Reserve Stack'.E1:'Reserve Stack'.E1" chart:class="chart:bar">
            <chart:data-point chart:repeated="8"/>
          </chart:series>
          <chart:series chart:style-name="ch10" chart:values-cell-range-address="'Reserve Stack'.F2:'Reserve Stack'.F9" chart:label-cell-address="'Reserve Stack'.F1:'Reserve Stack'.F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erve Stack Off</text:p>
                <draw:g>
                  <svg:desc>'Reserve Stack'.E1:'Reserve Stack'.E1</svg:desc>
                </draw:g>
              </table:table-cell>
              <table:table-cell office:value-type="string">
                <text:p>Reserve Stack On</text:p>
                <draw:g>
                  <svg:desc>'Reserve Stack'.F1:'Reserve Stack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eserve Stack'.B2:'Reserve Stack'.B9</svg:desc>
                </draw:g>
              </table:table-cell>
              <table:table-cell office:value-type="float" office:value="NaN">
                <text:p>NaN</text:p>
                <draw:g>
                  <svg:desc>'Reserve Stack'.E2:'Reserve Stack'.E9</svg:desc>
                </draw:g>
              </table:table-cell>
              <table:table-cell office:value-type="float" office:value="NaN">
                <text:p>NaN</text:p>
                <draw:g>
                  <svg:desc>'Reserve Stack'.F2:'Reserve Stack'.F9</svg:desc>
                </draw:g>
              </table:table-cell>
            </table:table-row>
            <table:table-row>
              <table:table-cell office:value-type="string">
                <text:p>Coremar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Mallo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Str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Reg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1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9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2pt" style:font-family-asian="Arial" style:font-size-asian="12pt" style:font-family-complex="Arial" style:font-size-complex="12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0.1" chart:interval-major="0.02" chart:interval-minor-divisor="4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896cm" svg:height="10.583cm" xlink:href=".." xlink:type="simple" chart:class="chart:bar" chart:style-name="ch1">
        <chart:legend chart:legend-position="end" svg:x="11.194cm" svg:y="4.139cm" style:legend-expansion="high" chart:style-name="ch2"/>
        <chart:plot-area chart:style-name="ch3" table:cell-range-address="'Encapsulation Comparison'.B1:'Encapsulation Comparison'.F9" chart:data-source-has-labels="both" svg:x="1.452cm" svg:y="0.211cm" svg:width="9.445cm" svg:height="9.036cm">
          <chartooo:coordinate-region svg:x="4.331cm" svg:y="0.211cm" svg:width="6.273cm" svg:height="8.486cm"/>
          <chart:axis chart:dimension="x" chart:name="primary-x" chart:style-name="ch4" chartooo:axis-type="text">
            <chart:title svg:x="0.451cm" svg:y="5.877cm" chart:style-name="ch5">
              <text:p>Benchmark</text:p>
            </chart:title>
            <chart:categories table:cell-range-address="'Encapsulation Comparison'.B2:'Encapsulation Comparison'.B9"/>
          </chart:axis>
          <chart:axis chart:dimension="y" chart:name="primary-y" chart:style-name="ch6">
            <chart:title svg:x="1.163cm" svg:y="9.458cm" chart:style-name="ch7">
              <text:p>Overhead differential (negative favors indirect sentry)</text:p>
            </chart:title>
            <chart:grid chart:style-name="ch8" chart:class="major"/>
          </chart:axis>
          <chart:series chart:style-name="ch9" chart:values-cell-range-address="'Encapsulation Comparison'.C2:'Encapsulation Comparison'.C9" chart:label-cell-address="'Encapsulation Comparison'.C1:'Encapsulation Comparison'.C1" chart:class="chart:bar">
            <chart:data-point chart:repeated="8"/>
          </chart:series>
          <chart:series chart:style-name="ch10" chart:values-cell-range-address="'Encapsulation Comparison'.D2:'Encapsulation Comparison'.D9" chart:label-cell-address="'Encapsulation Comparison'.D1:'Encapsulation Comparison'.D1" chart:class="chart:bar">
            <chart:data-point chart:repeated="8"/>
          </chart:series>
          <chart:series chart:style-name="ch11" chart:values-cell-range-address="'Encapsulation Comparison'.E2:'Encapsulation Comparison'.E9" chart:label-cell-address="'Encapsulation Comparison'.E1:'Encapsulation Comparison'.E1" chart:class="chart:bar">
            <chart:data-point chart:repeated="8"/>
          </chart:series>
          <chart:series chart:style-name="ch12" chart:values-cell-range-address="'Encapsulation Comparison'.F2:'Encapsulation Comparison'.F9" chart:label-cell-address="'Encapsulation Comparison'.F1:'Encapsulation Comparison'.F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</text:p>
                <draw:g>
                  <svg:desc>'Encapsulation Comparison'.C1:'Encapsulation Comparison'.C1</svg:desc>
                </draw:g>
              </table:table-cell>
              <table:table-cell office:value-type="string">
                <text:p>Stack Pressure</text:p>
                <draw:g>
                  <svg:desc>'Encapsulation Comparison'.D1:'Encapsulation Comparison'.D1</svg:desc>
                </draw:g>
              </table:table-cell>
              <table:table-cell office:value-type="string">
                <text:p/>
                <draw:g>
                  <svg:desc>'Encapsulation Comparison'.E1:'Encapsulation Comparison'.E1</svg:desc>
                </draw:g>
              </table:table-cell>
              <table:table-cell office:value-type="string">
                <text:p/>
                <draw:g>
                  <svg:desc>'Encapsulation Comparison'.F1:'Encapsulation Compariso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capsulation Comparison'.B2:'Encapsulation Comparison'.B9</svg:desc>
                </draw:g>
              </table:table-cell>
              <table:table-cell office:value-type="float" office:value="NaN">
                <text:p>NaN</text:p>
                <draw:g>
                  <svg:desc>'Encapsulation Comparison'.C2:'Encapsulation Comparison'.C9</svg:desc>
                </draw:g>
              </table:table-cell>
              <table:table-cell office:value-type="float" office:value="NaN">
                <text:p>NaN</text:p>
                <draw:g>
                  <svg:desc>'Encapsulation Comparison'.D2:'Encapsulation Comparison'.D9</svg:desc>
                </draw:g>
              </table:table-cell>
              <table:table-cell office:value-type="float" office:value="NaN">
                <text:p>NaN</text:p>
                <draw:g>
                  <svg:desc>'Encapsulation Comparison'.E2:'Encapsulation Comparison'.E9</svg:desc>
                </draw:g>
              </table:table-cell>
              <table:table-cell office:value-type="float" office:value="NaN">
                <text:p>NaN</text:p>
                <draw:g>
                  <svg:desc>'Encapsulation Comparison'.F2:'Encapsulation Comparison'.F9</svg:desc>
                </draw:g>
              </table:table-cell>
            </table:table-row>
            <table:table-row>
              <table:table-cell office:value-type="string">
                <text:p>Coremar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Mallo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Str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c-bench Reg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1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5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μbench 90%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